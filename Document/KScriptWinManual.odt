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151000001143CEE6B75.png" manifest:media-type="image/png"/>
  <manifest:file-entry manifest:full-path="Pictures/100000000000030700000231EDFB9F76.png" manifest:media-type="image/png"/>
  <manifest:file-entry manifest:full-path="Pictures/10000000000001B800000060DF5444C0.png" manifest:media-type="image/png"/>
  <manifest:file-entry manifest:full-path="Pictures/100000000000034E000002A8B9E008B8.png" manifest:media-type="image/png"/>
  <manifest:file-entry manifest:full-path="Pictures/10000000000001FC0000020BDABDFCBE.png" manifest:media-type="image/png"/>
  <manifest:file-entry manifest:full-path="Pictures/10000000000001B7000001C78A235AFE.png" manifest:media-type="image/png"/>
  <manifest:file-entry manifest:full-path="Pictures/10000000000001EA00000196110C26A4.png" manifest:media-type="image/png"/>
  <manifest:file-entry manifest:full-path="Pictures/100000000000007F0000008B22362667.png" manifest:media-type="image/png"/>
  <manifest:file-entry manifest:full-path="Pictures/100000000000012100000081A08DEFF8.png" manifest:media-type="image/png"/>
  <manifest:file-entry manifest:full-path="Pictures/100000000000020E00000190AEAB4D8C.png" manifest:media-type="image/png"/>
  <manifest:file-entry manifest:full-path="Pictures/10000000000000ED000000A477C27EB6.png" manifest:media-type="image/png"/>
  <manifest:file-entry manifest:full-path="Pictures/100000000000021200000190815D7115.png" manifest:media-type="image/png"/>
  <manifest:file-entry manifest:full-path="Pictures/10000000000000DF000000C19DA810A4.png" manifest:media-type="image/png"/>
  <manifest:file-entry manifest:full-path="Pictures/100000000000021300000192BD800958.png" manifest:media-type="image/png"/>
  <manifest:file-entry manifest:full-path="Pictures/10000000000001B5000001C22FE73483.png" manifest:media-type="image/png"/>
  <manifest:file-entry manifest:full-path="Pictures/10000000000001B5000001C3BD9C1CDB.png" manifest:media-type="image/png"/>
  <manifest:file-entry manifest:full-path="Pictures/100000000000017B00000086DEE52544.png" manifest:media-type="image/png"/>
  <manifest:file-entry manifest:full-path="Pictures/1000000000000199000000AFA74E66BE.png" manifest:media-type="image/png"/>
  <manifest:file-entry manifest:full-path="Pictures/10000000000001B300000088E445FE7E.png" manifest:media-type="image/png"/>
  <manifest:file-entry manifest:full-path="Pictures/10000000000001A90000009A90423B3A.png" manifest:media-type="image/png"/>
  <manifest:file-entry manifest:full-path="Pictures/100000000000015F00000078C51A5D75.png" manifest:media-type="image/png"/>
  <manifest:file-entry manifest:full-path="Pictures/100000000000018D000000899ED7DC28.png" manifest:media-type="image/png"/>
  <manifest:file-entry manifest:full-path="Pictures/1000000000000148000000BCC6C58C31.png" manifest:media-type="image/png"/>
  <manifest:file-entry manifest:full-path="Pictures/100000000000018B00000077975DDC64.png" manifest:media-type="image/png"/>
  <manifest:file-entry manifest:full-path="Pictures/100000000000015D00000089E9C00E28.png" manifest:media-type="image/png"/>
  <manifest:file-entry manifest:full-path="Pictures/100000000000016500000146A64E14E6.png" manifest:media-type="image/png"/>
  <manifest:file-entry manifest:full-path="Pictures/100000000000015F0000014693CFADFE.png" manifest:media-type="image/png"/>
  <manifest:file-entry manifest:full-path="Pictures/100000000000017400000180DF2960FF.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P1" style:family="paragraph" style:parent-style-name="Standard">
      <style:paragraph-properties fo:text-align="center" style:justify-single-word="false"/>
      <style:text-properties fo:font-size="14pt" officeooo:rsid="00101bc3" officeooo:paragraph-rsid="00101bc3" style:font-size-asian="14pt" style:font-size-complex="14pt"/>
    </style:style>
    <style:style style:name="P2" style:family="paragraph" style:parent-style-name="Standard">
      <style:text-properties fo:font-size="12pt" officeooo:rsid="00101bc3" officeooo:paragraph-rsid="00101bc3" style:font-size-asian="12pt" style:font-size-complex="12pt"/>
    </style:style>
    <style:style style:name="P3" style:family="paragraph" style:parent-style-name="Standard">
      <style:text-properties fo:font-size="12pt" officeooo:rsid="00115f16" officeooo:paragraph-rsid="00115f16" style:font-size-asian="12pt" style:font-size-complex="12pt"/>
    </style:style>
    <style:style style:name="P4" style:family="paragraph" style:parent-style-name="Standard">
      <style:text-properties officeooo:rsid="00101bc3" officeooo:paragraph-rsid="00101bc3"/>
    </style:style>
    <style:style style:name="P5" style:family="paragraph" style:parent-style-name="Standard">
      <style:text-properties officeooo:rsid="00115f16" officeooo:paragraph-rsid="00115f16"/>
    </style:style>
    <style:style style:name="P6" style:family="paragraph" style:parent-style-name="Standard">
      <style:paragraph-properties fo:break-before="page"/>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5">
      <style:paragraph-properties>
        <style:tab-stops>
          <style:tab-stop style:position="16.999cm" style:type="right" style:leader-style="dotted" style:leader-text="."/>
        </style:tab-stops>
      </style:paragraph-properties>
    </style:style>
    <style:style style:name="P9" style:family="paragraph" style:parent-style-name="Heading_20_2" style:list-style-name=""/>
    <style:style style:name="P10" style:family="paragraph" style:parent-style-name="Heading_20_2">
      <style:paragraph-properties fo:break-before="page"/>
    </style:style>
    <style:style style:name="P11" style:family="paragraph">
      <style:paragraph-properties fo:text-align="center" style:writing-mode="lr-tb"/>
    </style:style>
    <style:style style:name="P12" style:family="paragraph">
      <loext:graphic-properties draw:opacity="0%"/>
      <style:paragraph-properties fo:text-align="center" style:writing-mode="lr-tb"/>
    </style:style>
    <style:style style:name="P13" style:family="paragraph">
      <style:paragraph-properties fo:text-align="center" style:writing-mode="lr-tb"/>
      <style:text-properties fo:font-size="12pt"/>
    </style:style>
    <style:style style:name="P14" style:family="paragraph">
      <loext:graphic-properties draw:opacity="0%"/>
      <style:paragraph-properties fo:text-align="center" style:writing-mode="lr-tb"/>
      <style:text-properties fo:font-size="12pt"/>
    </style:style>
    <style:style style:name="P15" style:family="paragraph">
      <loext:graphic-properties draw:fill="bitmap" draw:fill-color="#729fcf" draw:fill-image-name="Bitmap_20_1" draw:opacity="0%"/>
    </style:style>
    <style:style style:name="P16" style:family="paragraph">
      <loext:graphic-properties draw:fill="solid" draw:fill-color="#729fcf" draw:opacity="0%"/>
      <style:text-properties fo:font-size="12pt"/>
    </style:style>
    <style:style style:name="P17" style:family="paragraph">
      <style:paragraph-properties fo:text-align="center"/>
    </style:style>
    <style:style style:name="P18" style:family="paragraph">
      <loext:graphic-properties draw:fill="solid" draw:fill-color="#ffffff" draw:opacity="100%"/>
      <style:paragraph-properties fo:text-align="center"/>
    </style:style>
    <style:style style:name="P19" style:family="paragraph">
      <loext:graphic-properties draw:fill="solid" draw:fill-color="#ffffff"/>
      <style:paragraph-properties fo:text-align="center"/>
    </style:style>
    <style:style style:name="P20" style:family="paragraph">
      <loext:graphic-properties draw:fill="solid" draw:fill-color="#729fcf" draw:opacity="0%"/>
    </style:style>
    <style:style style:name="P21" style:family="paragraph">
      <loext:graphic-properties draw:fill="solid" draw:fill-color="#ffffff"/>
      <style:paragraph-properties fo:text-align="center"/>
      <style:text-properties fo:font-size="12pt"/>
    </style:style>
    <style:style style:name="P22" style:family="paragraph" style:parent-style-name="Standard">
      <style:text-properties officeooo:rsid="001287df"/>
    </style:style>
    <style:style style:name="P23" style:family="paragraph" style:parent-style-name="Standard">
      <style:text-properties officeooo:paragraph-rsid="001287df"/>
    </style:style>
    <style:style style:name="P24" style:family="paragraph" style:parent-style-name="Standard">
      <style:text-properties officeooo:paragraph-rsid="001aa801"/>
    </style:style>
    <style:style style:name="P25" style:family="paragraph" style:parent-style-name="Standard">
      <style:text-properties officeooo:paragraph-rsid="002d0c12"/>
    </style:style>
    <style:style style:name="P26" style:family="paragraph" style:parent-style-name="Standard">
      <style:text-properties officeooo:paragraph-rsid="00144415"/>
    </style:style>
    <style:style style:name="P27" style:family="paragraph" style:parent-style-name="Standard" style:master-page-name="">
      <loext:graphic-properties draw:fill="none"/>
      <style:paragraph-properties fo:margin-left="5.001cm" fo:margin-right="0cm" fo:text-indent="-5.001cm" style:auto-text-indent="false" style:page-number="auto" fo:background-color="transparent"/>
    </style:style>
    <style:style style:name="P28" style:family="paragraph" style:parent-style-name="Standard">
      <loext:graphic-properties draw:fill="none"/>
      <style:paragraph-properties fo:margin-left="5.001cm" fo:margin-right="0cm" fo:text-indent="-5.001cm" style:auto-text-indent="false" fo:background-color="transparent"/>
    </style:style>
    <style:style style:name="P29" style:family="paragraph" style:parent-style-name="Standard">
      <style:text-properties officeooo:rsid="001aa801" officeooo:paragraph-rsid="001aa801"/>
    </style:style>
    <style:style style:name="P30" style:family="paragraph" style:parent-style-name="Standard">
      <style:text-properties officeooo:paragraph-rsid="00115f16"/>
    </style:style>
    <style:style style:name="P31" style:family="paragraph" style:parent-style-name="Heading_20_2">
      <style:paragraph-properties fo:break-before="page"/>
      <style:text-properties officeooo:rsid="0014bbc8" officeooo:paragraph-rsid="003c9aac"/>
    </style:style>
    <style:style style:name="P32" style:family="paragraph" style:parent-style-name="Standard">
      <style:text-properties officeooo:paragraph-rsid="00440b33"/>
    </style:style>
    <style:style style:name="P33" style:family="paragraph">
      <loext:graphic-properties draw:fill="none" draw:fill-color="#ffffff"/>
    </style:style>
    <style:style style:name="P34" style:family="paragraph" style:parent-style-name="Standard">
      <style:text-properties officeooo:rsid="002e9520" officeooo:paragraph-rsid="002e9520"/>
    </style:style>
    <style:style style:name="P35"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2e9520" officeooo:paragraph-rsid="002e9520"/>
    </style:style>
    <style:style style:name="P36" style:family="paragraph" style:parent-style-name="Standard">
      <loext:graphic-properties draw:fill="none"/>
      <style:paragraph-properties fo:margin-left="0.6cm" fo:margin-right="0cm" fo:text-indent="0cm" style:auto-text-indent="false" fo:background-color="transparent"/>
      <style:text-properties officeooo:rsid="002e9520" officeooo:paragraph-rsid="002e9520"/>
    </style:style>
    <style:style style:name="P37" style:family="paragraph" style:parent-style-name="Standard">
      <loext:graphic-properties draw:fill="none"/>
      <style:paragraph-properties fo:margin-left="2cm" fo:margin-right="0cm" fo:text-indent="0cm" style:auto-text-indent="false" fo:background-color="transparent"/>
    </style:style>
    <style:style style:name="P38" style:family="paragraph">
      <loext:graphic-properties draw:fill="solid" draw:fill-color="#1e6a39" draw:opacity="0%"/>
      <style:paragraph-properties style:writing-mode="lr-tb"/>
    </style:style>
    <style:style style:name="P39" style:family="paragraph" style:parent-style-name="Standard">
      <loext:graphic-properties draw:fill="none"/>
      <style:paragraph-properties fo:margin-left="2.2cm" fo:margin-right="0cm" fo:text-indent="0cm" style:auto-text-indent="false" fo:background-color="transparent"/>
    </style:style>
    <style:style style:name="P40" style:family="paragraph" style:parent-style-name="Standard">
      <style:text-properties officeooo:rsid="0014bbc8" officeooo:paragraph-rsid="0014bbc8"/>
    </style:style>
    <style:style style:name="P41" style:family="paragraph" style:parent-style-name="Standard">
      <style:text-properties officeooo:rsid="0014bbc8" officeooo:paragraph-rsid="00857289"/>
    </style:style>
    <style:style style:name="P42"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18fbcd" officeooo:paragraph-rsid="0018fbcd"/>
    </style:style>
    <style:style style:name="P43" style:family="paragraph" style:parent-style-name="Standard">
      <loext:graphic-properties draw:fill="none"/>
      <style:paragraph-properties fo:margin-left="2.499cm" fo:margin-right="0cm" fo:text-indent="-2.499cm" style:auto-text-indent="false" fo:background-color="transparent"/>
      <style:text-properties officeooo:rsid="0018fbcd" officeooo:paragraph-rsid="0018fbcd"/>
    </style:style>
    <style:style style:name="P44" style:family="paragraph" style:parent-style-name="Standard">
      <style:text-properties officeooo:rsid="0014bbc8" officeooo:paragraph-rsid="002357fb"/>
    </style:style>
    <style:style style:name="P45" style:family="paragraph" style:parent-style-name="Standard">
      <style:text-properties officeooo:rsid="002357fb" officeooo:paragraph-rsid="002357fb"/>
    </style:style>
    <style:style style:name="P46" style:family="paragraph" style:parent-style-name="Heading_20_5">
      <style:text-properties officeooo:paragraph-rsid="001ec3a6"/>
    </style:style>
    <style:style style:name="P47" style:family="paragraph" style:parent-style-name="Standard">
      <style:text-properties officeooo:rsid="0014bbc8" officeooo:paragraph-rsid="001ec3a6"/>
    </style:style>
    <style:style style:name="P48" style:family="paragraph" style:parent-style-name="Standard">
      <style:text-properties officeooo:paragraph-rsid="001ec3a6"/>
    </style:style>
    <style:style style:name="P49" style:family="paragraph" style:parent-style-name="Standard">
      <style:text-properties officeooo:rsid="001ec3a6" officeooo:paragraph-rsid="001ec3a6"/>
    </style:style>
    <style:style style:name="P50" style:family="paragraph" style:parent-style-name="Standard">
      <style:text-properties officeooo:rsid="0014bbc8" officeooo:paragraph-rsid="001b1cf5"/>
    </style:style>
    <style:style style:name="P51" style:family="paragraph" style:parent-style-name="Standard">
      <style:text-properties officeooo:rsid="001b1cf5" officeooo:paragraph-rsid="0014bbc8"/>
    </style:style>
    <style:style style:name="P52" style:family="paragraph" style:parent-style-name="Standard">
      <style:text-properties officeooo:rsid="001f8ee9" officeooo:paragraph-rsid="001f8ee9"/>
    </style:style>
    <style:style style:name="P53" style:family="paragraph" style:parent-style-name="Standard">
      <style:text-properties officeooo:rsid="0014bbc8" officeooo:paragraph-rsid="002188c6"/>
    </style:style>
    <style:style style:name="P54" style:family="paragraph" style:parent-style-name="Standard">
      <style:text-properties fo:font-weight="bold" officeooo:rsid="0014bbc8" officeooo:paragraph-rsid="0014bbc8" style:font-weight-asian="bold" style:font-weight-complex="bold"/>
    </style:style>
    <style:style style:name="P55" style:family="paragraph" style:parent-style-name="Standard">
      <style:text-properties officeooo:paragraph-rsid="0014bbc8"/>
    </style:style>
    <style:style style:name="P56" style:family="paragraph" style:parent-style-name="Standard">
      <style:text-properties officeooo:paragraph-rsid="002474cd"/>
    </style:style>
    <style:style style:name="P57" style:family="paragraph" style:parent-style-name="Standard">
      <style:text-properties officeooo:rsid="0014bbc8" officeooo:paragraph-rsid="0029bde3"/>
    </style:style>
    <style:style style:name="P58" style:family="paragraph" style:parent-style-name="Standard">
      <style:text-properties fo:font-weight="normal" officeooo:rsid="0014bbc8" officeooo:paragraph-rsid="0014bbc8" style:font-weight-asian="normal" style:font-weight-complex="normal"/>
    </style:style>
    <style:style style:name="P59" style:family="paragraph" style:parent-style-name="Standard" style:master-page-name="">
      <style:paragraph-properties style:page-number="auto"/>
      <style:text-properties officeooo:rsid="0014bbc8" officeooo:paragraph-rsid="0015adcc"/>
    </style:style>
    <style:style style:name="P60"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15adcc"/>
    </style:style>
    <style:style style:name="P61" style:family="paragraph" style:parent-style-name="Standard">
      <style:text-properties officeooo:rsid="0014bbc8" officeooo:paragraph-rsid="0081a529"/>
    </style:style>
    <style:style style:name="P62" style:family="paragraph" style:parent-style-name="Standard">
      <style:text-properties officeooo:rsid="008065b4" officeooo:paragraph-rsid="0081a529"/>
    </style:style>
    <style:style style:name="P63" style:family="paragraph" style:parent-style-name="Standard">
      <style:text-properties officeooo:rsid="0014bbc8" officeooo:paragraph-rsid="004e02fd"/>
    </style:style>
    <style:style style:name="P64" style:family="paragraph" style:parent-style-name="Standard">
      <style:text-properties officeooo:rsid="0014bbc8" officeooo:paragraph-rsid="0014c707"/>
    </style:style>
    <style:style style:name="P65"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14bbc8"/>
    </style:style>
    <style:style style:name="P66"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14bbc8"/>
    </style:style>
    <style:style style:name="P67" style:family="paragraph" style:parent-style-name="Heading_20_2" style:master-page-name="">
      <style:paragraph-properties style:page-number="auto" fo:break-before="page"/>
      <style:text-properties officeooo:paragraph-rsid="0088d5f4"/>
    </style:style>
    <style:style style:name="P68" style:family="paragraph" style:parent-style-name="Standard">
      <style:text-properties officeooo:rsid="0014bbc8" officeooo:paragraph-rsid="0088d5f4"/>
    </style:style>
    <style:style style:name="P69" style:family="paragraph" style:parent-style-name="Standard">
      <style:text-properties officeooo:rsid="0049b3d4" officeooo:paragraph-rsid="0088d5f4"/>
    </style:style>
    <style:style style:name="P70" style:family="paragraph" style:parent-style-name="Standard">
      <style:text-properties officeooo:paragraph-rsid="0088d5f4"/>
    </style:style>
    <style:style style:name="P71" style:family="paragraph" style:parent-style-name="Standard" style:master-page-name="">
      <loext:graphic-properties draw:fill="none"/>
      <style:paragraph-properties fo:margin-left="5.3cm" fo:margin-right="0cm" fo:text-indent="-5.3cm" style:auto-text-indent="false" style:page-number="auto" fo:background-color="transparent"/>
      <style:text-properties officeooo:rsid="0014bbc8" officeooo:paragraph-rsid="0014bbc8"/>
    </style:style>
    <style:style style:name="P72"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4bbc8"/>
    </style:style>
    <style:style style:name="P73"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5adcc"/>
    </style:style>
    <style:style style:name="P74" style:family="paragraph" style:parent-style-name="Standard">
      <loext:graphic-properties draw:fill="none"/>
      <style:paragraph-properties fo:margin-left="5.2cm" fo:margin-right="0cm" fo:text-indent="-5.2cm" style:auto-text-indent="false" fo:background-color="transparent"/>
      <style:text-properties officeooo:rsid="0015adcc" officeooo:paragraph-rsid="0015adcc"/>
    </style:style>
    <style:style style:name="P75" style:family="paragraph" style:parent-style-name="Heading_20_2">
      <style:paragraph-properties fo:break-before="page"/>
      <style:text-properties officeooo:paragraph-rsid="00497e1b"/>
    </style:style>
    <style:style style:name="P76" style:family="paragraph" style:parent-style-name="Standard">
      <style:text-properties officeooo:rsid="0014bbc8" officeooo:paragraph-rsid="00497e1b"/>
    </style:style>
    <style:style style:name="P7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9b3d4" officeooo:paragraph-rsid="0049b3d4"/>
    </style:style>
    <style:style style:name="P78" style:family="paragraph" style:parent-style-name="Standard">
      <loext:graphic-properties draw:fill="none"/>
      <style:paragraph-properties fo:margin-left="0.499cm" fo:margin-right="0cm" fo:text-indent="0cm" style:auto-text-indent="false" fo:background-color="transparent"/>
      <style:text-properties officeooo:rsid="0049b3d4" officeooo:paragraph-rsid="0049b3d4"/>
    </style:style>
    <style:style style:name="P79"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80" style:family="paragraph" style:parent-style-name="Standard">
      <loext:graphic-properties draw:fill="none"/>
      <style:paragraph-properties fo:margin-left="0.499cm" fo:margin-right="0cm" fo:text-indent="0cm" style:auto-text-indent="false" fo:background-color="transparent"/>
    </style:style>
    <style:style style:name="P81" style:family="paragraph" style:parent-style-name="Standard">
      <loext:graphic-properties draw:fill="none"/>
      <style:paragraph-properties fo:margin-left="0.499cm" fo:margin-right="0cm" fo:text-indent="0cm" style:auto-text-indent="false" fo:background-color="transparent"/>
      <style:text-properties officeooo:paragraph-rsid="004a1581"/>
    </style:style>
    <style:style style:name="P82" style:family="paragraph" style:parent-style-name="Standard">
      <loext:graphic-properties draw:fill="none"/>
      <style:paragraph-properties fo:margin-left="0.499cm" fo:margin-right="0cm" fo:text-indent="0cm" style:auto-text-indent="false" fo:background-color="transparent"/>
      <style:text-properties officeooo:paragraph-rsid="0083081f"/>
    </style:style>
    <style:style style:name="P83" style:family="paragraph" style:parent-style-name="Standard">
      <loext:graphic-properties draw:fill="none"/>
      <style:paragraph-properties fo:margin-left="0.499cm" fo:margin-right="0cm" fo:text-indent="0cm" style:auto-text-indent="false" fo:background-color="transparent"/>
      <style:text-properties officeooo:paragraph-rsid="004b1af2"/>
    </style:style>
    <style:style style:name="P84" style:family="paragraph" style:parent-style-name="Standard">
      <loext:graphic-properties draw:fill="none"/>
      <style:paragraph-properties fo:margin-left="0.499cm" fo:margin-right="0cm" fo:text-indent="0cm" style:auto-text-indent="false" fo:background-color="transparent"/>
      <style:text-properties officeooo:paragraph-rsid="004d36a5"/>
    </style:style>
    <style:style style:name="P85" style:family="paragraph" style:parent-style-name="Heading_20_2">
      <style:paragraph-properties fo:break-before="page"/>
      <style:text-properties officeooo:paragraph-rsid="008897ac"/>
    </style:style>
    <style:style style:name="P86" style:family="paragraph" style:parent-style-name="Standard">
      <style:text-properties officeooo:rsid="0014bbc8" officeooo:paragraph-rsid="008897ac"/>
    </style:style>
    <style:style style:name="P8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9b3d4" officeooo:paragraph-rsid="008897ac"/>
    </style:style>
    <style:style style:name="P88" style:family="paragraph" style:parent-style-name="Standard">
      <loext:graphic-properties draw:fill="none"/>
      <style:paragraph-properties fo:margin-left="0.499cm" fo:margin-right="0cm" fo:text-indent="0cm" style:auto-text-indent="false" fo:background-color="transparent"/>
      <style:text-properties officeooo:rsid="0049b3d4" officeooo:paragraph-rsid="008897ac"/>
    </style:style>
    <style:style style:name="P89" style:family="paragraph" style:parent-style-name="Standard">
      <style:text-properties officeooo:paragraph-rsid="00549ce2"/>
    </style:style>
    <style:style style:name="P90" style:family="paragraph" style:parent-style-name="Standard">
      <style:paragraph-properties fo:margin-left="0cm" fo:margin-right="0cm" fo:text-indent="0cm" style:auto-text-indent="false"/>
    </style:style>
    <style:style style:name="P91" style:family="paragraph" style:parent-style-name="Heading_20_2">
      <style:paragraph-properties fo:break-before="page"/>
      <style:text-properties officeooo:paragraph-rsid="008ae278"/>
    </style:style>
    <style:style style:name="P92" style:family="paragraph" style:parent-style-name="Heading_20_5">
      <style:text-properties officeooo:paragraph-rsid="008ae278"/>
    </style:style>
    <style:style style:name="P93" style:family="paragraph" style:parent-style-name="Standard">
      <style:text-properties officeooo:rsid="0014bbc8" officeooo:paragraph-rsid="008ae278"/>
    </style:style>
    <style:style style:name="P94" style:family="paragraph" style:parent-style-name="Standard">
      <style:text-properties officeooo:paragraph-rsid="008ae278"/>
    </style:style>
    <style:style style:name="P95" style:family="paragraph">
      <loext:graphic-properties draw:fill="none"/>
      <style:paragraph-properties fo:text-align="center" style:writing-mode="lr-tb"/>
    </style:style>
    <style:style style:name="P96" style:family="paragraph" style:parent-style-name="Standard">
      <style:text-properties officeooo:rsid="0090d846" officeooo:paragraph-rsid="008ae278"/>
    </style:style>
    <style:style style:name="P97"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paragraph-rsid="008ae278"/>
    </style:style>
    <style:style style:name="P98" style:family="paragraph" style:parent-style-name="Standard">
      <loext:graphic-properties draw:fill="none"/>
      <style:paragraph-properties fo:margin-left="0cm" fo:margin-right="0cm" fo:text-indent="1.3cm" style:auto-text-indent="false" fo:background-color="transparent"/>
      <style:text-properties officeooo:rsid="009444e8" officeooo:paragraph-rsid="008ae278"/>
    </style:style>
    <style:style style:name="P99"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14bbc8" officeooo:paragraph-rsid="008ae278"/>
    </style:style>
    <style:style style:name="P100" style:family="paragraph" style:parent-style-name="Standard">
      <loext:graphic-properties draw:fill="none"/>
      <style:paragraph-properties fo:margin-left="0cm" fo:margin-right="0cm" fo:text-indent="1.3cm" style:auto-text-indent="false" fo:background-color="transparent"/>
      <style:text-properties officeooo:rsid="0014bbc8" officeooo:paragraph-rsid="008ae278"/>
    </style:style>
    <style:style style:name="P101" style:family="paragraph" style:parent-style-name="Standard">
      <style:text-properties officeooo:rsid="0016d9bb" officeooo:paragraph-rsid="008ae278"/>
    </style:style>
    <style:style style:name="P102" style:family="paragraph" style:parent-style-name="Standard" style:master-page-name="">
      <loext:graphic-properties draw:fill="none"/>
      <style:paragraph-properties fo:margin-left="0cm" fo:margin-right="0cm" fo:text-indent="1.101cm" style:auto-text-indent="false" style:page-number="auto" fo:background-color="transparent"/>
      <style:text-properties officeooo:rsid="0016d9bb" officeooo:paragraph-rsid="008ae278"/>
    </style:style>
    <style:style style:name="P103" style:family="paragraph" style:parent-style-name="Standard">
      <loext:graphic-properties draw:fill="none"/>
      <style:paragraph-properties fo:margin-left="0cm" fo:margin-right="0cm" fo:text-indent="1.101cm" style:auto-text-indent="false" fo:background-color="transparent"/>
      <style:text-properties officeooo:rsid="0014bbc8" officeooo:paragraph-rsid="008ae278"/>
    </style:style>
    <style:style style:name="P104" style:family="paragraph" style:parent-style-name="Heading_20_2">
      <style:text-properties officeooo:paragraph-rsid="008ae278"/>
    </style:style>
    <style:style style:name="P105" style:family="paragraph" style:parent-style-name="Heading_20_5">
      <style:text-properties officeooo:paragraph-rsid="002f3758"/>
    </style:style>
    <style:style style:name="P106" style:family="paragraph" style:parent-style-name="Standard">
      <style:text-properties officeooo:paragraph-rsid="002f3758"/>
    </style:style>
    <style:style style:name="P107" style:family="paragraph" style:parent-style-name="Standard">
      <style:text-properties officeooo:paragraph-rsid="002fff77"/>
    </style:style>
    <style:style style:name="P108" style:family="paragraph" style:parent-style-name="Standard">
      <style:text-properties officeooo:paragraph-rsid="0030fbd9"/>
    </style:style>
    <style:style style:name="P109" style:family="paragraph">
      <style:paragraph-properties fo:margin-top="0.018cm" fo:margin-bottom="0cm" style:line-height-at-least="0cm"/>
    </style:style>
    <style:style style:name="P110" style:family="paragraph">
      <loext:graphic-properties draw:fill="solid" draw:fill-color="#ffffff"/>
      <style:paragraph-properties fo:margin-top="0.018cm" fo:margin-bottom="0cm" style:line-height-at-least="0cm"/>
      <style:text-properties fo:font-family="'MS UI Gothic'" style:font-family-generic="modern" style:font-pitch="variable" fo:font-size="10pt" style:font-size-asian="10pt" style:font-size-complex="10pt"/>
    </style:style>
    <style:style style:name="P111" style:family="paragraph" style:parent-style-name="Standard">
      <style:text-properties officeooo:rsid="0015adcc" officeooo:paragraph-rsid="002fff77"/>
    </style:style>
    <style:style style:name="P112" style:family="paragraph" style:parent-style-name="Standard">
      <style:text-properties officeooo:rsid="0032ec84" officeooo:paragraph-rsid="0032ec84"/>
    </style:style>
    <style:style style:name="P113" style:family="paragraph">
      <style:paragraph-properties fo:margin-top="0.42cm" fo:margin-bottom="0.349cm"/>
    </style:style>
    <style:style style:name="P114" style:family="paragraph">
      <loext:graphic-properties draw:fill="none" draw:fill-color="#ffffff"/>
      <style:paragraph-properties fo:margin-top="0.42cm" fo:margin-bottom="0.349cm"/>
      <style:text-properties fo:font-size="10pt" style:font-size-asian="10pt" style:font-size-complex="10pt"/>
    </style:style>
    <style:style style:name="P115" style:family="paragraph" style:parent-style-name="Standard" style:master-page-name="">
      <loext:graphic-properties draw:fill="none"/>
      <style:paragraph-properties fo:margin-left="0cm" fo:margin-right="8.999cm" fo:text-indent="0cm" style:auto-text-indent="false" style:page-number="auto" fo:background-color="transparent"/>
      <style:text-properties officeooo:rsid="0015adcc" officeooo:paragraph-rsid="00349694"/>
    </style:style>
    <style:style style:name="P116" style:family="paragraph" style:parent-style-name="Standard">
      <loext:graphic-properties draw:fill="none"/>
      <style:paragraph-properties fo:margin-left="0cm" fo:margin-right="8.999cm" fo:text-indent="0cm" style:auto-text-indent="false" fo:background-color="transparent"/>
      <style:text-properties officeooo:rsid="0015adcc" officeooo:paragraph-rsid="00349694"/>
    </style:style>
    <style:style style:name="P117" style:family="paragraph" style:parent-style-name="Heading_20_5">
      <style:text-properties officeooo:paragraph-rsid="003a7b0d"/>
    </style:style>
    <style:style style:name="P118" style:family="paragraph" style:parent-style-name="Standard">
      <style:text-properties officeooo:paragraph-rsid="003a7b0d"/>
    </style:style>
    <style:style style:name="P11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3a7b0d"/>
    </style:style>
    <style:style style:name="P120" style:family="paragraph" style:parent-style-name="Standard" style:master-page-name="">
      <loext:graphic-properties draw:fill="none"/>
      <style:paragraph-properties fo:margin-left="4.3cm" fo:margin-right="0cm" fo:text-indent="-3.701cm" style:auto-text-indent="false" style:page-number="auto" fo:background-color="transparent"/>
      <style:text-properties officeooo:paragraph-rsid="003a7b0d"/>
    </style:style>
    <style:style style:name="P121" style:family="paragraph" style:parent-style-name="Standard">
      <loext:graphic-properties draw:fill="none"/>
      <style:paragraph-properties fo:margin-left="4.3cm" fo:margin-right="0cm" fo:text-indent="-3.701cm" style:auto-text-indent="false" fo:background-color="transparent"/>
      <style:text-properties officeooo:paragraph-rsid="003a7b0d"/>
    </style:style>
    <style:style style:name="P122" style:family="paragraph" style:parent-style-name="Standard">
      <loext:graphic-properties draw:fill="none"/>
      <style:paragraph-properties fo:margin-left="1.499cm" fo:margin-right="0cm" fo:text-indent="0cm" style:auto-text-indent="false" fo:background-color="transparent"/>
      <style:text-properties officeooo:paragraph-rsid="003be71d"/>
    </style:style>
    <style:style style:name="P123" style:family="paragraph" style:parent-style-name="Standard">
      <style:text-properties officeooo:rsid="00395ab9" officeooo:paragraph-rsid="00395ab9"/>
    </style:style>
    <style:style style:name="P124"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5adcc" officeooo:paragraph-rsid="002fff77"/>
    </style:style>
    <style:style style:name="P125" style:family="paragraph" style:parent-style-name="Standard">
      <loext:graphic-properties draw:fill="none"/>
      <style:paragraph-properties fo:margin-left="1.499cm" fo:margin-right="0cm" fo:text-indent="0cm" style:auto-text-indent="false" fo:background-color="transparent"/>
      <style:text-properties officeooo:rsid="0015adcc" officeooo:paragraph-rsid="002fff77"/>
    </style:style>
    <style:style style:name="P126" style:family="paragraph" style:parent-style-name="Heading_20_5" style:master-page-name="">
      <style:paragraph-properties style:page-number="auto"/>
      <style:text-properties officeooo:paragraph-rsid="0039acb6"/>
    </style:style>
    <style:style style:name="P127" style:family="paragraph" style:parent-style-name="Standard">
      <style:text-properties officeooo:rsid="0015adcc" officeooo:paragraph-rsid="0039acb6"/>
    </style:style>
    <style:style style:name="P128"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9acb6" officeooo:paragraph-rsid="0039acb6"/>
    </style:style>
    <style:style style:name="P129" style:family="paragraph" style:parent-style-name="Heading_20_5">
      <style:text-properties officeooo:paragraph-rsid="0035c339"/>
    </style:style>
    <style:style style:name="P130" style:family="paragraph" style:parent-style-name="Standard">
      <style:text-properties officeooo:rsid="0015adcc" officeooo:paragraph-rsid="0035c339"/>
    </style:style>
    <style:style style:name="P131" style:family="paragraph" style:parent-style-name="Standard">
      <style:text-properties officeooo:rsid="0015adcc" officeooo:paragraph-rsid="00395ab9"/>
    </style:style>
    <style:style style:name="P132" style:family="paragraph" style:parent-style-name="Standard">
      <style:text-properties officeooo:rsid="0037b907" officeooo:paragraph-rsid="00395ab9"/>
    </style:style>
    <style:style style:name="P13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7b907" officeooo:paragraph-rsid="0037b907"/>
    </style:style>
    <style:style style:name="P134" style:family="paragraph" style:parent-style-name="Heading_20_5">
      <style:text-properties officeooo:paragraph-rsid="00349694"/>
    </style:style>
    <style:style style:name="P135" style:family="paragraph" style:parent-style-name="Standard">
      <style:text-properties officeooo:rsid="0014bbc8" officeooo:paragraph-rsid="002f3758"/>
    </style:style>
    <style:style style:name="P136"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2f3758"/>
    </style:style>
    <style:style style:name="P137"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2f3758"/>
    </style:style>
    <style:style style:name="P138" style:family="paragraph" style:parent-style-name="Standard">
      <style:text-properties officeooo:rsid="00560339" officeooo:paragraph-rsid="00560339"/>
    </style:style>
    <style:style style:name="P139" style:family="paragraph">
      <style:paragraph-properties fo:margin-top="0cm" fo:margin-bottom="0cm"/>
    </style:style>
    <style:style style:name="P140" style:family="paragraph">
      <loext:graphic-properties draw:fill="none" draw:fill-color="#ffffff"/>
      <style:paragraph-properties fo:margin-top="0cm" fo:margin-bottom="0cm"/>
      <style:text-properties fo:font-size="10pt" style:font-size-asian="10pt" style:font-size-complex="10pt"/>
    </style:style>
    <style:style style:name="P141" style:family="paragraph" style:parent-style-name="Heading_20_5">
      <style:text-properties officeooo:paragraph-rsid="00497e1b"/>
    </style:style>
    <style:style style:name="P142" style:family="paragraph" style:parent-style-name="Text_20_body">
      <style:text-properties officeooo:paragraph-rsid="00497e1b"/>
    </style:style>
    <style:style style:name="P143" style:family="paragraph" style:parent-style-name="Standard">
      <style:text-properties officeooo:rsid="00663ef2" officeooo:paragraph-rsid="00663ef2"/>
    </style:style>
    <style:style style:name="P144" style:family="paragraph" style:parent-style-name="Heading_20_5">
      <style:paragraph-properties fo:break-before="page"/>
      <style:text-properties officeooo:rsid="00597550" officeooo:paragraph-rsid="00597550"/>
    </style:style>
    <style:style style:name="P14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4bbc8" officeooo:paragraph-rsid="002f3758"/>
    </style:style>
    <style:style style:name="P146" style:family="paragraph" style:parent-style-name="Standard">
      <style:text-properties officeooo:rsid="0014bbc8" officeooo:paragraph-rsid="00628793"/>
    </style:style>
    <style:style style:name="P147" style:family="paragraph">
      <loext:graphic-properties draw:fill="none" draw:fill-color="#ffffff"/>
      <style:text-properties fo:font-family="'MS UI Gothic'" style:font-family-generic="modern" style:font-pitch="variable" fo:font-size="12pt"/>
    </style:style>
    <style:style style:name="P148"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2f3758"/>
    </style:style>
    <style:style style:name="P149" style:family="paragraph">
      <loext:graphic-properties draw:fill="none" draw:fill-color="#ffffff"/>
      <style:text-properties fo:font-family="'MS UI Gothic'" style:font-family-generic="modern" style:font-pitch="variable" fo:font-size="10.5pt" style:font-size-asian="10.5pt" style:font-size-complex="10.5pt"/>
    </style:style>
    <style:style style:name="P150" style:family="paragraph" style:parent-style-name="Standard">
      <style:text-properties officeooo:rsid="0014bbc8" officeooo:paragraph-rsid="005f1634"/>
    </style:style>
    <style:style style:name="P151" style:family="paragraph" style:parent-style-name="Heading_20_5">
      <style:paragraph-properties fo:break-before="page"/>
    </style:style>
    <style:style style:name="P152" style:family="paragraph" style:parent-style-name="Standard">
      <style:text-properties officeooo:rsid="0078ca32" officeooo:paragraph-rsid="0078ca32"/>
    </style:style>
    <style:style style:name="P153"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78ca32"/>
    </style:style>
    <style:style style:name="P154"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4bbc8" officeooo:paragraph-rsid="006e1cf7"/>
    </style:style>
    <style:style style:name="P155" style:family="paragraph" style:parent-style-name="Standard">
      <loext:graphic-properties draw:fill="none"/>
      <style:paragraph-properties fo:margin-left="1.499cm" fo:margin-right="0cm" fo:text-indent="0cm" style:auto-text-indent="false" fo:background-color="transparent"/>
      <style:text-properties officeooo:rsid="0014bbc8" officeooo:paragraph-rsid="006e1cf7"/>
    </style:style>
    <style:style style:name="P156"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5f1634"/>
    </style:style>
    <style:style style:name="P157"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4bbc8" officeooo:paragraph-rsid="005f1634"/>
    </style:style>
    <style:style style:name="P158" style:family="paragraph" style:parent-style-name="Standard">
      <loext:graphic-properties draw:fill="none"/>
      <style:paragraph-properties fo:margin-left="1.499cm" fo:margin-right="0cm" fo:text-indent="0cm" style:auto-text-indent="false" fo:background-color="transparent"/>
      <style:text-properties officeooo:rsid="0014bbc8" officeooo:paragraph-rsid="005f1634"/>
    </style:style>
    <style:style style:name="P159"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4bbc8" officeooo:paragraph-rsid="002f3758"/>
    </style:style>
    <style:style style:name="P160" style:family="paragraph" style:parent-style-name="Standard">
      <loext:graphic-properties draw:fill="none"/>
      <style:paragraph-properties fo:margin-left="1.499cm" fo:margin-right="0cm" fo:text-indent="0cm" style:auto-text-indent="false" fo:background-color="transparent"/>
      <style:text-properties officeooo:rsid="0014bbc8" officeooo:paragraph-rsid="002f3758"/>
    </style:style>
    <style:style style:name="P161" style:family="paragraph" style:parent-style-name="Heading_20_5">
      <style:text-properties officeooo:paragraph-rsid="007c8756"/>
    </style:style>
    <style:style style:name="P162"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844cef"/>
    </style:style>
    <style:style style:name="T1" style:family="text">
      <style:text-properties officeooo:rsid="00101bc3"/>
    </style:style>
    <style:style style:name="T2" style:family="text">
      <style:text-properties officeooo:rsid="0014bbc8"/>
    </style:style>
    <style:style style:name="T3" style:family="text">
      <style:text-properties fo:font-size="12pt"/>
    </style:style>
    <style:style style:name="T4" style:family="text">
      <style:text-properties officeooo:rsid="002f3758"/>
    </style:style>
    <style:style style:name="T5" style:family="text">
      <style:text-properties officeooo:rsid="00144415"/>
    </style:style>
    <style:style style:name="T6" style:family="text">
      <style:text-properties officeooo:rsid="001aa801"/>
    </style:style>
    <style:style style:name="T7" style:family="text">
      <style:text-properties officeooo:rsid="00857289"/>
    </style:style>
    <style:style style:name="T8" style:family="text">
      <style:text-properties officeooo:rsid="001ec3a6"/>
    </style:style>
    <style:style style:name="T9" style:family="text">
      <style:text-properties officeooo:rsid="002d0c12"/>
    </style:style>
    <style:style style:name="T10" style:family="text">
      <style:text-properties officeooo:rsid="0042bd8c"/>
    </style:style>
    <style:style style:name="T11" style:family="text">
      <style:text-properties officeooo:rsid="00440b33"/>
    </style:style>
    <style:style style:name="T12" style:family="text">
      <style:text-properties officeooo:rsid="0044707f"/>
    </style:style>
    <style:style style:name="T13" style:family="text">
      <style:text-properties officeooo:rsid="00469e0f"/>
    </style:style>
    <style:style style:name="T14" style:family="text">
      <style:text-properties officeooo:rsid="002eb1fb"/>
    </style:style>
    <style:style style:name="T15" style:family="text">
      <style:text-properties officeooo:rsid="0018fbcd"/>
    </style:style>
    <style:style style:name="T16" style:family="text">
      <style:text-properties officeooo:rsid="008615cb"/>
    </style:style>
    <style:style style:name="T17" style:family="text">
      <style:text-properties officeooo:rsid="0015adcc"/>
    </style:style>
    <style:style style:name="T18" style:family="text">
      <style:text-properties officeooo:rsid="002357fb"/>
    </style:style>
    <style:style style:name="T19" style:family="text">
      <style:text-properties officeooo:rsid="0017b2f3"/>
    </style:style>
    <style:style style:name="T20" style:family="text">
      <style:text-properties fo:color="#0000ff" loext:opacity="100%"/>
    </style:style>
    <style:style style:name="T21" style:family="text">
      <style:text-properties officeooo:rsid="001b1cf5"/>
    </style:style>
    <style:style style:name="T22" style:family="text">
      <style:text-properties fo:color="#00008b" loext:opacity="100%"/>
    </style:style>
    <style:style style:name="T23" style:family="text">
      <style:text-properties officeooo:rsid="001cac86"/>
    </style:style>
    <style:style style:name="T24" style:family="text">
      <style:text-properties officeooo:rsid="0014c707"/>
    </style:style>
    <style:style style:name="T25" style:family="text">
      <style:text-properties officeooo:rsid="002188c6"/>
    </style:style>
    <style:style style:name="T26" style:family="text">
      <style:text-properties style:text-position="super 58%" officeooo:rsid="0014c707"/>
    </style:style>
    <style:style style:name="T27" style:family="text">
      <style:text-properties fo:color="#0000ff" loext:opacity="100%" officeooo:rsid="002188c6"/>
    </style:style>
    <style:style style:name="T28" style:family="text">
      <style:text-properties officeooo:rsid="002474cd"/>
    </style:style>
    <style:style style:name="T29" style:family="text">
      <style:text-properties fo:color="#0000ff" loext:opacity="100%" fo:font-weight="bold"/>
    </style:style>
    <style:style style:name="T30" style:family="text">
      <style:text-properties fo:color="#191970" loext:opacity="100%" fo:font-weight="bold"/>
    </style:style>
    <style:style style:name="T31" style:family="text">
      <style:text-properties officeooo:rsid="00270b74"/>
    </style:style>
    <style:style style:name="T32" style:family="text">
      <style:text-properties officeooo:rsid="00283ea7"/>
    </style:style>
    <style:style style:name="T33" style:family="text">
      <style:text-properties fo:color="#0000ff" loext:opacity="100%" fo:font-weight="bold" officeooo:rsid="00283ea7" style:font-weight-asian="bold" style:font-weight-complex="bold"/>
    </style:style>
    <style:style style:name="T34" style:family="text">
      <style:text-properties officeooo:rsid="0029bde3"/>
    </style:style>
    <style:style style:name="T35" style:family="text">
      <style:text-properties fo:color="#0000ff" loext:opacity="100%" fo:font-weight="bold" officeooo:rsid="0029bde3" style:font-weight-asian="bold" style:font-weight-complex="bold"/>
    </style:style>
    <style:style style:name="T36" style:family="text">
      <style:text-properties fo:color="#000000" loext:opacity="100%" fo:font-weight="normal" style:font-weight-asian="normal" style:font-weight-complex="normal"/>
    </style:style>
    <style:style style:name="T37" style:family="text">
      <style:text-properties fo:color="#0000ff" loext:opacity="100%" fo:font-weight="bold" style:font-weight-asian="bold" style:font-weight-complex="bold"/>
    </style:style>
    <style:style style:name="T38" style:family="text">
      <style:text-properties officeooo:rsid="002a6ed9"/>
    </style:style>
    <style:style style:name="T39" style:family="text">
      <style:text-properties fo:color="#0000ff" loext:opacity="100%" fo:font-weight="bold" officeooo:rsid="002a6ed9" style:font-weight-asian="bold" style:font-weight-complex="bold"/>
    </style:style>
    <style:style style:name="T40" style:family="text">
      <style:text-properties officeooo:rsid="008065b4"/>
    </style:style>
    <style:style style:name="T41" style:family="text">
      <style:text-properties officeooo:rsid="004e02fd"/>
    </style:style>
    <style:style style:name="T42" style:family="text">
      <style:text-properties officeooo:rsid="0083081f"/>
    </style:style>
    <style:style style:name="T43" style:family="text">
      <style:text-properties officeooo:rsid="008770d5"/>
    </style:style>
    <style:style style:name="T44" style:family="text">
      <style:text-properties officeooo:rsid="008a04d1"/>
    </style:style>
    <style:style style:name="T45" style:family="text">
      <style:text-properties officeooo:rsid="0016d9bb"/>
    </style:style>
    <style:style style:name="T46" style:family="text">
      <style:text-properties officeooo:rsid="0089efce"/>
    </style:style>
    <style:style style:name="T47" style:family="text">
      <style:text-properties officeooo:rsid="00198ab9"/>
    </style:style>
    <style:style style:name="T48" style:family="text">
      <style:text-properties officeooo:rsid="004b1af2"/>
    </style:style>
    <style:style style:name="T49" style:family="text">
      <style:text-properties officeooo:rsid="0049b3d4"/>
    </style:style>
    <style:style style:name="T50" style:family="text">
      <style:text-properties officeooo:rsid="0089c556"/>
    </style:style>
    <style:style style:name="T51" style:family="text">
      <style:text-properties officeooo:rsid="004a1581"/>
    </style:style>
    <style:style style:name="T52" style:family="text">
      <style:text-properties officeooo:rsid="004b81e5"/>
    </style:style>
    <style:style style:name="T53" style:family="text">
      <style:text-properties officeooo:rsid="004d36a5"/>
    </style:style>
    <style:style style:name="T54" style:family="text">
      <style:text-properties officeooo:rsid="008897ac"/>
    </style:style>
    <style:style style:name="T55" style:family="text">
      <style:text-properties officeooo:rsid="0050c8f0"/>
    </style:style>
    <style:style style:name="T56" style:family="text">
      <style:text-properties officeooo:rsid="0099a57a"/>
    </style:style>
    <style:style style:name="T57" style:family="text">
      <style:text-properties officeooo:rsid="0090d846"/>
    </style:style>
    <style:style style:name="T58" style:family="text">
      <style:text-properties officeooo:rsid="009444e8"/>
    </style:style>
    <style:style style:name="T59" style:family="text">
      <style:text-properties officeooo:rsid="009d8441"/>
    </style:style>
    <style:style style:name="T60" style:family="text">
      <style:text-properties officeooo:rsid="0094c518"/>
    </style:style>
    <style:style style:name="T61" style:family="text">
      <style:text-properties officeooo:rsid="008ae278"/>
    </style:style>
    <style:style style:name="T62" style:family="text">
      <style:text-properties officeooo:rsid="0030fbd9"/>
    </style:style>
    <style:style style:name="T63" style:family="text">
      <style:text-properties fo:font-family="'MS UI Gothic'" style:font-family-generic="modern" style:font-pitch="variable" fo:font-size="10pt" style:font-size-asian="10pt" style:font-size-complex="10pt"/>
    </style:style>
    <style:style style:name="T64" style:family="text">
      <style:text-properties officeooo:rsid="0032ec84"/>
    </style:style>
    <style:style style:name="T65" style:family="text">
      <style:text-properties fo:font-size="10pt" style:font-size-asian="10pt" style:font-size-complex="10pt"/>
    </style:style>
    <style:style style:name="T66" style:family="text">
      <style:text-properties officeooo:rsid="00349694"/>
    </style:style>
    <style:style style:name="T67" style:family="text">
      <style:text-properties officeooo:rsid="003a7b0d"/>
    </style:style>
    <style:style style:name="T68" style:family="text">
      <style:text-properties officeooo:rsid="0048936b"/>
    </style:style>
    <style:style style:name="T69" style:family="text">
      <style:text-properties officeooo:rsid="003be71d"/>
    </style:style>
    <style:style style:name="T70" style:family="text">
      <style:text-properties officeooo:rsid="0035c339"/>
    </style:style>
    <style:style style:name="T71" style:family="text">
      <style:text-properties officeooo:rsid="0039acb6"/>
    </style:style>
    <style:style style:name="T72" style:family="text">
      <style:text-properties officeooo:rsid="0037b907"/>
    </style:style>
    <style:style style:name="T73" style:family="text">
      <style:text-properties officeooo:rsid="00395ab9"/>
    </style:style>
    <style:style style:name="T74" style:family="text">
      <style:text-properties officeooo:rsid="00497e1b"/>
    </style:style>
    <style:style style:name="T75" style:family="text">
      <style:text-properties officeooo:rsid="00570d5f"/>
    </style:style>
    <style:style style:name="T76" style:family="text">
      <style:text-properties officeooo:rsid="00663ef2"/>
    </style:style>
    <style:style style:name="T77" style:family="text">
      <style:text-properties officeooo:rsid="006f6d7e"/>
    </style:style>
    <style:style style:name="T78" style:family="text">
      <style:text-properties fo:font-family="'MS UI Gothic'" style:font-family-generic="modern" style:font-pitch="variable" fo:font-size="11pt" style:font-size-asian="10pt" style:font-size-complex="11pt"/>
    </style:style>
    <style:style style:name="T79" style:family="text">
      <style:text-properties officeooo:rsid="00628793"/>
    </style:style>
    <style:style style:name="T80" style:family="text">
      <style:text-properties officeooo:rsid="00698e4d"/>
    </style:style>
    <style:style style:name="T81" style:family="text">
      <style:text-properties officeooo:rsid="006ab60b"/>
    </style:style>
    <style:style style:name="T82" style:family="text">
      <style:text-properties fo:font-family="'MS UI Gothic'" style:font-family-generic="modern" style:font-pitch="variable" fo:font-size="10.5pt" style:font-size-asian="10.5pt" style:font-size-complex="10.5pt"/>
    </style:style>
    <style:style style:name="T83" style:family="text">
      <style:text-properties officeooo:rsid="005ab09a"/>
    </style:style>
    <style:style style:name="T84" style:family="text">
      <style:text-properties officeooo:rsid="005f1634"/>
    </style:style>
    <style:style style:name="T85" style:family="text">
      <style:text-properties officeooo:rsid="006aca94"/>
    </style:style>
    <style:style style:name="T86" style:family="text">
      <style:text-properties officeooo:rsid="006e1cf7"/>
    </style:style>
    <style:style style:name="T87" style:family="text">
      <style:text-properties fo:font-size="8pt" officeooo:rsid="005f1634" style:font-size-asian="8pt" style:font-size-complex="8pt"/>
    </style:style>
    <style:style style:name="T88" style:family="text">
      <style:text-properties fo:font-size="8pt" style:font-size-asian="8pt" style:font-size-complex="8pt"/>
    </style:style>
    <style:style style:name="T89" style:family="text">
      <style:text-properties officeooo:rsid="00727a8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opacity="0%" draw:textarea-horizontal-align="justify" draw:textarea-vertical-align="middle" draw:auto-grow-height="false" fo:min-height="0.63cm" fo:min-width="1.854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opacity="0%" draw:textarea-horizontal-align="justify" draw:textarea-vertical-align="middle" draw:auto-grow-height="false" fo:min-height="0.63cm" fo:min-width="2.99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opacity="0%" draw:textarea-horizontal-align="justify" draw:textarea-vertical-align="middle" draw:auto-grow-height="false" fo:min-height="0.631cm" fo:min-width="2.83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justify" draw:textarea-vertical-align="middle" draw:auto-grow-height="false" fo:min-height="0.631cm" fo:min-width="2.35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opacity="0%" draw:textarea-horizontal-align="justify" draw:textarea-vertical-align="middle" draw:auto-grow-height="false" fo:min-height="0.631cm" fo:min-width="4.13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bf0041" draw:marker-start-width="0.499cm" draw:marker-end-width="0.499cm" draw:fill="bitmap" draw:fill-color="#729fcf" draw:fill-image-name="Bitmap_20_1" draw:opacity="0%" draw:textarea-horizontal-align="justify" draw:textarea-vertical-align="middle" draw:auto-grow-height="false" fo:min-height="0.596cm" fo:min-width="4.877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639cm" fo:min-width="2.401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101cm" svg:stroke-color="#bf0041" draw:marker-start-width="0.499cm" draw:marker-end-width="0.499cm" draw:fill="solid" draw:fill-color="#ffffff" loext:fill-use-slide-background="false" draw:opacity="100%" fo:min-height="0.76cm" fo:padding-top="0.049cm" fo:padding-bottom="0.049cm" fo:padding-left="0.049cm" fo:padding-right="0.049cm" draw:shadow-opacity="10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101cm" svg:stroke-color="#bf0041" draw:marker-start-width="0.499cm" draw:marker-end-width="0.499cm" draw:fill="solid" draw:fill-color="#ffffff" fo:min-height="0.7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596cm" fo:min-width="3.538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101cm" svg:stroke-color="#bf0041" draw:marker-start-width="0.499cm" draw:marker-end-width="0.499cm" draw:fill="solid" draw:fill-color="#ffffff" fo:min-height="0.693cm" fo:padding-top="0.049cm" fo:padding-bottom="0.049cm" fo:padding-left="0.049cm" fo:padding-right="0.049cm" draw:shadow-offset-x="0.305cm" draw:shadow-offset-y="0.3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opacity="0%" draw:textarea-horizontal-align="justify" draw:textarea-vertical-align="middle" draw:auto-grow-height="false" fo:min-height="0.631cm" fo:min-width="2.86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opacity="0%" draw:textarea-horizontal-align="justify" draw:textarea-vertical-align="middle" draw:auto-grow-height="false" fo:min-height="0.631cm" fo:min-width="2.252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opacity="0%" draw:textarea-horizontal-align="justify" draw:textarea-vertical-align="middle" draw:auto-grow-height="false" fo:min-height="0.631cm" fo:min-width="1.75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7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9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textarea-horizontal-align="justify" draw:textarea-vertical-align="middle" draw:auto-grow-height="false" fo:min-height="0.399cm" fo:min-width="0.5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101cm" svg:stroke-color="#bf0041" draw:marker-start="" draw:marker-start-width="0.499cm" draw:marker-end="Triangle" draw:marker-end-width="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369cm" fo:min-width="1.923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49cm" svg:stroke-color="#127622" draw:marker-start-width="0.42cm" draw:marker-end-width="0.42cm" draw:fill="solid" draw:fill-color="#1e6a39" draw:opacity="0%" draw:textarea-horizontal-align="justify" draw:textarea-vertical-align="middle" draw:auto-grow-height="false" fo:min-height="0.383cm" fo:min-width="2.591cm" fo:padding-top="0.025cm" fo:padding-bottom="0.025cm" fo:padding-left="0.025cm" fo:padding-right="0.025cm"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solid" svg:stroke-color="#000000" draw:fill="none" draw:fill-color="#ffffff" fo:min-height="2.8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svg:stroke-color="#000000" draw:fill="none" draw:fill-color="#ffffff" fo:min-height="2.2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56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textarea-horizontal-align="justify" draw:textarea-vertical-align="middle" draw:auto-grow-height="false" fo:min-height="0.145cm" fo:min-width="1.0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1.6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textarea-horizontal-align="justify" draw:textarea-vertical-align="middle" draw:auto-grow-height="false" fo:min-height="0.279cm" fo:min-width="1.0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1.7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1.08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1.15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none" loext:fill-use-slide-background="false" draw:textarea-horizontal-align="justify" draw:textarea-vertical-align="middle" draw:auto-grow-height="false" fo:min-height="0.665cm" fo:min-width="1.764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none" loext:fill-use-slide-background="false" draw:textarea-horizontal-align="justify" draw:textarea-vertical-align="middle" draw:auto-grow-height="false" fo:min-height="0.665cm" fo:min-width="2.094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none" loext:fill-use-slide-background="false" draw:textarea-horizontal-align="justify" draw:textarea-vertical-align="middle" draw:auto-grow-height="false" fo:min-height="0.665cm" fo:min-width="2.51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none" loext:fill-use-slide-background="false" draw:textarea-horizontal-align="justify" draw:textarea-vertical-align="middle" draw:auto-grow-height="false" fo:min-height="0.665cm" fo:min-width="2.745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ffffff" fo:min-height="7.39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4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draw:stroke-dash="Dot" svg:stroke-color="#000000" draw:fill="none" draw:fill-color="#ffffff" fo:min-height="12.5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2.1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1.39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3.0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3.3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3.7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4.0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3.3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5.2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1.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stroke="none" svg:stroke-color="#000000" draw:fill="none" draw:fill-color="#ffffff" fo:min-height="1.4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none" svg:stroke-color="#000000" draw:fill="none" draw:fill-color="#ffffff" fo:min-height="1.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none" svg:stroke-color="#000000" draw:fill="none" draw:fill-color="#ffffff" fo:min-height="2.5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none" svg:stroke-color="#000000" draw:fill="none" draw:fill-color="#ffffff" fo:min-height="1.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fo:min-height="4.0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fo:min-height="6.5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Script<text:span text:style-name="T1">W</text:span>in</text:p>
      <text:p text:style-name="Standard"/>
      <text:p text:style-name="Standard"/>
      <text:p text:style-name="P1">C言語風のスクリプト言語とその実行環境</text:p>
      <text:p text:style-name="P2"/>
      <text:p text:style-name="P3">KScriptはC言語に似せたスクリプト言語でインタプリタとして動作する。</text:p>
      <text:p text:style-name="P3">自前のCADソフト(CadAppやMin3DCad)に組み込んで動作させることを目的に作成した。</text:p>
      <text:p text:style-name="P3">基本的な制御構造と型指定のない変数で作られている。</text:p>
      <text:p text:style-name="P4"/>
      <text:p text:style-name="P5">KScriptWinはWindows上でKScriptのコード作成とそれを実行する環境である。</text:p>
      <text:p text:style-name="P4"/>
      <text:p text:style-name="P4"/>
      <text:p text:style-name="P4"><draw:frame draw:style-name="fr1" draw:name="画像1" text:anchor-type="char" svg:x="0.684cm" svg:y="0.116cm" svg:width="13.515cm" svg:height="10.862cm" draw:z-index="20"><draw:image xlink:href="Pictures/100000000000034E000002A8B9E008B8.png" xlink:type="simple" xlink:show="embed" xlink:actuate="onLoad" draw:mime-type="image/png"/></draw:frame></text:p>
      <text:p text:style-name="P5"/>
      <text:p text:style-name="Standard"/>
      <text:p text:style-name="Standard"/>
      <text:p text:style-name="Standard"/>
      <text:p text:style-name="Standard"/>
      <text:p text:style-name="Standard"><draw:frame draw:style-name="fr2" draw:name="画像9 Copy 1" text:anchor-type="char" svg:x="3.099cm" svg:y="8.657cm" svg:width="5.842cm" svg:height="6.055cm" draw:z-index="58"><draw:image xlink:href="Pictures/10000000000001B7000001C78A235AFE.png" xlink:type="simple" xlink:show="embed" xlink:actuate="onLoad" draw:mime-type="image/png"/></draw:frame><draw:frame draw:style-name="fr1" draw:name="画像4" text:anchor-type="char" svg:x="7.802cm" svg:y="6.218cm" svg:width="8.975cm" svg:height="7.437cm" draw:z-index="21"><draw:image xlink:href="Pictures/10000000000001EA00000196110C26A4.png" xlink:type="simple" xlink:show="embed" xlink:actuate="onLoad" draw:mime-type="image/png"/></draw:frame></text:p>
      <text:p text:style-name="P6"/>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rotected="true">
            <text:p text:style-name="Contents_20_Heading">目次</text:p>
          </text:index-title>
          <text:p text:style-name="P7"><text:a xlink:type="simple" xlink:href="#__RefHeading___Toc333_1425755221" office:name="1. 画面の説明" text:style-name="Index_20_Link" text:visited-style-name="Index_20_Link">1. 画面の説明<text:tab/>4</text:a></text:p>
          <text:p text:style-name="P7"><text:a xlink:type="simple" xlink:href="#__RefHeading___Toc335_1425755221" office:name="2. プログラムの入力と実行" text:style-name="Index_20_Link" text:visited-style-name="Index_20_Link">2. プログラムの入力と実行<text:tab/>7</text:a></text:p>
          <text:p text:style-name="P8"><text:a xlink:type="simple" xlink:href="#__RefHeading___Toc2434_2450001385" office:name="プログラムの入力" text:style-name="Index_20_Link" text:visited-style-name="Index_20_Link">プログラムの入力<text:tab/>7</text:a></text:p>
          <text:p text:style-name="P8"><text:a xlink:type="simple" xlink:href="#__RefHeading___Toc2436_2450001385" office:name="プログラムの実行" text:style-name="Index_20_Link" text:visited-style-name="Index_20_Link">プログラムの実行<text:tab/>7</text:a></text:p>
          <text:p text:style-name="P8"><text:a xlink:type="simple" xlink:href="#__RefHeading___Toc2547_3163152918" office:name="プログラムの一時停止と中断" text:style-name="Index_20_Link" text:visited-style-name="Index_20_Link">プログラムの一時停止と中断<text:tab/>7</text:a></text:p>
          <text:p text:style-name="P8"><text:a xlink:type="simple" xlink:href="#__RefHeading___Toc2438_2450001385" office:name="ファイル参照" text:style-name="Index_20_Link" text:visited-style-name="Index_20_Link">ファイル参照<text:tab/>7</text:a></text:p>
          <text:p text:style-name="P8"><text:a xlink:type="simple" xlink:href="#__RefHeading___Toc2440_2450001385" office:name="入力候補" text:style-name="Index_20_Link" text:visited-style-name="Index_20_Link">入力候補<text:tab/>8</text:a></text:p>
          <text:p text:style-name="P7"><text:a xlink:type="simple" xlink:href="#__RefHeading___Toc444_1425755221" office:name="3. スクリプト文" text:style-name="Index_20_Link" text:visited-style-name="Index_20_Link">3. スクリプト文<text:tab/>9</text:a></text:p>
          <text:p text:style-name="P7"><text:a xlink:type="simple" xlink:href="#__RefHeading___Toc1160_1915522117" office:name="4. スクリプト文の書き方" text:style-name="Index_20_Link" text:visited-style-name="Index_20_Link">4. スクリプト文の書き方<text:tab/>10</text:a></text:p>
          <text:p text:style-name="P8"><text:a xlink:type="simple" xlink:href="#__RefHeading___Toc1267_1915522117" office:name="スクリプト文の書き方" text:style-name="Index_20_Link" text:visited-style-name="Index_20_Link">スクリプト文の書き方<text:tab/>10</text:a></text:p>
          <text:p text:style-name="P8"><text:a xlink:type="simple" xlink:href="#__RefHeading___Toc1269_1915522117" office:name="コメント" text:style-name="Index_20_Link" text:visited-style-name="Index_20_Link">コメント<text:tab/>11</text:a></text:p>
          <text:p text:style-name="P8"><text:a xlink:type="simple" xlink:href="#__RefHeading___Toc1271_1915522117" office:name="ローカル変数" text:style-name="Index_20_Link" text:visited-style-name="Index_20_Link">ローカル変数<text:tab/>11</text:a></text:p>
          <text:p text:style-name="P8"><text:a xlink:type="simple" xlink:href="#__RefHeading___Toc1271_1915522117%20Copy%201" office:name="グローバル変数" text:style-name="Index_20_Link" text:visited-style-name="Index_20_Link">グローバル変数<text:tab/>11</text:a></text:p>
          <text:p text:style-name="P8"><text:a xlink:type="simple" xlink:href="#__RefHeading___Toc1273_1915522117" office:name="配列" text:style-name="Index_20_Link" text:visited-style-name="Index_20_Link">配列<text:tab/>12</text:a></text:p>
          <text:p text:style-name="P8"><text:a xlink:type="simple" xlink:href="#__RefHeading___Toc1740_1554373789" office:name="2次元配列" text:style-name="Index_20_Link" text:visited-style-name="Index_20_Link">2次元配列<text:tab/>12</text:a></text:p>
          <text:p text:style-name="P8"><text:a xlink:type="simple" xlink:href="#__RefHeading___Toc1275_1915522117" office:name="演算子" text:style-name="Index_20_Link" text:visited-style-name="Index_20_Link">演算子<text:tab/>13</text:a></text:p>
          <text:p text:style-name="P8"><text:a xlink:type="simple" xlink:href="#__RefHeading___Toc1277_1915522117" office:name="複合演算子" text:style-name="Index_20_Link" text:visited-style-name="Index_20_Link">複合演算子<text:tab/>13</text:a></text:p>
          <text:p text:style-name="P8"><text:a xlink:type="simple" xlink:href="#__RefHeading___Toc1279_1915522117" office:name="比較演算子" text:style-name="Index_20_Link" text:visited-style-name="Index_20_Link">比較演算子<text:tab/>13</text:a></text:p>
          <text:p text:style-name="P8"><text:a xlink:type="simple" xlink:href="#__RefHeading___Toc1281_1915522117" office:name="制御文" text:style-name="Index_20_Link" text:visited-style-name="Index_20_Link">制御文<text:tab/>14</text:a></text:p>
          <text:p text:style-name="P8"><text:a xlink:type="simple" xlink:href="#__RefHeading___Toc1283_1915522117" office:name="関数の定義" text:style-name="Index_20_Link" text:visited-style-name="Index_20_Link">関数の定義<text:tab/>16</text:a></text:p>
          <text:p text:style-name="P8"><text:a xlink:type="simple" xlink:href="#__RefHeading___Toc1285_1915522117" office:name="ディレクティブ" text:style-name="Index_20_Link" text:visited-style-name="Index_20_Link">ディレクティブ<text:tab/>16</text:a></text:p>
          <text:p text:style-name="P8"><text:a xlink:type="simple" xlink:href="#__RefHeading___Toc1287_1915522117" office:name="数式処理以外の関数" text:style-name="Index_20_Link" text:visited-style-name="Index_20_Link">数式処理以外の関数<text:tab/>16</text:a></text:p>
          <text:p text:style-name="P8"><text:a xlink:type="simple" xlink:href="#__RefHeading___Toc4264_3034306593" office:name="配列関数(array.xxxx())" text:style-name="Index_20_Link" text:visited-style-name="Index_20_Link">配列関数(array.xxxx())<text:tab/>17</text:a></text:p>
          <text:p text:style-name="P8"><text:a xlink:type="simple" xlink:href="#__RefHeading___Toc1289_1915522117" office:name="Win版固有の関数" text:style-name="Index_20_Link" text:visited-style-name="Index_20_Link">Win版固有の関数<text:tab/>17</text:a></text:p>
          <text:p text:style-name="P8"><text:a xlink:type="simple" xlink:href="#__RefHeading___Toc4266_3034306593" office:name="2Dグラフィック関数(plot.xxxx(), graph.xxxx())" text:style-name="Index_20_Link" text:visited-style-name="Index_20_Link">2Dグラフィック関数(plot.xxxx(), graph.xxxx())<text:tab/>17</text:a></text:p>
          <text:p text:style-name="P8"><text:a xlink:type="simple" xlink:href="#__RefHeading___Toc4268_3034306593" office:name="3Dグラフィック関数(plot3D.xxxx())" text:style-name="Index_20_Link" text:visited-style-name="Index_20_Link">3Dグラフィック関数(plot3D.xxxx())<text:tab/>18</text:a></text:p>
          <text:p text:style-name="P7"><text:a xlink:type="simple" xlink:href="#__RefHeading___Toc1160_1915522117%20Copy%201%20Copy%202%20Copy%203" office:name="5. 算術関数" text:style-name="Index_20_Link" text:visited-style-name="Index_20_Link">5. 算術関数<text:tab/>19</text:a></text:p>
          <text:p text:style-name="P7"><text:a xlink:type="simple" xlink:href="#__RefHeading___Toc1160_1915522117%20Copy%201%20Copy%202" office:name="6. 配列関数" text:style-name="Index_20_Link" text:visited-style-name="Index_20_Link">6. 配列関数<text:tab/>21</text:a></text:p>
          <text:p text:style-name="P7"><text:a xlink:type="simple" xlink:href="#__RefHeading___Toc1160_1915522117%20Copy%201%20Copy%202%20Copy%201" office:name="7. 文字列関数" text:style-name="Index_20_Link" text:visited-style-name="Index_20_Link">7. 文字列関数<text:tab/>22</text:a></text:p>
          <text:p text:style-name="P7"><text:a xlink:type="simple" xlink:href="#__RefHeading___Toc1160_1915522117%20Copy%201%20Copy%202%20Copy%201%20Copy%201" office:name="8. ファイル関数" text:style-name="Index_20_Link" text:visited-style-name="Index_20_Link">8. ファイル関数<text:tab/>23</text:a></text:p>
          <text:p text:style-name="P7"><text:a xlink:type="simple" xlink:href="#__RefHeading___Toc1160_1915522117%20Copy%201%20Copy%203" office:name="9. マトリックス関数" text:style-name="Index_20_Link" text:visited-style-name="Index_20_Link">9. マトリックス関数<text:tab/>24</text:a></text:p>
          <text:p text:style-name="P7"><text:a xlink:type="simple" xlink:href="#__RefHeading___Toc1160_1915522117%20Copy%201" office:name="10. グラフィック機能" text:style-name="Index_20_Link" text:visited-style-name="Index_20_Link">10. グラフィック機能<text:tab/>25</text:a></text:p>
          <text:p text:style-name="P8"><text:a xlink:type="simple" xlink:href="#__RefHeading___Toc1267_1915522117%20Copy%201" office:name="ウィンドウの設定" text:style-name="Index_20_Link" text:visited-style-name="Index_20_Link">ウィンドウの設定<text:tab/>25</text:a></text:p>
          <text:p text:style-name="P8"><text:a xlink:type="simple" xlink:href="#__RefHeading___Toc2998_1264076087" office:name="点の表示" text:style-name="Index_20_Link" text:visited-style-name="Index_20_Link"><text:soft-page-break/>点の表示<text:tab/>26</text:a></text:p>
          <text:p text:style-name="P8"><text:a xlink:type="simple" xlink:href="#__RefHeading___Toc3000_1264076087" office:name="線分の表示" text:style-name="Index_20_Link" text:visited-style-name="Index_20_Link">線分の表示<text:tab/>26</text:a></text:p>
          <text:p text:style-name="P8"><text:a xlink:type="simple" xlink:href="#__RefHeading___Toc3002_1264076087" office:name="円弧の表示" text:style-name="Index_20_Link" text:visited-style-name="Index_20_Link">円弧の表示<text:tab/>26</text:a></text:p>
          <text:p text:style-name="P8"><text:a xlink:type="simple" xlink:href="#__RefHeading___Toc3004_1264076087" office:name="文字列の表示" text:style-name="Index_20_Link" text:visited-style-name="Index_20_Link">文字列の表示<text:tab/>26</text:a></text:p>
          <text:p text:style-name="P8"><text:a xlink:type="simple" xlink:href="#__RefHeading___Toc3006_1264076087" office:name="グラフィック関数" text:style-name="Index_20_Link" text:visited-style-name="Index_20_Link">グラフィック関数<text:tab/>27</text:a></text:p>
          <text:p text:style-name="P7"><text:a xlink:type="simple" xlink:href="#__RefHeading___Toc1160_1915522117%20Copy%201%20Copy%201" office:name="11. 3Dグラフィック機能" text:style-name="Index_20_Link" text:visited-style-name="Index_20_Link">11. 3Dグラフィック機能<text:tab/>28</text:a></text:p>
          <text:p text:style-name="P8"><text:a xlink:type="simple" xlink:href="#__RefHeading___Toc3478_995567988" office:name="３次元データ" text:style-name="Index_20_Link" text:visited-style-name="Index_20_Link">３次元データ<text:tab/>28</text:a></text:p>
          <text:p text:style-name="P8"><text:a xlink:type="simple" xlink:href="#__RefHeading___Toc1267_1915522117%20Copy%201%20Copy%201" office:name="3Dグラフィック関数" text:style-name="Index_20_Link" text:visited-style-name="Index_20_Link">3Dグラフィック関数<text:tab/>29</text:a></text:p>
          <text:p text:style-name="P8"><text:a xlink:type="simple" xlink:href="#__RefHeading___Toc5138_2346902822" office:name="3D要素表示関数" text:style-name="Index_20_Link" text:visited-style-name="Index_20_Link">3D要素表示関数<text:tab/>29</text:a></text:p>
          <text:p text:style-name="P8"><text:a xlink:type="simple" xlink:href="#__RefHeading___Toc5140_2346902822" office:name="3D要素座標変換関数" text:style-name="Index_20_Link" text:visited-style-name="Index_20_Link">3D要素座標変換関数<text:tab/>32</text:a></text:p>
          <text:p text:style-name="P8"><text:a xlink:type="simple" xlink:href="#__RefHeading___Toc5142_2346902822" office:name="3D座標データの座標変換関数" text:style-name="Index_20_Link" text:visited-style-name="Index_20_Link">3D座標データの座標変換関数<text:tab/>33</text:a></text:p>
          <text:p text:style-name="P8"><text:a xlink:type="simple" xlink:href="#__RefHeading___Toc5142_2346902822%20Copy%201" office:name="3D座標データ作成関数" text:style-name="Index_20_Link" text:visited-style-name="Index_20_Link">3D座標データ作成関数<text:tab/>33</text:a></text:p>
        </text:index-body>
      </text:table-of-content>
      <text:p text:style-name="Standard"/>
      <text:p text:style-name="Standard"/>
      <text:h text:style-name="P9" text:outline-level="2"/>
      <text:h text:style-name="P10" text:outline-level="2" text:is-list-header="true"><text:bookmark-start text:name="__RefHeading___Toc333_1425755221"/><text:span text:style-name="T2">1.</text:span> 画面の説明<text:bookmark-end text:name="__RefHeading___Toc333_1425755221"/></text:h>
      <text:p text:style-name="Standard"/>
      <text:p text:style-name="Standard"/>
      <text:p text:style-name="Standard"/>
      <text:p text:style-name="Standard"/>
      <text:p text:style-name="Standard"><draw:custom-shape text:anchor-type="paragraph" draw:z-index="3" draw:name="シェイプ 3" draw:style-name="gr1" draw:text-style-name="P12" svg:width="1.853cm" svg:height="0.629cm" svg:x="0.083cm" svg:y="0.064cm"><text:p text:style-name="P11">メニュー</text:p><draw:enhanced-geometry svg:viewBox="0 0 21600 21600" draw:glue-points="10800 0 0 10800 10800 21600 21600 10800 ?f40 ?f41" draw:text-areas="0 0 21600 21600" draw:type="rectangular-callout" draw:modifiers="11200.7611798287 57176.47058823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4" draw:name="シェイプ 4" draw:style-name="gr2" draw:text-style-name="P12" svg:width="2.992cm" svg:height="0.629cm" svg:x="2.498cm" svg:y="0.131cm"><text:p text:style-name="P11">エディタボタン</text:p><draw:enhanced-geometry svg:viewBox="0 0 21600 21600" draw:glue-points="10800 0 0 10800 10800 21600 21600 10800 ?f40 ?f41" draw:text-areas="0 0 21600 21600" draw:type="rectangular-callout" draw:modifiers="4404.0070713023 68490.7563025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5" draw:name="シェイプ 5" draw:style-name="gr3" draw:text-style-name="P14" svg:width="2.83cm" svg:height="0.63cm" svg:x="5.489cm" svg:y="0.093cm"><text:p text:style-name="P13"><text:span text:style-name="T3">ファイルボタン</text:span></text:p><draw:enhanced-geometry svg:viewBox="0 0 21600 21600" draw:glue-points="10800 0 0 10800 10800 21600 21600 10800 ?f40 ?f41" draw:text-areas="0 0 21600 21600" draw:type="rectangular-callout" draw:modifiers="-1386.16822429907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6" draw:name="シェイプ 6" draw:style-name="gr4" draw:text-style-name="P14" svg:width="2.354cm" svg:height="0.63cm" svg:x="8.513cm" svg:y="0.06cm"><text:p text:style-name="P13"><text:span text:style-name="T3">実行ボタン</text:span></text:p><draw:enhanced-geometry svg:viewBox="0 0 21600 21600" draw:glue-points="10800 0 0 10800 10800 21600 21600 10800 ?f40 ?f41" draw:text-areas="0 0 21600 21600" draw:type="rectangular-callout" draw:modifiers="2459.32584269663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13" draw:name="シェイプ 10" draw:style-name="gr5" draw:text-style-name="P14" svg:width="4.134cm" svg:height="0.63cm" svg:x="11.462cm" svg:y="0.088cm"><text:p text:style-name="P13"><text:span text:style-name="T3">参照ファ</text:span><text:span text:style-name="T3">イルフォ</text:span><text:span text:style-name="T3">ルダ</text:span></text:p><draw:enhanced-geometry svg:viewBox="0 0 21600 21600" draw:glue-points="10800 0 0 10800 10800 21600 21600 10800 ?f40 ?f41" draw:text-areas="0 0 21600 21600" draw:type="rectangular-callout" draw:modifiers="-7970.98976109215 249003.3519553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p>
      <text:p text:style-name="Standard"/>
      <text:p text:style-name="Standard"><draw:custom-shape text:anchor-type="paragraph" draw:z-index="1" draw:name="シェイプ 1" draw:style-name="gr6" draw:text-style-name="P15" svg:width="4.977cm" svg:height="0.696cm" svg:x="0.09cm" svg:y="1.06cm"><text:p/><draw:enhanced-geometry svg:viewBox="0 0 21600 21600" draw:type="rectangle" draw:enhanced-path="M 0 0 L 21600 0 21600 21600 0 21600 0 0 Z N"/></draw:custom-shape><draw:custom-shape text:anchor-type="paragraph" draw:z-index="2" draw:name="シェイプ 2" draw:style-name="gr7" draw:text-style-name="P16" svg:width="2.5cm" svg:height="0.738cm" svg:x="7.761cm" svg:y="1.085cm"><text:p/><draw:enhanced-geometry svg:viewBox="0 0 21600 21600" draw:type="rectangle" draw:enhanced-path="M 0 0 L 21600 0 21600 21600 0 21600 0 0 Z N"/></draw:custom-shape><draw:frame text:anchor-type="paragraph" draw:z-index="7" draw:name="テキスト枠 1" draw:style-name="gr8" draw:text-style-name="P18" svg:width="3.507cm" svg:height="0.86cm" svg:x="11.725cm" svg:y="3.611cm"><draw:text-box><text:p text:style-name="P17">出力ウィンドウ</text:p></draw:text-box></draw:frame><draw:frame text:anchor-type="paragraph" draw:z-index="8" draw:name="テキスト枠 2" draw:style-name="gr9" draw:text-style-name="P19" svg:width="3.507cm" svg:height="0.86cm" svg:x="2.764cm" svg:y="5.269cm"><draw:text-box><text:p text:style-name="P17">エディタウィンドウ</text:p></draw:text-box></draw:frame><draw:custom-shape text:anchor-type="paragraph" draw:z-index="9" draw:name="シェイプ 7" draw:style-name="gr10" draw:text-style-name="P20" svg:width="3.638cm" svg:height="0.696cm" svg:x="0.586cm" svg:y="11.621cm"><text:p/><draw:enhanced-geometry svg:viewBox="0 0 21600 21600" draw:type="rectangle" draw:enhanced-path="M 0 0 L 21600 0 21600 21600 0 21600 0 0 Z N"/></draw:custom-shape><draw:frame text:anchor-type="paragraph" draw:z-index="11" draw:name="テキスト枠 3" draw:style-name="gr11" draw:text-style-name="P21" svg:width="4.444cm" svg:height="0.793cm" svg:x="11.587cm" svg:y="8.901cm"><draw:text-box><text:p text:style-name="P17"><text:span text:style-name="T3">ファイル参照ウィンドウ</text:span></text:p></draw:text-box></draw:frame><draw:custom-shape text:anchor-type="paragraph" draw:z-index="22" draw:name="シェイプ 11" draw:style-name="gr7" draw:text-style-name="P16" svg:width="2.5cm" svg:height="0.738cm" svg:x="5.092cm" svg:y="1.048cm"><text:p/><draw:enhanced-geometry svg:viewBox="0 0 21600 21600" draw:type="rectangle" draw:enhanced-path="M 0 0 L 21600 0 21600 21600 0 21600 0 0 Z N"/></draw:custom-shape><draw:frame draw:style-name="fr3" draw:name="画像2" text:anchor-type="char" svg:width="17cm" svg:height="12.305cm" draw:z-index="0"><draw:image xlink:href="Pictures/100000000000030700000231EDFB9F76.png" xlink:type="simple" xlink:show="embed" xlink:actuate="onLoad" draw:mime-type="image/png"/></draw:frame></text:p>
      <text:p text:style-name="Standard"><draw:custom-shape text:anchor-type="paragraph" draw:z-index="12" draw:name="シェイプ 9" draw:style-name="gr12" draw:text-style-name="P14" svg:width="2.867cm" svg:height="0.63cm" svg:x="9.137cm" svg:y="-0.173cm"><text:p text:style-name="P13"><text:span text:style-name="T3">ファイル一覧</text:span></text:p><draw:enhanced-geometry svg:viewBox="0 0 21600 21600" draw:glue-points="10800 0 0 10800 10800 21600 21600 10800 ?f40 ?f41" draw:text-areas="0 0 21600 21600" draw:type="rectangular-callout" draw:modifiers="3905.53505535055 -71195.5307262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10" draw:name="シェイプ 8" draw:style-name="gr13" draw:text-style-name="P14" svg:width="2.251cm" svg:height="0.63cm" svg:x="0.169cm" svg:y="0.086cm"><text:p text:style-name="P13"><text:span text:style-name="T3">ヘルプボタン</text:span></text:p><draw:enhanced-geometry svg:viewBox="0 0 21600 21600" draw:glue-points="10800 0 0 10800 10800 21600 21600 10800 ?f40 ?f41" draw:text-areas="0 0 21600 21600" draw:type="rectangular-callout" draw:modifiers="1285.51292090838 -28116.201117318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23" draw:name="シェイプ 12" draw:style-name="gr14" draw:text-style-name="P14" svg:width="1.754cm" svg:height="0.63cm" svg:x="3.029cm" svg:y="0.136cm"><text:p text:style-name="P13"><text:span text:style-name="T3">検索</text:span></text:p><draw:enhanced-geometry svg:viewBox="0 0 21600 21600" draw:glue-points="10800 0 0 10800 10800 21600 21600 10800 ?f40 ?f41" draw:text-areas="0 0 21600 21600" draw:type="rectangular-callout" draw:modifiers="-1628.14070351759 -25280.446927374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p>
      <text:p text:style-name="Standard"/>
      <text:p text:style-name="Standard"/>
      <text:p text:style-name="P22"/>
      <text:p text:style-name="Standard">・メニュー</text:p>
      <text:p text:style-name="Standard"><text:tab/>ファイル</text:p>
      <text:p text:style-name="Standard"><text:tab/><text:tab/>新規<text:tab/><text:tab/><text:tab/>エディタウィンドウをクリアし新規スクリプトの作成</text:p>
      <text:p text:style-name="Standard"><text:tab/><text:tab/>開く<text:tab/><text:tab/><text:tab/>ファイル一覧からスクリプトファイルを読み込む</text:p>
      <text:p text:style-name="Standard"><text:tab/><text:tab/>保存<text:tab/><text:tab/><text:tab/>編集したスクリプトをファイルに保存</text:p>
      <text:p text:style-name="P23"><text:tab/><text:tab/>名前を付けて保存<text:tab/>編集したスクリプトをファイル名を指定してに保存</text:p>
      <text:p text:style-name="Standard"><text:tab/>編集</text:p>
      <text:p text:style-name="P24"><text:tab/><text:tab/>切取り<text:tab/><text:tab/><text:tab/>選択した文字列を切り取る</text:p>
      <text:p text:style-name="P24"><text:tab/><text:tab/>コピー<text:tab/><text:tab/><text:tab/>選択した文字列をクリップボードにコピーする</text:p>
      <text:p text:style-name="Standard"><text:tab/><text:tab/>貼付け<text:tab/><text:tab/><text:tab/>クリップボードの文字列をカーソル位置に挿入</text:p>
      <text:p text:style-name="Standard"><text:soft-page-break/><text:tab/><text:tab/>検索<text:tab/><text:tab/><text:tab/>下部検索ボックスの文字列を検索してカーソルを移動</text:p>
      <text:p text:style-name="Standard"><text:tab/><text:tab/>置換え<text:tab/><text:tab/><text:tab/>未作成</text:p>
      <text:p text:style-name="Standard"><text:tab/><text:tab/>コメント追加/解除<text:tab/>選択した行のコメント化またはコメント解除</text:p>
      <text:p text:style-name="Standard"><text:tab/><text:tab/>タブ→スペース<text:tab/>選択行のタブコードをスペースに変換</text:p>
      <text:p text:style-name="Standard"/>
      <text:p text:style-name="P25">・エディタボタン</text:p>
      <text:p text:style-name="P25"><text:tab/>行番号<text:span text:style-name="T4">(#)<text:tab/><text:tab/>行番号の表示/非表示</text:span></text:p>
      <text:p text:style-name="P25"><text:tab/>行末記号<text:span text:style-name="T4">(¶)<text:tab/><text:tab/>行末記号の表示/非表示</text:span></text:p>
      <text:p text:style-name="P25"><text:tab/>文字フォント<text:tab/><text:tab/>エディタの文字フォントの選択</text:p>
      <text:p text:style-name="P25"><text:tab/>拡大<text:tab/><text:tab/><text:tab/>エディタの文字の拡大</text:p>
      <text:p text:style-name="P25"><text:tab/>縮小<text:tab/><text:tab/><text:tab/>エディタの文字の縮小</text:p>
      <text:p text:style-name="P25"/>
      <text:p text:style-name="Standard">・ファイルボタン</text:p>
      <text:p text:style-name="P26"><text:tab/>新規<text:tab/><text:tab/><text:tab/>エディタウィンドウをクリアし新規スクリプトの作成</text:p>
      <text:p text:style-name="P26"><text:tab/>開く<text:tab/><text:tab/><text:tab/>ファイル一覧からスクリプトファイルを読み込む</text:p>
      <text:p text:style-name="P26"><text:tab/>保存<text:tab/><text:tab/><text:tab/>編集したスクリプトをファイルに保存</text:p>
      <text:p text:style-name="P26"><text:tab/>名前を付けて保存<text:tab/>編集したスクリプトをファイル名を指定してに保存</text:p>
      <text:p text:style-name="Standard"/>
      <text:p text:style-name="Standard">・実行ボタン</text:p>
      <text:p text:style-name="Standard"><text:tab/>実行<text:tab/><text:tab/><text:tab/>スクリプトの実行</text:p>
      <text:p text:style-name="Standard"><text:tab/>中断<text:tab/><text:tab/><text:tab/>実行中のスクリプトの中断</text:p>
      <text:p text:style-name="P26"><text:tab/>一時停止<text:tab/><text:tab/>実行中のスクリプトの一時停止、再度押すと再開</text:p>
      <text:p text:style-name="Standard"/>
      <text:p text:style-name="Standard">・エディタウィンドウ<text:tab/><text:tab/>スクリプトを作成するウィンドウ</text:p>
      <text:p text:style-name="Standard"><text:tab/><text:tab/><text:tab/><text:tab/>通常のエディタの機能以外に関数などの入力候補機能を追加</text:p>
      <text:p text:style-name="Standard"/>
      <text:p text:style-name="Standard">・出力ウィンドウ<text:tab/><text:tab/><text:span text:style-name="T5">print文のメッセージを出力するウィンドウ</text:span></text:p>
      <text:p text:style-name="Standard"/>
      <text:p text:style-name="P26">・参照ファイルフォルダ<text:tab/>参照したいファイルのフォルダの選択</text:p>
      <text:p text:style-name="P26"><text:tab/><text:tab/><text:tab/><text:tab/>マウスでダブルクリックするとフォルダの登録ができる</text:p>
      <text:p text:style-name="Standard"/>
      <text:p text:style-name="P27">・参照ファイル一覧<text:tab/>指定されたフォルダのファイルの一覧を表示し選択したテキストファイルを参照ファイルウィンドウに表示する</text:p>
      <text:p text:style-name="P28"><text:tab/>マウスの右ボタンでコンテキストメニューを表示</text:p>
      <text:p text:style-name="P28"><text:tab/>コンテキストメニューではファイルのコピー、移動、削除、ファイル名の変更ができる</text:p>
      <text:p text:style-name="Standard"/>
      <text:p text:style-name="Standard"/>
      <text:p text:style-name="Standard">・参照ファイルウィンドウ<text:tab/>参照用のテキストファイルを表示するウィンドウ</text:p>
      <text:p text:style-name="Standard"/>
      <text:p text:style-name="Standard">・検索<text:tab/><text:tab/><text:tab/><text:tab/>入力した文字列の検索</text:p>
      <text:p text:style-name="Standard"/>
      <text:p text:style-name="Standard"/>
      <text:p text:style-name="Standard">・キー入力</text:p>
      <text:p text:style-name="P24"><text:tab/><text:span text:style-name="T6">F5<text:tab/><text:tab/><text:tab/>プログラム実行</text:span></text:p>
      <text:p text:style-name="P24"><text:soft-page-break/><text:tab/><text:span text:style-name="T6">F8<text:tab/><text:tab/><text:tab/>入力候補</text:span></text:p>
      <text:p text:style-name="P24"><text:tab/><text:span text:style-name="T6">Apps(右Winキー)<text:tab/>入力候補</text:span></text:p>
      <text:p text:style-name="P24"><text:tab/><text:span text:style-name="T7">Ctrl + A<text:tab/><text:tab/>全選択</text:span></text:p>
      <text:p text:style-name="P24"><text:tab/><text:span text:style-name="T6">Ctrl + C<text:tab/><text:tab/>コピー</text:span></text:p>
      <text:p text:style-name="P24"><text:tab/><text:span text:style-name="T8">Ctrl + D<text:tab/><text:tab/>一時停止</text:span></text:p>
      <text:p text:style-name="P29"><text:tab/>Ctrl + F<text:tab/><text:tab/>検索</text:p>
      <text:p text:style-name="P24"><text:tab/><text:span text:style-name="T6">Ctrl + N<text:tab/><text:tab/>新規</text:span></text:p>
      <text:p text:style-name="P24"><text:tab/><text:span text:style-name="T6">Ctrl + O<text:tab/><text:tab/>開く</text:span></text:p>
      <text:p text:style-name="P24"><text:tab/><text:span text:style-name="T6">Ctrl + S<text:tab/><text:tab/>上書き保存</text:span></text:p>
      <text:p text:style-name="P24"><text:tab/><text:span text:style-name="T6">Ctrl + V<text:tab/><text:tab/>貼付け</text:span></text:p>
      <text:p text:style-name="P24"><text:tab/><text:span text:style-name="T6">Ctrl + X<text:tab/><text:tab/>切取り</text:span></text:p>
      <text:p text:style-name="P24"><text:tab/><text:span text:style-name="T9">Ctrl + Y<text:tab/><text:tab/>リドゥ</text:span></text:p>
      <text:p text:style-name="P24"><text:tab/><text:span text:style-name="T6">Ctrl + Z<text:tab/><text:tab/>アンドゥ</text:span></text:p>
      <text:p text:style-name="Standard"><text:tab/><text:span text:style-name="T6">Ctrl + ‘/’<text:tab/><text:tab/>コメント追加/解除</text:span></text:p>
      <text:p text:style-name="Standard"><text:tab/><text:span text:style-name="T7">Shift + Alt + 矢印キー<text:tab/><text:tab/>矩形選択(解除は矢印キー単独など)</text:span></text:p>
      <text:p text:style-name="Standard"><text:tab/><text:span text:style-name="T7">Shift + Ctrl + 上下矢印<text:tab/>エディタ画面上下移動(カーソル移動なし)</text:span></text:p>
      <text:p text:style-name="P30"/>
      <text:p text:style-name="Standard"/>
      <text:p text:style-name="Standard"/>
      <text:p text:style-name="Standard"/>
      <text:p text:style-name="Standard"/>
      <text:p text:style-name="Standard"/>
      <text:h text:style-name="Heading_20_3" text:outline-level="3" text:is-list-header="true"/>
      <text:h text:style-name="P31" text:outline-level="2" text:is-list-header="true"><text:bookmark-start text:name="__RefHeading___Toc335_1425755221"/>2. プログラムの入力と実行<text:bookmark-end text:name="__RefHeading___Toc335_1425755221"/></text:h>
      <text:h text:style-name="Heading_20_5" text:outline-level="5" text:is-list-header="true"><text:bookmark-start text:name="__RefHeading___Toc2434_2450001385"/>プログラムの入力<text:bookmark-end text:name="__RefHeading___Toc2434_2450001385"/></text:h>
      <text:p text:style-name="Standard"/>
      <text:p text:style-name="Standard">プログラムの入力は左のエディタウィンドウから入力する。</text:p>
      <text:p text:style-name="Standard">エディタウィンドウの文字の種類や大きさは上ツールバーの左側のボタンで変更できる。</text:p>
      <text:p text:style-name="Standard">同じくツールバーの左側のボタンの中には行番号の有無、行末記号の有無の切替もできる。</text:p>
      <text:p text:style-name="Standard">入力する時に関数名などがよくわからない場合、関数名の一部の文字や関連する文字を入力して<text:span text:style-name="T10">F8キーまたは右Winキー(Appsキー)を押すと関係する関数名などが表示される。</text:span></text:p>
      <text:p text:style-name="Standard">例えば平方根の<text:span text:style-name="T10">sqrt() 関数を入力したい時は sq と入力してF8キーまたは平方入力してF8キーを押すといくつかの入力候補が表示されるのでその中から選択する。</text:span></text:p>
      <text:p text:style-name="P32">その他にカット<text:span text:style-name="T11">(Ctrl+X),コピー(Ctrl+C) &amp; ペースト(Ctrl+V) やアンドゥ(Ctrl+Z)、リドゥ(Ctrl+Y)が使用できる。</text:span></text:p>
      <text:p text:style-name="P32"/>
      <text:h text:style-name="Heading_20_5" text:outline-level="5" text:is-list-header="true"><text:bookmark-start text:name="__RefHeading___Toc2436_2450001385"/>プログラムの実行<text:bookmark-end text:name="__RefHeading___Toc2436_2450001385"/></text:h>
      <text:p text:style-name="P32"/>
      <text:p text:style-name="P32">入力したプログラムの実行は <text:span text:style-name="T12">F5キーを押すかツールバーの右側の▶ボタンを押すと実行される。</text:span></text:p>
      <text:p text:style-name="P32"/>
      <text:p text:style-name="P32"><draw:frame text:anchor-type="paragraph" draw:z-index="31" draw:name="テキスト枠 10" draw:style-name="gr15" draw:text-style-name="P33" svg:width="4.883cm" svg:height="1.788cm" svg:x="2.427cm" svg:y="0.06cm"><draw:text-box><text:p>a = 1;</text:p><text:p>b = a + 3;</text:p><text:p>println("a, b = ", a, ", ", b);</text:p></draw:text-box></draw:frame><draw:frame text:anchor-type="paragraph" draw:z-index="32" draw:name="テキスト枠 11" draw:style-name="gr16" draw:text-style-name="P33" svg:width="5.942cm" svg:height="1.95cm" svg:x="9.978cm" svg:y="0.236cm"><draw:text-box><text:p>[09:06:28] Start : [test1]</text:p><text:p>a, b = 1, 4</text:p><text:p>[09:06:28] End : [test1]</text:p><text:p/></draw:text-box></draw:frame><draw:custom-shape text:anchor-type="paragraph" draw:z-index="33" draw:name="シェイプ 15" draw:style-name="gr17" svg:width="0.578cm" svg:height="0.795cm" svg:x="7.967cm" svg:y="0.5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p>
      <text:p text:style-name="P32"/>
      <text:p text:style-name="P32"/>
      <text:p text:style-name="P32"/>
      <text:p text:style-name="P32">プログラムの実行結果は開始時間と終了時間を加えて右上の出力ウィンドウに表示される。</text:p>
      <text:p text:style-name="Standard"/>
      <text:h text:style-name="Heading_20_5" text:outline-level="5" text:is-list-header="true"><text:bookmark-start text:name="__RefHeading___Toc2547_3163152918"/>プログラムの一時停止と中断<text:bookmark-end text:name="__RefHeading___Toc2547_3163152918"/></text:h>
      <text:p text:style-name="Standard"/>
      <text:p text:style-name="Standard">プログラムを実行して無限ループなどに入っ場合など処理を中断させた場合には、上部ツールバーの右側の中断ボタンまたは一時停止ボタン<text:span text:style-name="T13">(Ctrl+D)</text:span>を押して中断させることができる。</text:p>
      <text:p text:style-name="Standard">一時停止ボタンの場合は再度ボタンを押すと処理が再開される。</text:p>
      <text:p text:style-name="Standard"/>
      <text:p text:style-name="Standard"/>
      <text:h text:style-name="Heading_20_5" text:outline-level="5" text:is-list-header="true"><text:bookmark-start text:name="__RefHeading___Toc2438_2450001385"/>ファイル参照<text:bookmark-end text:name="__RefHeading___Toc2438_2450001385"/></text:h>
      <text:p text:style-name="Standard"/>
      <text:p text:style-name="Standard">他のファイルを参照しながらプログラムを入力する場合には、右下のファイル参照ウィンドウにファイルを表示して参照することができる。</text:p>
      <text:p text:style-name="Standard">ファイの選択はファイル参照ウィンドウの左上の参照フォルダのコンボボックスに登録してあるディレクトリを選択しその下のファイルリストでファイルを選択して表示する。</text:p>
      <text:p text:style-name="Standard">参照フォルダにディレクトリを追加する時は参照フォルダのコンボボックスをマウスでダブルクリックするとフォルダの選択ダイヤログが表示されるのでそれでフォルダを選択して追加する。</text:p>
      <text:p text:style-name="Standard"/>
      <text:p text:style-name="Standard"/>
      <text:h text:style-name="Heading_20_5" text:outline-level="5" text:is-list-header="true"><text:bookmark-start text:name="__RefHeading___Toc2440_2450001385"/><text:soft-page-break/>入力候補<text:bookmark-end text:name="__RefHeading___Toc2440_2450001385"/></text:h>
      <text:p text:style-name="Standard"/>
      <text:p text:style-name="Standard">エディタウィンドウで入力した文字から検索した関数名や定数などを説明文と合わせて表示し、該当の選択して入力する。</text:p>
      <text:p text:style-name="Standard">検索対象文字は関数名だけではなく、説明文に含まれる文字も指定できる。</text:p>
      <text:p text:style-name="Standard">使用方法は検索したい文字列の入力途中で<text:span text:style-name="T5">Apps(右側Winキー)またはF8キーを押すと該当する関数名などが表示される。</text:span></text:p>
      <text:p text:style-name="Standard">下図では <text:span text:style-name="T5">pl と入力した後にF8キーを押すとメニューダイヤログが表示されこの中から選択する。</text:span></text:p>
      <text:p text:style-name="Standard"/>
      <text:p text:style-name="Standard"/>
      <text:p text:style-name="Standard"><draw:frame draw:style-name="fr2" draw:name="画像3" text:anchor-type="char" svg:x="3.955cm" svg:y="0cm" svg:width="12.411cm" svg:height="12.778cm" draw:z-index="14"><draw:image xlink:href="Pictures/10000000000001FC0000020BDABDFCB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5" draw:name="線 1" draw:style-name="gr18" draw:text-style-name="P17" svg:x1="5.03cm" svg:y1="-4.349cm" svg:x2="7.113cm" svg:y2="-4.614cm"><text:p/></draw:line></text:p>
      <text:p text:style-name="Standard"/>
      <text:p text:style-name="Standard"/>
      <text:p text:style-name="Standard"/>
      <text:p text:style-name="Standard"/>
      <text:p text:style-name="Standard"/>
      <text:p text:style-name="Standard"/>
      <text:p text:style-name="Standard"/>
      <text:p text:style-name="P34">・#include 文がある場合</text:p>
      <text:p text:style-name="P35">インクルードするファイルから関数名とコメントを取り込んで入力候補に追加される。</text:p>
      <text:p text:style-name="P36">下記の場合は <text:s/>「<text:span text:style-name="T14">roundTop(x) 最上位の桁で丸める」</text:span></text:p>
      <text:p text:style-name="P36">新規に <text:span text:style-name="T14">#include を追加した場合にはスクリプト文を再読み込みすると入力候補に出てくる。</text:span></text:p>
      <text:p text:style-name="P37"><draw:custom-shape text:anchor-type="paragraph" draw:z-index="24" draw:name="シェイプ 13" draw:style-name="gr19" draw:text-style-name="P20" svg:width="2.858cm" svg:height="0.662cm" svg:x="1.679cm" svg:y="0.5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シェイプ 14" draw:style-name="gr20" draw:text-style-name="P38" svg:width="3.731cm" svg:height="0.609cm" svg:x="2.182cm" svg:y="0.081cm"><text:p/><draw:enhanced-geometry svg:viewBox="0 0 21600 21600" draw:glue-points="10800 0 3163 3163 0 10800 3163 18437 10800 21600 18437 18437 21600 10800 18437 3163" draw:text-areas="3163 3163 18437 18437" draw:type="ellipse" draw:enhanced-path="U 10800 10800 10800 10800 0 360 Z N"/></draw:custom-shape>// <text:s/>最上位の桁で丸める</text:p>
      <text:p text:style-name="P37">roundTop(x) {</text:p>
      <text:p text:style-name="P37"><text:s text:c="4"/>w = floor(log(x));</text:p>
      <text:p text:style-name="P37"><text:s text:c="4"/>return round(x, 10^w);</text:p>
      <text:p text:style-name="P37">}</text:p>
      <text:p text:style-name="P39"/>
      <text:h text:style-name="P10" text:outline-level="2" text:is-list-header="true"><text:bookmark-start text:name="__RefHeading___Toc444_1425755221"/>3. スクリプト文<text:bookmark-end text:name="__RefHeading___Toc444_1425755221"/></text:h>
      <text:p text:style-name="P40"/>
      <text:p text:style-name="P40">C言語風スクリプト言語</text:p>
      <text:p text:style-name="P40"/>
      <text:p text:style-name="P40">変数 <text:s text:c="2"/>: 型指定なし 実数または文字列(ダブルクォーテーション(")で囲む)</text:p>
      <text:p text:style-name="P40"><text:tab/><text:span text:style-name="T15">a</text:span> = 12.5; </text:p>
      <text:p text:style-name="P40"><text:tab/>a = "abcd";</text:p>
      <text:p text:style-name="P40"/>
      <text:p text:style-name="P40">配列 <text:s text:c="2"/>: 1次元配列 <text:tab/>a[2] = 25;</text:p>
      <text:p text:style-name="P40"><text:tab/><text:tab/><text:tab/>a[m] = "abcd";</text:p>
      <text:p text:style-name="P40"><text:tab/><text:tab/><text:tab/>fruit["apple"] = 50;</text:p>
      <text:p text:style-name="P40"><text:s text:c="9"/><text:tab/>2次元配列<text:tab/>a[1,2] = 30;</text:p>
      <text:p text:style-name="P40"><text:tab/><text:tab/><text:tab/>a[m,n] = 10:</text:p>
      <text:p text:style-name="P40"><text:s text:c="9"/><text:tab/>配列一括設定<text:tab/>a[] = { 1, 1, 5, 8 };</text:p>
      <text:p text:style-name="P40"><text:tab/><text:tab/><text:tab/><text:span text:style-name="T7">a[] = b[];</text:span></text:p>
      <text:p text:style-name="P40"><text:tab/><text:tab/><text:tab/><text:span text:style-name="T7">a</text:span>[,] = { {1, 2, 3 }, { 2, 3, 4 } };</text:p>
      <text:p text:style-name="P40"><text:tab/><text:tab/><text:tab/><text:span text:style-name="T7">a[,] = b[,];</text:span></text:p>
      <text:p text:style-name="P41"><text:tab/><text:tab/><text:tab/><text:span text:style-name="T7">a[m,] = </text:span>{ 1, 1, 5, 8 };</text:p>
      <text:p text:style-name="P41"><text:tab/><text:tab/><text:tab/><text:span text:style-name="T16">a[m,] = b[];</text:span></text:p>
      <text:p text:style-name="P41"><text:tab/><text:tab/><text:tab/><text:span text:style-name="T16">a[m,] = b[n,];</text:span></text:p>
      <text:p text:style-name="P40"/>
      <text:p text:style-name="P42">グローバル変数 :<text:tab/>変数名の先頭が “g_”で始まるものはグローバル変数でそれ以外がローカル変数になる。</text:p>
      <text:p text:style-name="P43"><text:s text:c="13"/><text:tab/><text:tab/><text:tab/>g_abcd = 2.5;</text:p>
      <text:p text:style-name="P40"/>
      <text:p text:style-name="P40">識別子 : <text:tab/>= (代入文) <text:s/>, ; (文末)</text:p>
      <text:p text:style-name="P40"/>
      <text:p text:style-name="P40">演算子 : <text:tab/>* , - , * , / , %(剰余) , ^(べき乗) , ++ , -- , += , -= , *= , /= , ^=</text:p>
      <text:p text:style-name="P40"/>
      <text:p text:style-name="P40">関係演算子 : <text:tab/>== , != , &lt; , &gt; , &lt;= , &gt;=</text:p>
      <text:p text:style-name="P40"/>
      <text:p text:style-name="P40">論理演算子 : <text:tab/>&amp;&amp; , || , !</text:p>
      <text:p text:style-name="P40"/>
      <text:p text:style-name="P40">制御文 : <text:tab/>代入文<text:tab/>: <text:tab/>変数/配列 = 変数|配列|値|文字列|関数|数式 ;</text:p>
      <text:p text:style-name="P40"><text:s text:c="9"/><text:tab/><text:tab/>if文 :<text:tab/><text:tab/>if (条件) { 実行文 } [ else { 実行分 } ]</text:p>
      <text:p text:style-name="P40"><text:tab/><text:tab/>while文 : <text:s/><text:tab/>while (条件) { 実行文 }</text:p>
      <text:p text:style-name="P40"><text:tab/><text:tab/>for文 :<text:tab/><text:tab/>for (初期値; 条件; 更新処理) { 実行文 }</text:p>
      <text:p text:style-name="P40"><text:tab/><text:tab/>return文 : <text:tab/>return 戻り値 ;</text:p>
      <text:p text:style-name="P40"><text:tab/><text:tab/>break文 :<text:tab/>break;</text:p>
      <text:p text:style-name="P40"><text:tab/><text:tab/>continue文 :<text:tab/>continue;</text:p>
      <text:p text:style-name="P40"><text:tab/><text:tab/><text:span text:style-name="T15">exit 文 :<text:tab/>exit;</text:span></text:p>
      <text:p text:style-name="P40"/>
      <text:p text:style-name="P40">関数定義 : 関数名(引数1, 引数2...) { 実行分; ... return 戻り値; }</text:p>
      <text:p text:style-name="P40"/>
      <text:p text:style-name="P40"/>
      <text:p text:style-name="P40"><text:soft-page-break/>プロクラムの構造</text:p>
      <text:p text:style-name="P40"><text:s text:c="4"/>main() { <text:s text:c="23"/>main関数(省略可)</text:p>
      <text:p text:style-name="P40"><text:tab/>a = 3; <text:s text:c="21"/>代入文</text:p>
      <text:p text:style-name="P40"><text:tab/>b = 2;</text:p>
      <text:p text:style-name="P40"><text:tab/>c = add(a, b); <text:s text:c="13"/>関数呼び出し</text:p>
      <text:p text:style-name="P40"><text:tab/>print<text:span text:style-name="T17">ln</text:span>(a + b, " ", c);</text:p>
      <text:p text:style-name="P40"><text:s text:c="4"/>}</text:p>
      <text:p text:style-name="P40"><text:s text:c="4"/>add(c, d) { <text:s text:c="20"/>関数定義</text:p>
      <text:p text:style-name="P40"><text:tab/>return c + d;</text:p>
      <text:p text:style-name="P40"><text:s text:c="4"/>}</text:p>
      <text:p text:style-name="P40"/>
      <text:h text:style-name="Heading_20_2" text:outline-level="2" text:is-list-header="true"><text:bookmark-start text:name="__RefHeading___Toc1160_1915522117"/>4. スクリプト文の書き方<text:bookmark-end text:name="__RefHeading___Toc1160_1915522117"/></text:h>
      <text:p text:style-name="P40"/>
      <text:h text:style-name="Heading_20_5" text:outline-level="5" text:is-list-header="true"><text:bookmark-start text:name="__RefHeading___Toc1267_1915522117"/>スクリプト文の書き方<text:bookmark-end text:name="__RefHeading___Toc1267_1915522117"/></text:h>
      <text:p text:style-name="Standard">スクリプト文<text:span text:style-name="T18">(プログラム) は一つのmain 関数と複数の sub関数で構成される。</text:span></text:p>
      <text:p text:style-name="Standard"><text:span text:style-name="T18">m</text:span>ain 関数の main() { <text:s/>} は省略することもできる。</text:p>
      <text:p text:style-name="Standard">その中で使用する変数のうちローカル変数はその関数内でしか使用できないがグローバル関数<text:span text:style-name="T18">(g_で始まる変数)</text:span>はすべての関数を通して使用できる。</text:p>
      <text:p text:style-name="Standard"/>
      <text:p text:style-name="Standard"><draw:frame text:anchor-type="paragraph" draw:z-index="16" draw:name="テキスト枠 4" draw:style-name="gr21" draw:text-style-name="P33" svg:width="6.086cm" svg:height="2.805cm" svg:x="1.203cm" svg:y="0.265cm"><draw:text-box><text:p><text:tab/>// <text:s text:c="3"/>main 関数 </text:p><text:p><text:tab/>main() {<text:tab/></text:p><text:p><text:tab/><text:tab/> <text:s text:c="3"/>c = sub(a,b);</text:p><text:p><text:tab/> <text:s text:c="3"/>println(c);</text:p><text:p><text:tab/>}</text:p></draw:text-box></draw:frame><draw:frame text:anchor-type="paragraph" draw:z-index="19" draw:name="テキスト枠 7" draw:style-name="gr21" draw:text-style-name="P33" svg:width="6.086cm" svg:height="2.805cm" svg:x="9.432cm" svg:y="0.397cm"><draw:text-box><text:p><text:tab/>// <text:s text:c="3"/>main 関数 </text:p><text:p><text:tab/>// <text:s text:c="3"/>main() { }は省略可能</text:p><text:p><text:tab/><text:tab/>c = sub(a,b);</text:p><text:p><text:tab/>println(c);</text:p><text:p><text:tab/></text:p></draw:text-box></draw:frame><text:s text:c="4"/></text:p>
      <text:p text:style-name="P44"/>
      <text:p text:style-name="P44"/>
      <text:p text:style-name="P44"/>
      <text:p text:style-name="P44"/>
      <text:p text:style-name="P44"/>
      <text:p text:style-name="P44"><draw:frame text:anchor-type="paragraph" draw:z-index="17" draw:name="テキスト枠 5" draw:style-name="gr22" draw:text-style-name="P33" svg:width="6.086cm" svg:height="2.223cm" svg:x="1.177cm" svg:y="0.332cm"><draw:text-box><text:p><text:tab/>// <text:s text:c="3"/>関数 </text:p><text:p><text:tab/>sub(d, e) {<text:tab/></text:p><text:p><text:tab/><text:tab/> <text:s text:c="3"/>return d - e;</text:p><text:p><text:tab/>}</text:p></draw:text-box></draw:frame></text:p>
      <text:p text:style-name="P44"/>
      <text:p text:style-name="P44"/>
      <text:p text:style-name="P44"/>
      <text:p text:style-name="P44"/>
      <text:p text:style-name="P44"/>
      <text:p text:style-name="P44"><text:tab/><text:tab/><text:tab/>:</text:p>
      <text:p text:style-name="P44"><draw:frame text:anchor-type="paragraph" draw:z-index="18" draw:name="テキスト枠 6" draw:style-name="gr22" draw:text-style-name="P33" svg:width="6.086cm" svg:height="2.223cm" svg:x="1.203cm" svg:y="0.464cm"><draw:text-box><text:p><text:tab/>// <text:s text:c="3"/>関数 </text:p><text:p><text:tab/>add(d, e) {<text:tab/></text:p><text:p><text:tab/><text:tab/> <text:s text:c="3"/>return d + e;</text:p><text:p><text:tab/>}</text:p></draw:text-box></draw:frame></text:p>
      <text:p text:style-name="P44"/>
      <text:p text:style-name="P44"/>
      <text:p text:style-name="P44"/>
      <text:p text:style-name="P44"/>
      <text:p text:style-name="P44"/>
      <text:p text:style-name="P44"/>
      <text:p text:style-name="P44"/>
      <text:p text:style-name="P44">関数内の文は基本的にはセミコロン(;)で終了する。</text:p>
      <text:p text:style-name="P44"><text:tab/><text:span text:style-name="T18">a = b + c;</text:span></text:p>
      <text:p text:style-name="P40"/>
      <text:p text:style-name="P45">{ } で囲まれた所には複数の文を書くことができる。</text:p>
      <text:p text:style-name="P45"><text:tab/>・{ } なしは１文のみ</text:p>
      <text:p text:style-name="P44"><text:tab/><text:span text:style-name="T18">if (a &lt; b)</text:span></text:p>
      <text:p text:style-name="P44"><text:soft-page-break/><text:tab/> <text:s text:c="3"/><text:span text:style-name="T18">println(a);</text:span></text:p>
      <text:p text:style-name="P44"><text:tab/><text:span text:style-name="T18">else</text:span></text:p>
      <text:p text:style-name="P44"><text:tab/> <text:s text:c="3"/><text:span text:style-name="T18">println(b);</text:span></text:p>
      <text:p text:style-name="P45"><text:tab/>・{ } ありは複数文</text:p>
      <text:p text:style-name="P44"/>
      <text:p text:style-name="P44"><text:tab/><text:span text:style-name="T18">if (a &lt; b) {</text:span></text:p>
      <text:p text:style-name="P44"><text:tab/> <text:s text:c="3"/><text:span text:style-name="T18">a = a +2;</text:span></text:p>
      <text:p text:style-name="P44"><text:tab/> <text:s text:c="3"/><text:span text:style-name="T18">println(a);</text:span></text:p>
      <text:p text:style-name="P44"><text:tab/><text:span text:style-name="T18">} else {</text:span></text:p>
      <text:p text:style-name="P44"><text:tab/> <text:s text:c="3"/><text:span text:style-name="T18">b = b -2;</text:span></text:p>
      <text:p text:style-name="P44"><text:tab/> <text:s text:c="3"/><text:span text:style-name="T18">println(b);</text:span></text:p>
      <text:p text:style-name="P44"><text:tab/><text:span text:style-name="T18">}</text:span><text:line-break/></text:p>
      <text:h text:style-name="Heading_20_5" text:outline-level="5" text:is-list-header="true"><text:bookmark-start text:name="__RefHeading___Toc1269_1915522117"/>コメント<text:bookmark-end text:name="__RefHeading___Toc1269_1915522117"/></text:h>
      <text:p text:style-name="P40"><text:s text:c="4"/>// から行末までをコメントアウトする</text:p>
      <text:p text:style-name="P40"><text:s text:c="4"/>/* から */ もコメントアウトするこの場合は複数行になってもかまわない</text:p>
      <text:p text:style-name="P40">　１行のみコメント化</text:p>
      <text:p text:style-name="P40"><text:tab/>// <text:s text:c="2"/>コメント</text:p>
      <text:p text:style-name="P40"><text:tab/><text:span text:style-name="T18">a = a + 2;</text:span></text:p>
      <text:p text:style-name="P40">　以下はすべてコメント</text:p>
      <text:p text:style-name="P40"><text:tab/>/<text:span text:style-name="T18">*</text:span></text:p>
      <text:p text:style-name="P40"><text:tab/><text:span text:style-name="T18">a = a + 2;</text:span></text:p>
      <text:p text:style-name="P40"><text:tab/><text:span text:style-name="T18">b = a * 4;</text:span></text:p>
      <text:p text:style-name="P40"><text:tab/><text:span text:style-name="T18">*/</text:span></text:p>
      <text:p text:style-name="P40"/>
      <text:h text:style-name="Heading_20_5" text:outline-level="5" text:is-list-header="true"><text:bookmark-start text:name="__RefHeading___Toc1271_1915522117"/>ローカル変数<text:bookmark-end text:name="__RefHeading___Toc1271_1915522117"/></text:h>
      <text:p text:style-name="P40"><text:s text:c="4"/>値を格納するもので特に型指定の必要はなくて値としては実数と文字列が使える</text:p>
      <text:p text:style-name="P40"><text:s text:c="4"/>数値と文字列を足すと文字列として結合する(日本語可))</text:p>
      <text:p text:style-name="P40"><text:tab/>a = 3;</text:p>
      <text:p text:style-name="P40"><text:tab/>b = "abcd";</text:p>
      <text:p text:style-name="P40"><text:tab/>c = a + b;</text:p>
      <text:p text:style-name="P40"><text:tab/>print(c); <text:s text:c="3"/>→ <text:s/>"3<text:span text:style-name="T19">abcd</text:span>"</text:p>
      <text:p text:style-name="P40"/>
      <text:p text:style-name="P40"><text:tab/>住所 = <text:span text:style-name="T20">"東京都"</text:span>;<text:line-break/><text:tab/>println(住所); <text:tab/><text:tab/>→ <text:s/>東京都</text:p>
      <text:p text:style-name="P40"/>
      <text:h text:style-name="P46" text:outline-level="5" text:is-list-header="true"><text:bookmark-start text:name="__RefHeading___Toc1271_1915522117 Copy 1"/>グローバル変数<text:bookmark-end text:name="__RefHeading___Toc1271_1915522117 Copy 1"/></text:h>
      <text:p text:style-name="P47"><text:s text:c="4"/>変数名の先頭が “<text:span text:style-name="T15">g_” で始まるものはグローバル変数となる</text:span></text:p>
      <text:p text:style-name="P47"><text:tab/><text:span text:style-name="T8">g_val = 1;</text:span></text:p>
      <text:p text:style-name="P47"><text:tab/><text:span text:style-name="T8">val = 1;</text:span></text:p>
      <text:p text:style-name="P47"><text:tab/><text:span text:style-name="T8">inc();</text:span></text:p>
      <text:p text:style-name="P48"><text:span text:style-name="T2"><text:tab/></text:span>println(g_val, <text:span text:style-name="T20">", "</text:span>, val); <text:span text:style-name="T8"><text:s text:c="7"/>→　　　2, 1</text:span></text:p>
      <text:p text:style-name="P47"/>
      <text:p text:style-name="P47"><text:tab/><text:span text:style-name="T8">inc() { </text:span></text:p>
      <text:p text:style-name="P49"><text:tab/> <text:s text:c="3"/>g_val++;</text:p>
      <text:p text:style-name="P47"><text:tab/> <text:s text:c="3"/><text:span text:style-name="T8">val++;</text:span></text:p>
      <text:p text:style-name="P49"><text:soft-page-break/><text:tab/> }</text:p>
      <text:p text:style-name="P47"/>
      <text:h text:style-name="Heading_20_5" text:outline-level="5" text:is-list-header="true"><text:bookmark-start text:name="__RefHeading___Toc1273_1915522117"/>配列<text:bookmark-end text:name="__RefHeading___Toc1273_1915522117"/></text:h>
      <text:p text:style-name="P40"><text:s text:c="4"/>複数のデータをまとめて扱うもので[ ]の中の数値を変えて値を格納する</text:p>
      <text:p text:style-name="P40"><text:s text:c="4"/>配列のインデックスには文字列も使用できる。</text:p>
      <text:p text:style-name="P40">　配列の大きさは設定する必要はなく、配列にデータを入れることによって追加されていく。</text:p>
      <text:p text:style-name="P40"/>
      <text:p text:style-name="P40"><text:tab/>a[0] = 10;</text:p>
      <text:p text:style-name="P40"><text:tab/>a[1] = 20;</text:p>
      <text:p text:style-name="P40"><text:tab/>a[2] = 30;</text:p>
      <text:p text:style-name="P40"><text:tab/>a["apple"] = 10;</text:p>
      <text:p text:style-name="P50"/>
      <text:p text:style-name="P50"><text:s text:c="4"/>値をまとめて設定するときは <text:span text:style-name="T21">{ } で括ってカンマ区切りで入力する</text:span></text:p>
      <text:p text:style-name="P50"><text:s text:c="4"/>配列のインデックスには文字列も使用でき、値も文字列と数値の混在も可能</text:p>
      <text:p text:style-name="P50"><text:s text:c="4"/>一括で値を設定する時は配列のインデックスは０から始まる</text:p>
      <text:p text:style-name="P50"/>
      <text:p text:style-name="P40"><text:tab/>a[] = { 10, 20, 30 };</text:p>
      <text:p text:style-name="P51"><text:tab/>a[] = { “name”, 18, “men”};</text:p>
      <text:p text:style-name="P40"><text:tab/><text:span text:style-name="T8">println(a[0], ”,”, a[1], ”,”, a[2]);<text:tab/>→ </text:span><text:span text:style-name="T21">name, 18, men</text:span></text:p>
      <text:p text:style-name="P40"/>
      <text:h text:style-name="Heading_20_5" text:outline-level="5" text:is-list-header="true"><text:bookmark-start text:name="__RefHeading___Toc1740_1554373789"/>2次元配列<text:bookmark-end text:name="__RefHeading___Toc1740_1554373789"/></text:h>
      <text:p text:style-name="P40">　2次元配列に一括でデータを設定する場合には <text:span text:style-name="T8">{ } を２重に囲って行う。</text:span></text:p>
      <text:p text:style-name="P40">　</text:p>
      <text:p text:style-name="P40"><text:tab/>a[,] = { { 1, 2, 3}, {10, 20, 30} };</text:p>
      <text:p text:style-name="P47"><text:tab/><text:span text:style-name="T8">println(a[1,0], </text:span><text:span text:style-name="T20">" , "</text:span><text:span text:style-name="T8">, a[1,1], </text:span><text:span text:style-name="T20">" , "</text:span><text:span text:style-name="T8">, a[1,2]);<text:tab/>→ 10, 20, 30</text:span></text:p>
      <text:p text:style-name="P40"/>
      <text:p text:style-name="P49">行ごとに設定する場合</text:p>
      <text:p text:style-name="P49"><text:tab/>a[2,] = { <text:s/>100, 200, 300 };</text:p>
      <text:p text:style-name="P47"><text:tab/>for (i = <text:span text:style-name="T22">0</text:span>; i &lt; count(a[<text:span text:style-name="T22">2</text:span>,]); i++)<text:line-break/><text:tab/><text:tab/>print(a[<text:span text:style-name="T22">2</text:span>,i], <text:span text:style-name="T20">" , "</text:span>); <text:tab/><text:tab/><text:tab/>→ <text:span text:style-name="T8">100, 200, 300</text:span></text:p>
      <text:p text:style-name="P47"/>
      <text:p text:style-name="P52">配列のインデックスに文字列を使用</text:p>
      <text:p text:style-name="P47"><text:tab/>person[<text:span text:style-name="T20">"yamada"</text:span>,] = { <text:span text:style-name="T20">"tarou"</text:span>, <text:span text:style-name="T22">68</text:span>, <text:span text:style-name="T20">"men"</text:span> };<text:line-break/><text:tab/>println(person[<text:span text:style-name="T20">"yamada"</text:span>,<text:span text:style-name="T22">0</text:span>], <text:span text:style-name="T20">","</text:span>, person[<text:span text:style-name="T20">"yamada"</text:span>,<text:span text:style-name="T22">1</text:span>], <text:span text:style-name="T20">","</text:span>, person[<text:span text:style-name="T20">"yamada"</text:span>,<text:span text:style-name="T22">2</text:span>],);</text:p>
      <text:p text:style-name="P47"><text:tab/><text:tab/><text:tab/><text:tab/><text:tab/> <text:tab/><text:tab/>→ <text:span text:style-name="T23">tarou</text:span><text:span text:style-name="T21">, </text:span><text:span text:style-name="T23">68</text:span><text:span text:style-name="T21">, men</text:span></text:p>
      <text:p text:style-name="P47"/>
      <text:p text:style-name="P47"><text:tab/>person[<text:span text:style-name="T20">"山田"</text:span>, <text:span text:style-name="T20">"名"</text:span>] = <text:span text:style-name="T20">"太郎"</text:span>;<text:line-break/><text:tab/>person[<text:span text:style-name="T20">"山田"</text:span>, <text:span text:style-name="T20">"年齢"</text:span>] = <text:span text:style-name="T22">68</text:span>;<text:line-break/><text:tab/>person[<text:span text:style-name="T20">"山田"</text:span>, <text:span text:style-name="T20">"性別"</text:span>] = <text:span text:style-name="T20">"男"</text:span>;<text:line-break/><text:tab/>println(person[<text:span text:style-name="T20">"山田"</text:span>, <text:span text:style-name="T20">"名"</text:span>]);<text:tab/><text:tab/><text:tab/>→ <text:s/>太郎<text:line-break/><text:line-break/><text:tab/>item[] = { <text:span text:style-name="T20">"名"</text:span>, <text:span text:style-name="T20">"年齢"</text:span>, <text:span text:style-name="T20">"性別"</text:span> };<text:line-break/><text:tab/>for (i = <text:span text:style-name="T22">0</text:span>; i &lt; count(item[]); i++) {<text:line-break/><text:tab/><text:tab/>print(person[<text:span text:style-name="T20">"山田"</text:span>,item[i]], <text:span text:style-name="T20">" "</text:span>);<text:line-break/><text:tab/>} <text:tab/><text:tab/><text:tab/><text:tab/><text:tab/><text:tab/>→　太郎 68 男 　</text:p>
      <text:p text:style-name="P47"/>
      <text:h text:style-name="Heading_20_5" text:outline-level="5" text:is-list-header="true"><text:bookmark-start text:name="__RefHeading___Toc1275_1915522117"/><text:soft-page-break/>演算子<text:bookmark-end text:name="__RefHeading___Toc1275_1915522117"/></text:h>
      <text:p text:style-name="P40"><text:s text:c="4"/>数式を処理するための演算子</text:p>
      <text:p text:style-name="P40"><text:tab/>+ <text:s/>: 加算 <text:tab/>a = 2 + 3;</text:p>
      <text:p text:style-name="P40"><text:tab/>- <text:s/>: <text:s/>減算 <text:tab/>a = 3 – 2;</text:p>
      <text:p text:style-name="P40"><text:tab/>* : <text:s/>乗算 <text:tab/>a = 2 * 3;</text:p>
      <text:p text:style-name="P40"><text:tab/>/ : <text:s text:c="2"/>除算 <text:tab/>a = 2 / 3;</text:p>
      <text:p text:style-name="P40"><text:tab/>% : <text:s/>剰余 <text:tab/>a = 2 % 3;<text:tab/><text:span text:style-name="T24">( 2 / 3 の余り→ </text:span><text:span text:style-name="T25">2</text:span><text:span text:style-name="T24">)</text:span></text:p>
      <text:p text:style-name="P40"><text:tab/>^ <text:s/>: べき乗<text:tab/>a = 2 ^ 3;<text:tab/><text:span text:style-name="T24">( 2</text:span><text:span text:style-name="T26">3</text:span><text:span text:style-name="T24"> →８)</text:span></text:p>
      <text:p text:style-name="P40"/>
      <text:h text:style-name="Heading_20_5" text:outline-level="5" text:is-list-header="true"><text:bookmark-start text:name="__RefHeading___Toc1277_1915522117"/>複合演算子<text:bookmark-end text:name="__RefHeading___Toc1277_1915522117"/></text:h>
      <text:p text:style-name="P40"><text:s text:c="4"/>2つの演算子を組み合わせて演算をおこなう</text:p>
      <text:p text:style-name="P40"><text:tab/>+= <text:s/>: <text:s/>a += 3;<text:tab/>(a = a + 3 と同じ) <text:s/></text:p>
      <text:p text:style-name="P40"><text:tab/>-= <text:s text:c="2"/>: <text:s/>a -= 3;<text:tab/>(a = a - 3 と同じ)</text:p>
      <text:p text:style-name="P40"><text:tab/>*= <text:s/>: <text:s/>a *= 3;<text:tab/>(a = a * 3 と同じ)</text:p>
      <text:p text:style-name="P40"><text:tab/>/= <text:s text:c="2"/>: <text:s/>a /= 3;<text:tab/>(a = a / 3 と同じ)</text:p>
      <text:p text:style-name="P40"><text:tab/>%= : <text:s/>a %= 3;<text:tab/>(a = a % 3 と同じ)</text:p>
      <text:p text:style-name="P40"><text:tab/>^= <text:s/>: <text:s/>a ^= 3;<text:tab/>(a = a ^ 3 と同じ)</text:p>
      <text:p text:style-name="P40"><text:tab/>++ : <text:s text:c="2"/>a++;<text:tab/>インクリメント(a = a + 1 と同じ)</text:p>
      <text:p text:style-name="P40"><text:tab/>-- <text:s text:c="2"/>: <text:s text:c="2"/>a--; <text:s text:c="7"/>デクリメント(a = a – 1 と同じ)</text:p>
      <text:p text:style-name="P40"/>
      <text:h text:style-name="Heading_20_5" text:outline-level="5"><text:bookmark-start text:name="__RefHeading___Toc1279_1915522117"/>比較演算子<text:bookmark-end text:name="__RefHeading___Toc1279_1915522117"/></text:h>
      <text:p text:style-name="P40"><text:s text:c="4"/>条件文の中で２つの値を比較する演算子(<text:a xlink:type="simple" xlink:href="mailto:if2@y" text:style-name="Internet_20_link" text:visited-style-name="Visited_20_Internet_20_Link">if</text:a>文, while文, for 文の条件文で使用)</text:p>
      <text:p text:style-name="P40">　条件文の中に数値や文字が設定された場合は常に <text:span text:style-name="T25">true として処理される。</text:span></text:p>
      <text:p text:style-name="P40"><text:tab/>==　: 等しい</text:p>
      <text:p text:style-name="P40"><text:tab/>!= <text:s text:c="3"/>: <text:s/>等しくない</text:p>
      <text:p text:style-name="P40"><text:tab/>&lt; <text:s text:c="4"/>: <text:s text:c="2"/>小さい</text:p>
      <text:p text:style-name="P40"><text:tab/>&gt; <text:s text:c="4"/>: <text:s text:c="3"/>大きい</text:p>
      <text:p text:style-name="P40"><text:tab/>&lt;= <text:s text:c="2"/>: <text:s text:c="2"/>小さいか等しい </text:p>
      <text:p text:style-name="P40"><text:tab/>&gt;= <text:s text:c="2"/>: <text:s text:c="2"/>大きいか等しい</text:p>
      <text:p text:style-name="P40"><text:tab/>if (a == b) print(a);</text:p>
      <text:p text:style-name="P40"/>
      <text:p text:style-name="P53">　条件文の中に数値や文字が設定された場合は常に <text:span text:style-name="T25">true として処理される。</text:span></text:p>
      <text:p text:style-name="P53"><text:tab/>if (<text:span text:style-name="T25">1</text:span>) println(<text:span text:style-name="T20">"true"</text:span>); else println(<text:span text:style-name="T20">"false"</text:span>); <text:tab/>→ <text:span text:style-name="T25">true</text:span></text:p>
      <text:p text:style-name="P53">　数値の前に ! をつけると <text:span text:style-name="T25">false となる</text:span></text:p>
      <text:p text:style-name="P53"><text:tab/>if (!<text:span text:style-name="T27">1</text:span>) println(<text:span text:style-name="T20">"true"</text:span>); else println(<text:span text:style-name="T20">"false"</text:span>); <text:tab/>→ <text:s/><text:span text:style-name="T25">false</text:span></text:p>
      <text:p text:style-name="P53"/>
      <text:p text:style-name="P54">論理演算子</text:p>
      <text:p text:style-name="P40"><text:s text:c="4"/>比較演算子の結果を演算する</text:p>
      <text:p text:style-name="P40"><text:tab/>&amp;&amp; <text:s/>: a &amp;&amp; b<text:tab/> <text:s/>aかつb</text:p>
      <text:p text:style-name="P40"><text:tab/>|| <text:s text:c="6"/>: a || b<text:tab/> <text:s/>aまたはb</text:p>
      <text:p text:style-name="P40"><text:tab/>! <text:s text:c="6"/>: <text:s/>!a<text:tab/> <text:s/>aではない</text:p>
      <text:p text:style-name="P40"/>
      <text:p text:style-name="P40"><text:soft-page-break/>※ 論理演算子と比較演算子が混在する場合、優先順位がつかないので括弧をつけて優先順位をつける</text:p>
      <text:p text:style-name="P40"><text:s text:c="4"/>a &gt; 10 &amp;&amp; a &lt; 20 <text:s/>→ <text:s/>(a &gt; 10) &amp;&amp; (a &lt; 20)</text:p>
      <text:p text:style-name="P40"/>
      <text:p text:style-name="P40"><text:tab/>a = <text:span text:style-name="T22">5</text:span>;<text:line-break/><text:tab/>if ((<text:span text:style-name="T22">4</text:span> &lt; a) &amp;&amp; (a &lt; <text:span text:style-name="T22">8</text:span>))<text:line-break/><text:tab/> <text:s text:c="3"/>println(<text:span text:style-name="T20">"5以上7以下"</text:span>);<text:line-break/><text:tab/>else<text:line-break/><text:tab/> <text:s text:c="3"/>println(<text:span text:style-name="T20">"4以下か8以上"</text:span>); </text:p>
      <text:p text:style-name="P40"><text:tab/><text:tab/><text:tab/><text:tab/><text:tab/><text:tab/><text:tab/>→ <text:s/>5以上7以下</text:p>
      <text:p text:style-name="P40"/>
      <text:h text:style-name="Heading_20_5" text:outline-level="5" text:is-list-header="true"><text:bookmark-start text:name="__RefHeading___Toc1281_1915522117"/>制御文<text:bookmark-end text:name="__RefHeading___Toc1281_1915522117"/></text:h>
      <text:p text:style-name="P40"><text:s text:c="4"/>if文 <text:s text:c="4"/>: 条件によって分岐させる</text:p>
      <text:p text:style-name="P40"><text:tab/> <text:s text:c="5"/>実行分が複数の場合は <text:span text:style-name="T28">{ } で囲む必要があるが、単独の場合は省略も可能</text:span></text:p>
      <text:p text:style-name="P40"><text:s text:c="8"/>if (条件) { 実行文; } [ else { 実行文; }]</text:p>
      <text:p text:style-name="P40"/>
      <text:p text:style-name="P55"><text:span text:style-name="T2"><text:tab/></text:span><text:span text:style-name="T29">if</text:span> (a &gt; b) <text:span text:style-name="T30">println</text:span>(a); <text:tab/><text:tab/><text:span text:style-name="T28">aよりbが大きければaの値を表示</text:span></text:p>
      <text:p text:style-name="P55"/>
      <text:p text:style-name="P56"><text:tab/><text:span text:style-name="T29">if</text:span> (a &gt; b) <text:span text:style-name="T30">println</text:span>(a);<text:tab/><text:tab/><text:span text:style-name="T28">aよりbが大きければaの値を表示</text:span><text:line-break/><text:tab/><text:span text:style-name="T29">else</text:span> <text:span text:style-name="T30">println</text:span>(b); <text:tab/><text:tab/>そうでなければ <text:span text:style-name="T28">b の値を表示</text:span></text:p>
      <text:p text:style-name="P56"/>
      <text:p text:style-name="P56"><text:tab/><text:span text:style-name="T29">if</text:span> (a &gt; b) {</text:p>
      <text:p text:style-name="P56"><text:tab/> <text:s text:c="3"/><text:span text:style-name="T30">println</text:span>(a);<text:tab/><text:tab/><text:tab/><text:span text:style-name="T28">aよりbが大きければaの値を表示</text:span></text:p>
      <text:p text:style-name="P56"><text:tab/>} <text:span text:style-name="T29">else</text:span> <text:span text:style-name="T29">if</text:span> ( a == b) {</text:p>
      <text:p text:style-name="P56"><text:tab/> <text:s text:c="3"/><text:span text:style-name="T30">println</text:span>(a);<text:tab/><text:tab/><text:tab/><text:span text:style-name="T28">a とbが同じときはaと bの値を表示</text:span></text:p>
      <text:p text:style-name="P56"><text:tab/> <text:s text:c="3"/><text:span text:style-name="T30">println</text:span>(b);</text:p>
      <text:p text:style-name="P56"><text:tab/>} <text:span text:style-name="T29">else</text:span> {</text:p>
      <text:p text:style-name="P56"><text:tab/> <text:s text:c="4"/><text:span text:style-name="T30">println</text:span>(b); <text:tab/><text:tab/>そうでなければ <text:span text:style-name="T28">b の値を表示</text:span></text:p>
      <text:p text:style-name="P56"><text:tab/>} </text:p>
      <text:p text:style-name="P40"/>
      <text:p text:style-name="P40"/>
      <text:p text:style-name="P40"/>
      <text:p text:style-name="P40"><text:s text:c="4"/>while文 <text:s/>: 条件に入っている間繰り返す</text:p>
      <text:p text:style-name="P40"><text:s text:c="8"/>while (条件) { 実行文; }</text:p>
      <text:p text:style-name="P40"/>
      <text:p text:style-name="P40"><text:tab/>n = <text:span text:style-name="T22">0</text:span>;<text:line-break/><text:tab/><text:span text:style-name="T29">while</text:span> (n &lt; <text:span text:style-name="T22">10</text:span>) {<text:line-break/><text:tab/> <text:s text:c="3"/>n = n + <text:span text:style-name="T22">1</text:span>;<text:line-break/><text:tab/> <text:s text:c="3"/><text:span text:style-name="T30">print</text:span>(n, <text:span text:style-name="T20">" "</text:span>);<text:line-break/><text:tab/>} </text:p>
      <text:p text:style-name="P40"><text:tab/><text:tab/><text:tab/><text:tab/><text:tab/>→ <text:s/>1 2 3 4 5 6 7 8 9 10 </text:p>
      <text:p text:style-name="P40"/>
      <text:p text:style-name="P40"><text:tab/>//<text:tab/>配列の中から<text:span text:style-name="T31">s 以上の数を検索</text:span></text:p>
      <text:p text:style-name="P40"><text:tab/>a[] = { <text:span text:style-name="T22">6</text:span>, <text:span text:style-name="T22">9</text:span>, <text:span text:style-name="T22">12</text:span>, <text:span text:style-name="T22">7</text:span>, <text:span text:style-name="T22">2</text:span>, <text:span text:style-name="T22">23</text:span>, <text:span text:style-name="T22">10</text:span>, <text:span text:style-name="T22">4</text:span> };<text:line-break/><text:tab/>s = <text:span text:style-name="T22">15</text:span>;<text:line-break/><text:tab/>n = <text:span text:style-name="T22">0</text:span>;<text:line-break/><text:tab/><text:span text:style-name="T29">while</text:span> ((n &lt; <text:span text:style-name="T30">count</text:span>(a[])) &amp;&amp; (a[n++] &lt; s)) ;<text:tab/><text:tab/><text:line-break/><text:tab/><text:span text:style-name="T30">println</text:span>(n, <text:span text:style-name="T20">" "</text:span>, a[n]);<text:line-break/><text:soft-page-break/><text:tab/><text:tab/><text:tab/><text:tab/><text:tab/>→ <text:s/><text:span text:style-name="T31">6 10<text:tab/>(検索された配列の次の値を表示)</text:span><text:line-break/><text:tab/>n = -<text:span text:style-name="T22">1</text:span>;<text:line-break/><text:tab/><text:span text:style-name="T29">while</text:span> ((n &lt; <text:span text:style-name="T30">count</text:span>(a[])) &amp;&amp; (a[++n] &lt; s)) ;<text:line-break/><text:tab/><text:span text:style-name="T30">println</text:span>(n, <text:span text:style-name="T20">" "</text:span>, a[n]); </text:p>
      <text:p text:style-name="P40"><text:tab/><text:tab/><text:tab/><text:tab/><text:tab/>→ <text:s/><text:span text:style-name="T31">5 23<text:tab/>(検索された値を表示)</text:span></text:p>
      <text:p text:style-name="P40"/>
      <text:p text:style-name="P40"><text:s text:c="4"/>for文 <text:s text:c="3"/>: 初期値、条件、増分を指定して繰り返す</text:p>
      <text:p text:style-name="P40"><text:s text:c="8"/>for (初期値; 条件; 増分) { 実行文; }</text:p>
      <text:p text:style-name="P40"/>
      <text:p text:style-name="P40"><text:span text:style-name="T29"><text:tab/>for</text:span> (i = <text:span text:style-name="T22">0</text:span>; i &lt; <text:span text:style-name="T32">1</text:span><text:span text:style-name="T22">0</text:span>; i++)<text:line-break/><text:tab/> <text:s text:c="3"/><text:span text:style-name="T30">print</text:span>(i, <text:span text:style-name="T20">" "</text:span>); </text:p>
      <text:p text:style-name="P40"><text:tab/><text:tab/><text:tab/><text:tab/><text:tab/>→<text:tab/>0 1 2 3 4 5 6 7 8 9</text:p>
      <text:p text:style-name="P40"/>
      <text:p text:style-name="P40"><text:span text:style-name="T29"><text:tab/>for</text:span> (i = <text:span text:style-name="T22">0</text:span>; i &lt; <text:span text:style-name="T22">10</text:span>; i += <text:span text:style-name="T22">2</text:span>)<text:tab/>増分を2とした場合<text:line-break/><text:tab/> <text:s text:c="3"/><text:span text:style-name="T30">print</text:span>(i, <text:span text:style-name="T20">" "</text:span>); </text:p>
      <text:p text:style-name="P40"><text:tab/><text:tab/><text:tab/><text:tab/><text:tab/>→<text:tab/>0 2 4 6 8 </text:p>
      <text:p text:style-name="P40"/>
      <text:p text:style-name="P40"/>
      <text:p text:style-name="P40"><text:s text:c="4"/>return文 : 処理を中断して呼出し元に戻る</text:p>
      <text:p text:style-name="P40"><text:s text:c="8"/>return (戻り値);</text:p>
      <text:p text:style-name="P40"/>
      <text:p text:style-name="P40"><text:tab/><text:span text:style-name="T32">add(a,b) {</text:span></text:p>
      <text:p text:style-name="P40"><text:tab/> <text:s text:c="3"/><text:span text:style-name="T33">return</text:span><text:span text:style-name="T32"> a+b;</text:span></text:p>
      <text:p text:style-name="P40"><text:tab/><text:span text:style-name="T32">}</text:span></text:p>
      <text:p text:style-name="P40"/>
      <text:p text:style-name="P40"><text:tab/><text:span text:style-name="T34">max(a,b) {</text:span></text:p>
      <text:p text:style-name="P57"><text:tab/> <text:s text:c="3"/><text:span text:style-name="T34">if (a&gt;b)</text:span></text:p>
      <text:p text:style-name="P57"><text:span text:style-name="T34"><text:tab/> <text:s text:c="7"/></text:span><text:span text:style-name="T35">return</text:span><text:span text:style-name="T34"> a;</text:span></text:p>
      <text:p text:style-name="P40"><text:tab/> <text:s text:c="3"/><text:span text:style-name="T34">else </text:span></text:p>
      <text:p text:style-name="P40"><text:tab/> <text:s text:c="7"/><text:span text:style-name="T35">return</text:span><text:span text:style-name="T34"> b;</text:span></text:p>
      <text:p text:style-name="P40"><text:tab/><text:span text:style-name="T34">}</text:span></text:p>
      <text:p text:style-name="P40"/>
      <text:p text:style-name="P40"><text:s text:c="4"/>break文 <text:s/>: ループの中断</text:p>
      <text:p text:style-name="P40"/>
      <text:p text:style-name="P40"><text:tab/><text:span text:style-name="T34">n = 0;</text:span></text:p>
      <text:p text:style-name="P40"><text:tab/><text:span text:style-name="T34">while (1) {<text:tab/><text:tab/><text:tab/>//　条件文に数値を入れると常に条件が成立</text:span></text:p>
      <text:p text:style-name="P40"><text:tab/> <text:s text:c="3"/><text:span text:style-name="T34">if(10 &lt;n) </text:span><text:span text:style-name="T35">break</text:span><text:span text:style-name="T34">;</text:span></text:p>
      <text:p text:style-name="P40"><text:tab/> <text:s text:c="3"/><text:span text:style-name="T34">n++;</text:span></text:p>
      <text:p text:style-name="P40"><text:tab/><text:span text:style-name="T34">}</text:span></text:p>
      <text:p text:style-name="P40"/>
      <text:p text:style-name="P40"><text:s text:c="4"/>continue文 <text:s text:c="2"/>: ループの先頭に戻る</text:p>
      <text:p text:style-name="P40"/>
      <text:p text:style-name="P40"><text:tab/>n = <text:span text:style-name="T22">0</text:span>;<text:line-break/><text:tab/><text:span text:style-name="T36">while</text:span> (n++ &lt; <text:span text:style-name="T22">10</text:span>) {<text:line-break/><text:tab/> <text:s text:c="3"/><text:span text:style-name="T36">if</text:span>(n &lt; <text:span text:style-name="T22">6</text:span>) <text:span text:style-name="T37">continue</text:span>;<text:tab/><text:tab/><text:span text:style-name="T38">6未満の場合は表示しない</text:span><text:line-break/><text:tab/> <text:s text:c="3"/><text:span text:style-name="T30">print</text:span>(n,<text:span text:style-name="T20">" "</text:span>);<text:line-break/><text:tab/>} </text:p>
      <text:p text:style-name="P40"><text:tab/><text:tab/><text:tab/><text:tab/><text:tab/>→ 6 7 8 9 10 </text:p>
      <text:p text:style-name="P40"/>
      <text:p text:style-name="P40"><text:soft-page-break/><text:s text:c="4"/><text:span text:style-name="T15">exit 文 : プログラムを終了させる</text:span></text:p>
      <text:p text:style-name="P40"/>
      <text:p text:style-name="P40"><text:tab/><text:span text:style-name="T38">a= 1;</text:span></text:p>
      <text:p text:style-name="P40"><text:tab/><text:span text:style-name="T38">b = a+2;</text:span></text:p>
      <text:p text:style-name="P40"><text:tab/><text:span text:style-name="T39">exit</text:span><text:span text:style-name="T38">;<text:tab/><text:tab/><text:tab/><text:tab/>ここでプログラムを打ち切る</text:span></text:p>
      <text:p text:style-name="P40"><text:tab/><text:span text:style-name="T38">println(b);</text:span></text:p>
      <text:p text:style-name="P40"/>
      <text:h text:style-name="Heading_20_5" text:outline-level="5" text:is-list-header="true"><text:bookmark-start text:name="__RefHeading___Toc1283_1915522117"/>関数の定義<text:bookmark-end text:name="__RefHeading___Toc1283_1915522117"/></text:h>
      <text:p text:style-name="P40"><text:s text:c="4"/>複数の文をまとめて実行する仕組み(日本語可)</text:p>
      <text:p text:style-name="P40"><text:s text:c="4"/>関数名(引数1, ...) { 実行文; ... return 返値; }</text:p>
      <text:p text:style-name="P40"><text:s text:c="8"/>add(a, b) {</text:p>
      <text:p text:style-name="P40"><text:s text:c="12"/>c = a + b;</text:p>
      <text:p text:style-name="P40"><text:s text:c="12"/>return c;</text:p>
      <text:p text:style-name="P40"><text:s text:c="8"/>}</text:p>
      <text:p text:style-name="P40"><text:s text:c="4"/>呼出し側</text:p>
      <text:p text:style-name="P40"><text:s text:c="8"/>s = 2;</text:p>
      <text:p text:style-name="P40"><text:s text:c="8"/>t = 3;</text:p>
      <text:p text:style-name="P40"><text:s text:c="8"/>sum = add(s, t);</text:p>
      <text:p text:style-name="P40"><text:s text:c="4"/>引数に配列を使う場合</text:p>
      <text:p text:style-name="P40"><text:s text:c="8"/>sum(a[]) {</text:p>
      <text:p text:style-name="P40"><text:s text:c="12"/>size = arraySize(a[]);</text:p>
      <text:p text:style-name="P40"><text:s text:c="12"/>sum = 0;</text:p>
      <text:p text:style-name="P40"><text:s text:c="12"/>for (i = 0; i &lt; size; i++) {</text:p>
      <text:p text:style-name="P40"><text:s text:c="16"/>sum += a[i];</text:p>
      <text:p text:style-name="P40"><text:s text:c="12"/>}</text:p>
      <text:p text:style-name="P40"><text:s text:c="12"/>return sum;</text:p>
      <text:p text:style-name="P40"><text:s text:c="8"/>}</text:p>
      <text:p text:style-name="P40"><text:s text:c="4"/>呼出し側</text:p>
      <text:p text:style-name="P40"><text:s text:c="8"/>array[] = { 1, 2, 3, 4, 5 }</text:p>
      <text:p text:style-name="P40"><text:s text:c="8"/>total = sum(array[]);</text:p>
      <text:p text:style-name="P40"/>
      <text:h text:style-name="Heading_20_5" text:outline-level="5" text:is-list-header="true"><text:bookmark-start text:name="__RefHeading___Toc1285_1915522117"/>ディレクティブ<text:bookmark-end text:name="__RefHeading___Toc1285_1915522117"/></text:h>
      <text:p text:style-name="P58"><text:s text:c="4"/>#include<text:tab/>指定したスクリプトファイルを追加読み込みをおこなう。</text:p>
      <text:p text:style-name="P58"><text:tab/><text:tab/>作成した汎用の関数を使用するときに使う。</text:p>
      <text:p text:style-name="P40"><text:s text:c="4"/>#include “スクリプトファイル名”;</text:p>
      <text:p text:style-name="P40"><text:tab/>#include “scriptLib.sc”;</text:p>
      <text:p text:style-name="P40"><text:tab/>フルパスを指定しない場合には実行するスクリプトファイルと同じディレクトリが指定される。</text:p>
      <text:p text:style-name="P40"/>
      <text:h text:style-name="Heading_20_5" text:outline-level="5" text:is-list-header="true"><text:bookmark-start text:name="__RefHeading___Toc1287_1915522117"/>数式処理以外の関数<text:bookmark-end text:name="__RefHeading___Toc1287_1915522117"/></text:h>
      <text:p text:style-name="P40"><text:s text:c="4"/>print(a, b, "\n");<text:tab/><text:tab/>: コンソールに文字出力(Win版では出力ウィンドウに出力)</text:p>
      <text:p text:style-name="P59"><text:s text:c="4"/>print<text:span text:style-name="T17">ln</text:span>(a, b);<text:tab/><text:tab/>: <text:span text:style-name="T17">print と同じで末尾に改行コードがつく</text:span></text:p>
      <text:p text:style-name="P60"><text:s text:c="4"/><text:span text:style-name="T40">a = inKey();<text:tab/>: キー入力(1文字)</text:span></text:p>
      <text:p text:style-name="P60"><text:s text:c="4"/><text:span text:style-name="T40">sleep(n);<text:tab/>: 指定時間停止(約n m秒)</text:span></text:p>
      <text:p text:style-name="P61"><text:s text:c="4"/>cmd(command);<text:tab/><text:tab/>: Windowsコマンドの実行</text:p>
      <text:p text:style-name="P62"><text:tab/><text:tab/><text:tab/><text:tab/> <text:s text:c="2"/>ex. cmd(“dir”);, cmd("KScriptWinManual.pdf");</text:p>
      <text:p text:style-name="P63"><text:soft-page-break/></text:p>
      <text:h text:style-name="Heading_20_5" text:outline-level="5" text:is-list-header="true"><text:bookmark-start text:name="__RefHeading___Toc4264_3034306593"/>配列関数<text:span text:style-name="T41">(array.xxxx())</text:span><text:bookmark-end text:name="__RefHeading___Toc4264_3034306593"/></text:h>
      <text:p text:style-name="P40"><text:s text:c="4"/>c = <text:span text:style-name="T41">array.</text:span>contain(a[2]);<text:tab/><text:tab/>: 配列の有無(0:なし 1:あり)</text:p>
      <text:p text:style-name="P63"><text:s text:c="4"/>size = <text:span text:style-name="T41">array.</text:span>count(a[]);<text:tab/><text:tab/>: 配列のサイズ</text:p>
      <text:p text:style-name="P63"><text:s text:c="4"/>size = <text:span text:style-name="T41">array.</text:span>count(a[,]);<text:tab/><text:tab/>: 2次元配列の全体の数</text:p>
      <text:p text:style-name="P63"><text:s text:c="4"/>size = <text:span text:style-name="T41">array.</text:span>count(a[1,]);<text:tab/><text:tab/>: 2次元配列(2行目)の列数</text:p>
      <text:p text:style-name="P63"><text:s text:c="4"/>max = <text:span text:style-name="T41">array.</text:span>max(a[]);<text:tab/><text:tab/>: 配列の最大値</text:p>
      <text:p text:style-name="P63"><text:s text:c="4"/>min = <text:span text:style-name="T41">array.</text:span>min(a[,]);<text:tab/><text:tab/>: 配列の最小値</text:p>
      <text:p text:style-name="P63"><text:s text:c="4"/>sum = <text:span text:style-name="T41">array.</text:span>sum(a[]);<text:tab/><text:tab/>: 配列の合計</text:p>
      <text:p text:style-name="P63"><text:s text:c="4"/>ave = <text:span text:style-name="T41">array.</text:span>average(a[,]);<text:tab/><text:tab/>: 配列の平均</text:p>
      <text:p text:style-name="P63"><text:s text:c="4"/>vari = <text:span text:style-name="T41">array.</text:span>variance(a[]);<text:tab/>: 分散</text:p>
      <text:p text:style-name="P63"><text:s text:c="4"/>std = <text:span text:style-name="T41">array.</text:span>stdDeviation(a[]);<text:tab/>: 標準偏差</text:p>
      <text:p text:style-name="P63"><text:s text:c="4"/>cov = <text:span text:style-name="T41">array.</text:span>covariance(a[], b[]);<text:tab/>: 共分散</text:p>
      <text:p text:style-name="P63"><text:s text:c="4"/><text:span text:style-name="T24">corr = </text:span><text:span text:style-name="T41">array.</text:span>corrCoeff(x[],y[]); <text:tab/>: 配列の相関係数</text:p>
      <text:p text:style-name="P63"><text:s text:c="4"/><text:span text:style-name="T41">array.</text:span>clear(a[]);<text:tab/><text:tab/><text:tab/>: 配列をクリア</text:p>
      <text:p text:style-name="P63"><text:s text:c="4"/><text:span text:style-name="T41">array.</text:span>remove(a[],st[,ed]);<text:tab/><text:tab/>: 配列の要素削除(1次元のみ)</text:p>
      <text:p text:style-name="P63"><text:s text:c="4"/><text:span text:style-name="T41">array.</text:span>sort(a[]);<text:tab/><text:tab/><text:tab/>: 配列のソート(1次元のみ)</text:p>
      <text:p text:style-name="P63"><text:s text:c="4"/><text:span text:style-name="T41">array.</text:span>reverse(a[]);<text:tab/><text:tab/><text:tab/>: 配列の逆順化(1次元のみ)</text:p>
      <text:p text:style-name="P63"><text:s text:c="4"/><text:span text:style-name="T42">c[] = array.concat(a[],b[]);<text:tab/><text:tab/>: 配列の結合</text:span></text:p>
      <text:p text:style-name="P40"/>
      <text:h text:style-name="Heading_20_5" text:outline-level="5" text:is-list-header="true">マトリックス関数<text:span text:style-name="T41">(matrix.xxxx(), </text:span><text:span text:style-name="T43">2次元配列のみ</text:span><text:span text:style-name="T41">)</text:span></text:h>
      <text:p text:style-name="P40"><text:s text:c="4"/>a[,] = <text:span text:style-name="T41">m</text:span>atrix.<text:span text:style-name="T41">unit</text:span>(size);<text:tab/><text:tab/>: 単位行列</text:p>
      <text:p text:style-name="P40"><text:s text:c="4"/>d[,] = matrix.<text:span text:style-name="T41">t</text:span>ranspose(a[,]);<text:tab/>: 転置行列</text:p>
      <text:p text:style-name="P40"><text:s text:c="4"/>d[,] = matrix.<text:span text:style-name="T41">m</text:span>ulti(a[,], b[,]);<text:tab/>: 行列の積</text:p>
      <text:p text:style-name="P40"><text:s text:c="4"/>d[,] = matrix.<text:span text:style-name="T41">a</text:span>dd(a[,], b[,]);<text:tab/>: 行列の和</text:p>
      <text:p text:style-name="P40"><text:s text:c="4"/>d[,] = matrix.<text:span text:style-name="T41">i</text:span>nverse(a[,]);<text:tab/><text:tab/>: 逆行列 a^-1</text:p>
      <text:p text:style-name="P40"><text:s text:c="4"/>d[,] = <text:span text:style-name="T41">m</text:span>atrix.<text:span text:style-name="T41">copy</text:span>(a[,]);<text:tab/><text:tab/>: 行列のコピー</text:p>
      <text:p text:style-name="P40"/>
      <text:h text:style-name="Heading_20_5" text:outline-level="5" text:is-list-header="true"><text:bookmark-start text:name="__RefHeading___Toc1289_1915522117"/>ダイヤログ関数<text:bookmark-end text:name="__RefHeading___Toc1289_1915522117"/></text:h>
      <text:p text:style-name="P64"><text:span text:style-name="T24"><text:s text:c="4"/>a = </text:span>inputBox();<text:tab/><text:tab/><text:tab/>: 文字/数値入力ダイヤログ</text:p>
      <text:p text:style-name="P64"><text:s text:c="4"/><text:span text:style-name="T44">m[,] = inputBoxMulti(m[,]);<text:tab/>: 複数項目の文字列/数値入力ダイヤログ</text:span></text:p>
      <text:p text:style-name="P64"><text:s text:c="4"/>messageBox(outString[, title]);<text:tab/>: 文字列のダイヤログ表示</text:p>
      <text:p text:style-name="P64"><text:s text:c="4"/><text:span text:style-name="T45">n = menuSelect(menu[],title); <text:s text:c="7"/>: 選択メニューを表示して選択項目Noを返す</text:span></text:p>
      <text:p text:style-name="P64"/>
      <text:h text:style-name="Heading_20_5" text:outline-level="5" text:is-list-header="true"><text:bookmark-start text:name="__RefHeading___Toc4266_3034306593"/><text:span text:style-name="T46">2D</text:span>グラフィック関数(plot.xxxx(), graph.xxxx())<text:bookmark-end text:name="__RefHeading___Toc4266_3034306593"/></text:h>
      <text:p text:style-name="P64"><text:s text:c="4"/>plot.Window(left,bottom,right,top);<text:tab/>: 表示領域の設定",</text:p>
      <text:p text:style-name="P40"><text:s text:c="4"/>plot.Aspect(1);<text:tab/><text:tab/><text:tab/>: アスペクト比固定の設定(0(非固定)/1(固定))</text:p>
      <text:p text:style-name="P40"><text:s text:c="4"/>plot.Color("Blue");<text:tab/><text:tab/><text:tab/>: 要素の色設定</text:p>
      <text:p text:style-name="P40"><text:s text:c="4"/>plot.PointType("cross");<text:tab/><text:tab/>: 点種の設定("dot", "cross", "plus", "box", "circle", "triangle")</text:p>
      <text:p text:style-name="P40"><text:s text:c="4"/>plot.LineType("dash");<text:tab/><text:tab/>: 線種の設定("solid", "dash", "center", "phantom")"</text:p>
      <text:p text:style-name="P40"><text:soft-page-break/><text:s text:c="4"/>plot.PointSize(3);<text:tab/><text:tab/><text:tab/>: 点サイズの設定</text:p>
      <text:p text:style-name="P40"><text:s text:c="4"/>plot.LineThickness(2);<text:tab/><text:tab/>: 線の太さの設定</text:p>
      <text:p text:style-name="P40"><text:s text:c="4"/>plot.Point(x,y);<text:tab/><text:tab/><text:tab/>: 点の登録</text:p>
      <text:p text:style-name="P40"><text:s text:c="4"/>plot.Line(sx,sy,ex,ey);<text:tab/><text:tab/>: 線分の登録(始点x,y、終点x,y)</text:p>
      <text:p text:style-name="P40"><text:s text:c="4"/>plot.Arc(cx,cy,r[,sa][,ea]);<text:tab/><text:tab/>: 円弧の登録(中心x,中心y,半径[、始角][、終角])</text:p>
      <text:p text:style-name="P65"><text:s text:c="4"/>plot.Text(text,x,y[,size[,rot[,ha[,va]]]]);<text:tab/>: 文字列の登録(文字列,X座標,Y座標,サイズ,回転角,水平アライメント,垂直アライメント)</text:p>
      <text:p text:style-name="P66"><text:s text:c="4"/><text:span text:style-name="T47">plot.Disp();<text:tab/>: グラフィックデータを表示</text:span></text:p>
      <text:p text:style-name="P40"><text:s text:c="4"/>graph.Set(x[],y[][,Title]); <text:tab/><text:tab/>:グラフデータの設定(X[],Y[][,Title])</text:p>
      <text:p text:style-name="P40"><text:s text:c="4"/>graph.FontSize(5);<text:tab/><text:tab/><text:tab/>: グラフのフォントサイズの設定"</text:p>
      <text:p text:style-name="P40"/>
      <text:h text:style-name="Heading_20_5" text:outline-level="5" text:is-list-header="true"><text:bookmark-start text:name="__RefHeading___Toc4268_3034306593"/>3Dグラフィック関数(plot3D.xxxx())<text:bookmark-end text:name="__RefHeading___Toc4268_3034306593"/></text:h>
      <text:p text:style-name="P40"><text:s text:c="4"/>plot3D.setArea(min[],max[]); <text:tab/><text:tab/>3DViewの初期化と領域設定</text:p>
      <text:p text:style-name="P40"><text:s text:c="4"/>plot3D.setAxisFrame(axis,frame); <text:tab/>軸とフレームの表示(0:非表示/1:表示)</text:p>
      <text:p text:style-name="P40"><text:s text:c="4"/>plot3D.disp(); <text:tab/><text:tab/><text:tab/><text:tab/>要素の表示</text:p>
      <text:p text:style-name="P40"><text:s text:c="4"/>plot3D.setColor(\"Blue\"); <text:tab/><text:tab/><text:tab/>色の設定</text:p>
      <text:p text:style-name="P40"><text:s text:c="4"/>plot3D.plotTranslate(vec[]); <text:tab/><text:tab/>移動(移動量 vec[x/y/z])</text:p>
      <text:p text:style-name="P40"><text:s text:c="4"/>plot3D.plotRotate(angle,\"X\"); <text:tab/><text:tab/>回転(回転角度,回転軸 X/Y/Z軸)</text:p>
      <text:p text:style-name="P40"><text:s text:c="4"/>plot3D.plotScale(scale[]); <text:tab/><text:tab/><text:tab/>縮小拡大 (拡大率 scale[x/y/z])</text:p>
      <text:p text:style-name="P40"><text:s text:c="4"/>plot3D.plotReset(); <text:tab/><text:tab/><text:tab/>座標変換マトリックスをクリア</text:p>
      <text:p text:style-name="P40"><text:s text:c="4"/>plot3D.plotPush(); <text:tab/><text:tab/><text:tab/><text:tab/>座標変換マトリックスをスタックに保存</text:p>
      <text:p text:style-name="P40"><text:s text:c="4"/>plot3D.plotPop(); <text:tab/><text:tab/><text:tab/><text:tab/>座標変換マトリックスをスタックから戻す</text:p>
      <text:p text:style-name="P40"><text:s text:c="4"/>plot3D.plotPeekMulti(); <text:tab/><text:tab/><text:tab/>座標変換マトリックスにスタックの値をかける</text:p>
      <text:p text:style-name="P40"><text:s text:c="4"/>plot3D.plotLine(sp[x/y/z],ep[x/y/z]); <text:tab/>線分の設定</text:p>
      <text:p text:style-name="P40"><text:s text:c="4"/>plot3D.plotLines(plist[n,x/y/z]); <text:tab/><text:tab/>複数線分</text:p>
      <text:p text:style-name="P40"><text:s text:c="4"/>plot3D.plotPolyline(plist[n,x/y/z]); <text:tab/>ポリライン</text:p>
      <text:p text:style-name="P40"><text:s text:c="4"/>plot3D.plotPolyloop(plist[n,x/y/z]); <text:tab/>ポリラインループ</text:p>
      <text:p text:style-name="P40"><text:s text:c="4"/>plot3D.plotPolygon(plist[n,x/y/z]); <text:tab/>ポリゴン(塗潰し)</text:p>
      <text:p text:style-name="P40"><text:s text:c="4"/>plot3D.plotTrianges(plist[n,x/y/z]); <text:tab/>複数三角形(塗潰し)</text:p>
      <text:p text:style-name="P40"><text:s text:c="4"/>plot3D.plotTriangeStrip(plist[n,x/y/z]); <text:tab/>連続三角形</text:p>
      <text:p text:style-name="P40"><text:s text:c="4"/>plot3D.plotQuads(plist[n,x/y/z]); <text:tab/><text:tab/>複数四角形</text:p>
      <text:p text:style-name="P40"><text:s text:c="4"/>plot3D.plotQuadeStrip(plist[n,x/y/z]); <text:tab/>連続四角形</text:p>
      <text:p text:style-name="P40"><text:s text:c="4"/>plot3D.plotTriangeFan(plist[n,x/y/z]); <text:tab/>扇形の連続三角形</text:p>
      <text:p text:style-name="P40"><text:s text:c="4"/>plot3D.translate(pos[],vec[]); <text:tab/><text:tab/>3D座標の移動(3D座標,移動量)</text:p>
      <text:p text:style-name="P40"><text:s text:c="4"/>plot3D.rotate(pos[],cp[],angle,face); <text:tab/>3D座標の回転(3D座標,回転中心,回転角,回転軸)</text:p>
      <text:p text:style-name="P40"><text:s text:c="4"/>plot3D.scale(pos[],cp[],scale); <text:tab/><text:tab/>3D座標の拡大縮小(3D座標,拡大中心,拡大率)</text:p>
      <text:p text:style-name="P40"/>
      <text:p text:style-name="P40"/>
      <text:h text:style-name="P67" text:outline-level="2" text:is-list-header="true"><text:bookmark-start text:name="__RefHeading___Toc1160_1915522117 Copy 1 Copy 2 Copy 3"/>5. 算術関数<text:bookmark-end text:name="__RefHeading___Toc1160_1915522117 Copy 1 Copy 2 Copy 3"/></text:h>
      <text:p text:style-name="P68"/>
      <text:p text:style-name="P69"><text:bookmark-start text:name="__RefHeading___Toc1160_1915522117 Copy 1 Copy 2 Copy 2"/>数式で使用する関数<text:bookmark-end text:name="__RefHeading___Toc1160_1915522117 Copy 1 Copy 2 Copy 2"/></text:p>
      <text:p text:style-name="P69"/>
      <text:p text:style-name="P70"><text:span text:style-name="T2"><text:s text:c="4"/></text:span><text:span text:style-name="T24">pi = </text:span><text:span text:style-name="T2">PI;<text:tab/><text:tab/><text:tab/>: 円周率</text:span><text:span text:style-name="T24">(3.14..)</text:span></text:p>
      <text:p text:style-name="P40"><text:s text:c="4"/><text:span text:style-name="T24">e</text:span> <text:span text:style-name="T24">= </text:span>E;<text:tab/><text:tab/><text:tab/>: 自然対数の底<text:span text:style-name="T24">(2.71..)</text:span></text:p>
      <text:p text:style-name="P40"><text:s text:c="4"/><text:span text:style-name="T24">rad = </text:span>RAD(<text:span text:style-name="T24">deg</text:span>);<text:tab/><text:tab/>: 度をラジアンに変換</text:p>
      <text:p text:style-name="P40"><text:s text:c="4"/><text:span text:style-name="T24">deg = </text:span>DEG(<text:span text:style-name="T24">rad</text:span>);<text:tab/><text:tab/>: ラジアンを度に変換</text:p>
      <text:p text:style-name="P40"><text:s text:c="4"/><text:span text:style-name="T24">hour = </text:span>deg2hour(<text:span text:style-name="T24">deg</text:span>);<text:tab/>: 度を時単位に変換<text:span text:style-name="T24">(360° →24時間)</text:span></text:p>
      <text:p text:style-name="P40"><text:s text:c="4"/><text:span text:style-name="T24">deg <text:s/>= </text:span>hour2deg(<text:span text:style-name="T24">hour</text:span>);<text:tab/>: 時単位を度に変換<text:span text:style-name="T24">(1時間 → 15°)</text:span></text:p>
      <text:p text:style-name="P40"><text:s text:c="4"/><text:span text:style-name="T24">hour = </text:span>rad2hour(<text:span text:style-name="T24">rad</text:span>);<text:tab/>: ラジアンを時単位に変換<text:span text:style-name="T24">(PI → 12時間)</text:span></text:p>
      <text:p text:style-name="P40"><text:s text:c="4"/><text:span text:style-name="T24">rad = </text:span>hour2rad(<text:span text:style-name="T24">hour</text:span>);<text:tab/>: 時単位をラジアンに変換<text:span text:style-name="T24">(12時間 → PI)</text:span></text:p>
      <text:p text:style-name="P40"><text:s text:c="4"/><text:span text:style-name="T24">a = </text:span>mod(x,y);<text:tab/><text:tab/>: 剰余(<text:span text:style-name="T24">x / yの</text:span>余り<text:span text:style-name="T24">)</text:span></text:p>
      <text:p text:style-name="P40"><text:s text:c="4"/><text:span text:style-name="T24">a = </text:span>pow(x,y);<text:tab/><text:tab/>: 累乗 <text:span text:style-name="T24">(x</text:span><text:span text:style-name="T26">y</text:span><text:span text:style-name="T24">)</text:span></text:p>
      <text:p text:style-name="P40"><text:s text:c="4"/><text:span text:style-name="T24">a = </text:span>max(x,y);<text:tab/><text:tab/>: <text:s/><text:span text:style-name="T24">xとyの</text:span>大きい方</text:p>
      <text:p text:style-name="P64"><text:s text:c="4"/><text:span text:style-name="T24">a = </text:span>min(x,y);<text:tab/><text:tab/>: <text:s/><text:span text:style-name="T24">xとyの</text:span>小さい方</text:p>
      <text:p text:style-name="P40"><text:s text:c="4"/><text:span text:style-name="T24">a = </text:span>combi(n,r);<text:tab/><text:tab/>: 組合せの数(nCr)</text:p>
      <text:p text:style-name="P40"><text:s text:c="4"/><text:span text:style-name="T24">a = </text:span>permu(n,r);<text:tab/><text:tab/>: 順列の数(nPr)</text:p>
      <text:p text:style-name="P40"><text:s text:c="4"/><text:span text:style-name="T24">a = </text:span>sin(x);<text:tab/><text:tab/><text:tab/>: 正弦</text:p>
      <text:p text:style-name="P40"><text:s text:c="4"/><text:span text:style-name="T24">a = </text:span>cos(x);<text:tab/><text:tab/><text:tab/>: 余弦</text:p>
      <text:p text:style-name="P40"><text:s text:c="4"/><text:span text:style-name="T24">a = </text:span>tan(x);<text:tab/><text:tab/><text:tab/>: 正接</text:p>
      <text:p text:style-name="P40"><text:s text:c="4"/><text:span text:style-name="T24">a = </text:span>asin(x);<text:tab/><text:tab/><text:tab/>: 逆正接</text:p>
      <text:p text:style-name="P40"><text:s text:c="4"/><text:span text:style-name="T24">a = </text:span>acos(x);<text:tab/><text:tab/><text:tab/>: 逆余弦</text:p>
      <text:p text:style-name="P40"><text:s text:c="4"/><text:span text:style-name="T24">a = </text:span>atan(x);<text:tab/><text:tab/><text:tab/>: 逆正接</text:p>
      <text:p text:style-name="P40"><text:s text:c="4"/><text:span text:style-name="T24">a = </text:span>atan2(x,y);<text:tab/><text:tab/>: 逆正接</text:p>
      <text:p text:style-name="P40"><text:s text:c="4"/><text:span text:style-name="T24">a = </text:span>sinh(x);<text:tab/><text:tab/><text:tab/>: 双曲線正弦</text:p>
      <text:p text:style-name="P40"><text:s text:c="4"/><text:span text:style-name="T24">a = </text:span>cosh(x);<text:tab/><text:tab/><text:tab/>: 双曲線余弦</text:p>
      <text:p text:style-name="P40"><text:s text:c="4"/><text:span text:style-name="T24">a = </text:span>tanh(x);<text:tab/><text:tab/><text:tab/>: 双曲線正接</text:p>
      <text:p text:style-name="P40"><text:s text:c="4"/><text:span text:style-name="T24">a = </text:span>asinh(x);<text:tab/><text:tab/>: 逆双曲線正弦</text:p>
      <text:p text:style-name="P40"><text:s text:c="4"/><text:span text:style-name="T24">a = </text:span>acosh(x);<text:tab/><text:tab/>: 逆双曲線余弦</text:p>
      <text:p text:style-name="P40"><text:s text:c="4"/><text:span text:style-name="T24">a = </text:span>atanh(x);<text:tab/><text:tab/>: 逆双曲線正接</text:p>
      <text:p text:style-name="P40"><text:s text:c="4"/><text:span text:style-name="T24">a = </text:span>exp(x);<text:tab/><text:tab/><text:tab/>: eの累乗</text:p>
      <text:p text:style-name="P40"><text:s text:c="4"/><text:span text:style-name="T24">a = </text:span>ln(x);<text:tab/><text:tab/><text:tab/>: eを底とする自然対数</text:p>
      <text:p text:style-name="P40"><text:s text:c="4"/><text:span text:style-name="T24">a = </text:span>log(x);<text:tab/><text:tab/><text:tab/>: 10を底とする対数</text:p>
      <text:p text:style-name="P40"><text:s text:c="4"/><text:span text:style-name="T24">a = </text:span>log(x,y);<text:tab/><text:tab/><text:tab/>: xを底とするyの対数</text:p>
      <text:p text:style-name="P40"><text:s text:c="4"/><text:span text:style-name="T24">a = </text:span>sqrt(x);<text:tab/><text:tab/><text:tab/>: 平方根</text:p>
      <text:p text:style-name="P40"><text:s text:c="4"/><text:span text:style-name="T24">a = </text:span>abs(x);<text:tab/><text:tab/><text:tab/>: 絶対値</text:p>
      <text:p text:style-name="P40"><text:s text:c="4"/><text:span text:style-name="T24">a = </text:span>ceil(x);<text:tab/><text:tab/><text:tab/>: 切上げ(x以上で最小の整数値)</text:p>
      <text:p text:style-name="P40"><text:s text:c="4"/><text:span text:style-name="T24">a = </text:span>floor(x);<text:tab/><text:tab/><text:tab/>: 切捨て(小数点以下の数の内最大の整数値)</text:p>
      <text:p text:style-name="P40"><text:s text:c="4"/><text:span text:style-name="T24">a = </text:span>round(x);<text:tab/><text:tab/>: 四捨五入(もっとも近い整数値)</text:p>
      <text:p text:style-name="P40"><text:s text:c="4"/><text:span text:style-name="T24">a = </text:span>trunc(x);<text:tab/><text:tab/>: 浮動小数点の整数部</text:p>
      <text:p text:style-name="P40"><text:soft-page-break/><text:s text:c="4"/><text:span text:style-name="T24">a = </text:span>sign(x);<text:tab/><text:tab/><text:tab/>: 符号示す値(1/0/-1)</text:p>
      <text:p text:style-name="P40"><text:s text:c="4"/><text:span text:style-name="T24">a = </text:span>round(x,y);<text:tab/><text:tab/>: <text:span text:style-name="T24">x を</text:span>yの倍数に丸める</text:p>
      <text:p text:style-name="P40"><text:s text:c="4"/><text:span text:style-name="T24">a = </text:span>equals(x,y);<text:tab/><text:tab/>: 等価判定 x == y ⇒ 1, x != y ⇒ 0</text:p>
      <text:p text:style-name="P40"><text:s text:c="4"/><text:span text:style-name="T17">a = <text:s/></text:span>lt(x,y);<text:tab/><text:tab/><text:tab/>: 大小判定(less than) x &gt; y ⇒ 1,以外は0</text:p>
      <text:p text:style-name="P40"><text:s text:c="4"/><text:span text:style-name="T17">a = </text:span>gt(x,y);<text:tab/><text:tab/><text:tab/>: 大小判定(greater than) x &lt; y ⇒ 1,以外は0</text:p>
      <text:p text:style-name="P40"><text:s text:c="4"/><text:span text:style-name="T17">a = </text:span>compare(x,y);<text:tab/><text:tab/>: 大小判定 x &gt; y ⇒ 1,x == y ⇒ 0, x &lt; y ⇒ -1</text:p>
      <text:p text:style-name="P40"><text:s text:c="4"/><text:span text:style-name="T17">a = </text:span>deg2dms(x);<text:tab/><text:tab/>: 度(ddd.dddd) → 度分秒(ddd.mmss)</text:p>
      <text:p text:style-name="P40"><text:s text:c="4"/><text:span text:style-name="T17">a = </text:span>dms2dig(x);<text:tab/><text:tab/>: 度分秒(ddd.mmss) → 度(ddd.dddd)</text:p>
      <text:p text:style-name="P40"><text:s text:c="4"/><text:span text:style-name="T17">a = </text:span>hour2hms(x);<text:tab/><text:tab/>: 時(hh.hhhh) → 時分秒(hh.mmss)</text:p>
      <text:p text:style-name="P40"><text:s text:c="4"/><text:span text:style-name="T17">a = </text:span>hms2hour(x);<text:tab/><text:tab/>: 時分秒(hh.mmss) → 時(hh.hhhh)</text:p>
      <text:p text:style-name="P40"><text:s text:c="4"/><text:span text:style-name="T17">a = </text:span>fact(x);<text:tab/><text:tab/><text:tab/>: 階乗 <text:span text:style-name="T17">( a = x * (x-1) * … * 2 * 1)</text:span></text:p>
      <text:p text:style-name="P40"><text:s text:c="4"/><text:span text:style-name="T17">a = </text:span>fib(x);<text:tab/><text:tab/><text:tab/>: フィボナッチ数列 <text:span text:style-name="T17">(Fn = Fn-1 + Fn-2 , F2 = 1, F1 = 0)</text:span></text:p>
      <text:p text:style-name="P40"><text:s text:c="4"/><text:span text:style-name="T17">a = </text:span>gcd(x,y);<text:tab/><text:tab/>: 最大公約数</text:p>
      <text:p text:style-name="P40"><text:s text:c="4"/><text:span text:style-name="T17">a = </text:span>lcm(x,y);<text:tab/><text:tab/>: 最小公倍数</text:p>
      <text:p text:style-name="P40"><text:s text:c="4"/><text:span text:style-name="T17">a = </text:span>JD(y,m,d);<text:tab/><text:tab/>: 西暦年月日からユリウス日を求める</text:p>
      <text:p text:style-name="P40"><text:s text:c="4"/><text:span text:style-name="T17">a = </text:span>MJD(y,m,d);<text:tab/><text:tab/>: 西暦年月日から準ユリウス日を求める</text:p>
      <text:p text:style-name="P40"><text:s text:c="4"/><text:span text:style-name="T17">a = </text:span>JD2Date(x);<text:tab/><text:tab/>: ユリウス日を年月日に変換して yyyymmdd の実数にする</text:p>
      <text:p text:style-name="P71"><text:s text:c="4"/><text:span text:style-name="T17">a = </text:span>sum(f([@]),n,k); <text:s text:c="10"/>: 級数の和 nからkまで連続し値を計算式f([@])で演算した値の合計を求める<text:span text:style-name="T17">( sum([@]*[@],1,10) → 1*1+2*2+...10*10 → 385)</text:span></text:p>
      <text:p text:style-name="P72"><text:span text:style-name="T2"><text:s text:c="4"/></text:span><text:span text:style-name="T17">a = </text:span><text:span text:style-name="T2">sum(f([@]),n1,n2...nm);<text:tab/>: 級数の和 n1からnmまで値を計算式f([@])で演算した値の合計を求める </text:span>( sum([@]^<text:span text:style-name="T22">2</text:span>,<text:span text:style-name="T22">1</text:span>,<text:span text:style-name="T22">2</text:span>,<text:span text:style-name="T22">3</text:span>,<text:span text:style-name="T22">4</text:span>,<text:span text:style-name="T22">5</text:span>) → <text:span text:style-name="T17">1^2+2^2+3^2+4^2+5^2 →</text:span> <text:span text:style-name="T17">55</text:span>)</text:p>
      <text:p text:style-name="P72"><text:span text:style-name="T2"><text:s text:c="4"/></text:span><text:span text:style-name="T17">a = </text:span><text:span text:style-name="T2">product(f([@]),n,k);<text:tab/>: 級数の積 nからkまで連続し値を計算式f([@])で演算した値の積を求める </text:span>(product([@],<text:span text:style-name="T22">1</text:span>,<text:span text:style-name="T22">5</text:span>) → <text:span text:style-name="T17">120</text:span>) </text:p>
      <text:p text:style-name="P72"><text:span text:style-name="T2"><text:s text:c="4"/></text:span><text:span text:style-name="T17">a = </text:span><text:span text:style-name="T2">product(f([@]),,n1,n2...nm);<text:tab/>: 級数の積 n1からnmまで値を計算式f([@])で演算した値の積を求める </text:span>(product([@]^<text:span text:style-name="T22">2</text:span>,<text:span text:style-name="T22">1</text:span>,<text:span text:style-name="T22">2</text:span>,<text:span text:style-name="T22">3</text:span>,<text:span text:style-name="T22">4</text:span>,<text:span text:style-name="T22">5</text:span>) → <text:span text:style-name="T17">14400</text:span>) </text:p>
      <text:p text:style-name="P73"><text:span text:style-name="T2"><text:s text:c="4"/></text:span><text:span text:style-name="T17">a = </text:span><text:span text:style-name="T2">repeat(f([@],[%]),i,n,k);<text:tab/>: 計算式の[@]にnからkまで入れて繰返す,[%]に計算結果が入る,iは[%]の初期値 <text:s/></text:span><text:span text:style-name="T17">(</text:span>repeat([%]*[@],<text:span text:style-name="T22">10</text:span>,<text:span text:style-name="T22">2</text:span>,<text:span text:style-name="T22">6</text:span>) <text:s/>→ ((((<text:span text:style-name="T22">10</text:span>*<text:span text:style-name="T22">2</text:span>)*<text:span text:style-name="T22">3</text:span>)*<text:span text:style-name="T22">4</text:span>)*<text:span text:style-name="T22">5</text:span>)*<text:span text:style-name="T22">6</text:span> <text:s/>→ <text:span text:style-name="T17">7200)</text:span></text:p>
      <text:p text:style-name="P74"><text:tab/>例 : 元本1万円を年利2%で5年預けた場合の金額 repeat([%]*1.02,10000,1,5) ⇒ ((((10000*1.02)*1.02)*1.02)*1.02))*1.02 = 11040.808 </text:p>
      <text:p text:style-name="P74"/>
      <text:p text:style-name="P74"/>
      <text:p text:style-name="P74"/>
      <text:h text:style-name="P75" text:outline-level="2" text:is-list-header="true"><text:bookmark-start text:name="__RefHeading___Toc1160_1915522117 Copy 1 Copy 2"/>6. 配列関数<text:bookmark-end text:name="__RefHeading___Toc1160_1915522117 Copy 1 Copy 2"/></text:h>
      <text:p text:style-name="P76"/>
      <text:p text:style-name="P77">array. で始まる関数は配列に関する関数</text:p>
      <text:p text:style-name="P78">使用できる配列の種類はインデックスが数値で<text:span text:style-name="T48">0以上のものに限る。</text:span></text:p>
      <text:p text:style-name="P78"/>
      <text:p text:style-name="P79"><text:span text:style-name="T49">a = </text:span>array.contains(c[2]);<text:tab/><text:tab/>配列内で存在を調べる関数 (<text:span text:style-name="T49">a = </text:span>0 :存在しない <text:s/><text:span text:style-name="T49">a = </text:span>1 : 存在する<text:span text:style-name="T50">)</text:span></text:p>
      <text:p text:style-name="P80"><text:span text:style-name="T49">size = </text:span>array.count(a[]);<text:tab/><text:tab/>1次元配列のサイズ</text:p>
      <text:p text:style-name="P80"><text:span text:style-name="T51">size = </text:span>array.count(a[,]); <text:tab/><text:tab/>2次元配列の全体サイズ</text:p>
      <text:p text:style-name="P81"><text:span text:style-name="T51">size = </text:span>array.count(a[<text:span text:style-name="T51">m</text:span>,]);<text:tab/><text:tab/>2次元配列<text:span text:style-name="T51">m行</text:span>目のサイズ<text:span text:style-name="T51">(列数)</text:span></text:p>
      <text:p text:style-name="P81"><text:span text:style-name="T51">size = </text:span>array.count(a[,<text:span text:style-name="T51">n</text:span>]);<text:tab/><text:tab/>2次元配列<text:span text:style-name="T51">n</text:span>列目のサイズ<text:span text:style-name="T51">(行数)</text:span></text:p>
      <text:p text:style-name="P82">c[,] = array.<text:span text:style-name="T42">concat</text:span>(a[,],b[,]);<text:tab/>配列同士を結合して新しい配列にする</text:p>
      <text:p text:style-name="P81">array.clear(a[]);<text:tab/><text:tab/><text:tab/>配列データをクリア</text:p>
      <text:p text:style-name="P80">array.remove(a[],start[,end]); <text:tab/>１次元配列要素を範囲指定で削除</text:p>
      <text:p text:style-name="P80">array.squeeze(a[]); <text:tab/><text:tab/>配列の未使用データを削除圧縮</text:p>
      <text:p text:style-name="P80">array.sort(a[]);<text:tab/><text:tab/><text:tab/>１次元配列のソート</text:p>
      <text:p text:style-name="P80">array.sort(a[,n]);<text:tab/><text:tab/><text:tab/>２次元配列をn列でソート</text:p>
      <text:p text:style-name="P80">array.reverse(a[]);<text:tab/><text:tab/><text:tab/>１次元配列の順番を逆にする</text:p>
      <text:p text:style-name="P80">array.reverse(a[,]);<text:tab/><text:tab/><text:tab/>２次元配列の行の順番を逆なする</text:p>
      <text:p text:style-name="P83">array.reverse(a[,],1);<text:tab/><text:tab/>２次元配列の列の順番を逆なする<text:span text:style-name="T48">(2番目の引数が1の時)</text:span></text:p>
      <text:p text:style-name="P80"><text:span text:style-name="T48">max = </text:span>array.max(a[]);<text:tab/><text:tab/><text:span text:style-name="T48">1/2次元</text:span>配列の最大値を求める</text:p>
      <text:p text:style-name="P83"><text:span text:style-name="T48">max = </text:span>array.max(a[<text:span text:style-name="T48">m,</text:span>]);<text:tab/><text:tab/><text:span text:style-name="T48">2次元</text:span>配列の<text:span text:style-name="T48">m行目の</text:span>最大値を求める</text:p>
      <text:p text:style-name="P83"><text:span text:style-name="T48">min = </text:span>array.min(a[]);<text:tab/><text:tab/><text:span text:style-name="T48">1/2次元</text:span>配列の最小値を求める</text:p>
      <text:p text:style-name="P83"><text:span text:style-name="T48">min = </text:span>array.m<text:span text:style-name="T48">in</text:span>(a[<text:span text:style-name="T48">m,</text:span>]);<text:tab/><text:tab/><text:span text:style-name="T48">2次元</text:span>配列の<text:span text:style-name="T48">m行目の最小値</text:span>を求める</text:p>
      <text:p text:style-name="P83"><text:span text:style-name="T52">sum = </text:span>array.sum(a[]); <text:s/><text:tab/><text:tab/><text:span text:style-name="T52">1次元</text:span>配列の合計</text:p>
      <text:p text:style-name="P80"><text:span text:style-name="T53">ave = </text:span>array.average(a[]); <text:tab/><text:tab/><text:span text:style-name="T53">1次元</text:span>配列の平均</text:p>
      <text:p text:style-name="P84"><text:span text:style-name="T53">ave = </text:span>array.average(a[,]); <text:tab/><text:tab/>２次元配列の全体の平均</text:p>
      <text:p text:style-name="P84"><text:span text:style-name="T53">ave = </text:span>array.average(a[<text:span text:style-name="T53">m</text:span>,]); <text:tab/>２次元配列の<text:span text:style-name="T53">m行目</text:span>の平均</text:p>
      <text:p text:style-name="P84"><text:span text:style-name="T53">vari = </text:span>array.variance(a[]); <text:tab/><text:tab/>配列の分散</text:p>
      <text:p text:style-name="P80"><text:span text:style-name="T53">std = </text:span>array.stdDeviation(a[]); <text:tab/>配列の標準偏差</text:p>
      <text:p text:style-name="P80"><text:span text:style-name="T53">cov = </text:span>array.covariance(a[], b[]);<text:tab/>共分散</text:p>
      <text:p text:style-name="P80"><text:span text:style-name="T53">coor = </text:span>array.corrCoeff(x[],y[]); <text:tab/>配列の相関係数</text:p>
      <text:p text:style-name="P80"/>
      <text:p text:style-name="P80"/>
      <text:h text:style-name="P85" text:outline-level="2" text:is-list-header="true"><text:bookmark-start text:name="__RefHeading___Toc1160_1915522117 Copy 1 Copy 2 Copy 1"/><text:span text:style-name="T50">7</text:span>. 文字列関数<text:bookmark-end text:name="__RefHeading___Toc1160_1915522117 Copy 1 Copy 2 Copy 1"/></text:h>
      <text:p text:style-name="P86"/>
      <text:p text:style-name="P87"><text:span text:style-name="T54">string</text:span>. で始まる関数は配列に関する関数</text:p>
      <text:p text:style-name="P88">使用できる配列の種類はインデックスが数値で<text:span text:style-name="T48">0以上のものに限る。</text:span></text:p>
      <text:p text:style-name="P88"/>
      <text:p text:style-name="P88"><text:s text:c="9"/>string.concat(a, b); <text:tab/><text:tab/><text:tab/><text:tab/><text:tab/>文字列の接続</text:p>
      <text:p text:style-name="P88"><text:s text:c="9"/>string.length(a); <text:tab/><text:tab/><text:tab/><text:tab/><text:tab/>文字列の長さ</text:p>
      <text:p text:style-name="P88"><text:s text:c="9"/>string.substring(str,start,count); <text:tab/><text:tab/><text:tab/>文字列から部分取得</text:p>
      <text:p text:style-name="P88"><text:s text:c="9"/>string.join(sep,str[]); <text:tab/><text:tab/><text:tab/><text:tab/>指定文字列を挟んで連結</text:p>
      <text:p text:style-name="P88"><text:s text:c="9"/>string.split(str,sep); <text:tab/><text:tab/><text:tab/><text:tab/><text:tab/>文字列を分割</text:p>
      <text:p text:style-name="P88"><text:s text:c="9"/>string.contains(str,val);<text:tab/><text:tab/><text:tab/><text:tab/>文字列内に指定文字列を含むか判定</text:p>
      <text:p text:style-name="P88"><text:s text:c="9"/>string.indexOf(str,val,star,count);<text:tab/><text:tab/><text:tab/>文字列内から指定文字列を検索</text:p>
      <text:p text:style-name="P88"><text:s text:c="9"/>string.toString(form,v); <text:tab/><text:tab/><text:tab/><text:tab/>数値の書式設定</text:p>
      <text:p text:style-name="P88"><text:s text:c="9"/>string.format(form,v0,v1...); <text:tab/><text:tab/><text:tab/>数値の書式設定</text:p>
      <text:p text:style-name="P88"><text:s text:c="9"/>string.compare(strA,strB); <text:tab/><text:tab/><text:tab/><text:tab/>文字列を比較</text:p>
      <text:p text:style-name="P88"><text:s text:c="9"/>string.replace(str,old,new); <text:tab/><text:tab/><text:tab/><text:tab/>文字列の置換</text:p>
      <text:p text:style-name="P88"><text:s text:c="9"/>string.insert(str,start,val); <text:tab/><text:tab/><text:tab/><text:tab/>文字列の挿入</text:p>
      <text:p text:style-name="P88"><text:s text:c="9"/>string.remove(str,start,count); <text:tab/><text:tab/><text:tab/>文字列の削除</text:p>
      <text:p text:style-name="P88"><text:s text:c="9"/>string.padLeft(str,totalWidth[,paddingChar]);<text:tab/>左寄せ</text:p>
      <text:p text:style-name="P88"><text:s text:c="9"/>string.padRight(str,totalWidth[,paddingChar]);<text:tab/>右寄せ</text:p>
      <text:p text:style-name="P88"><text:s text:c="9"/>string.toUpper(str); <text:tab/><text:tab/><text:tab/><text:tab/><text:tab/>大文字化</text:p>
      <text:p text:style-name="P88"><text:s text:c="9"/>string.toLower(str); <text:tab/><text:tab/><text:tab/><text:tab/><text:tab/>小文字化,</text:p>
      <text:p text:style-name="P88"><text:s text:c="9"/>string.trim(str[,trimChars]); <text:tab/><text:tab/><text:tab/><text:tab/>前後の空白削除</text:p>
      <text:p text:style-name="P88"/>
      <text:p text:style-name="P88"/>
      <text:p text:style-name="P88"/>
      <text:h text:style-name="P85" text:outline-level="2" text:is-list-header="true"><text:bookmark-start text:name="__RefHeading___Toc1160_1915522117 Copy 1 Copy 2 Copy 1 Copy 1"/><text:span text:style-name="T50">8</text:span>. ファイル関数<text:bookmark-end text:name="__RefHeading___Toc1160_1915522117 Copy 1 Copy 2 Copy 1 Copy 1"/></text:h>
      <text:p text:style-name="P86"/>
      <text:p text:style-name="P87"><text:span text:style-name="T54">file</text:span>. で始まる関数は配列に関する関数</text:p>
      <text:p text:style-name="P88">使用できる配列の種類はインデックスが数値で<text:span text:style-name="T48">0以上のものに限る。</text:span></text:p>
      <text:p text:style-name="P88"/>
      <text:p text:style-name="P88"><text:s text:c="8"/>file.fileExists(path);<text:tab/><text:tab/><text:tab/><text:tab/>ファイルの存在確認</text:p>
      <text:p text:style-name="P88"><text:s text:c="8"/>file.dirExists(path); <text:tab/><text:tab/><text:tab/><text:tab/>ディレクトリの存在確認</text:p>
      <text:p text:style-name="P88"><text:s text:c="8"/>file.makeDir(dir); <text:tab/><text:tab/><text:tab/><text:tab/>ディレクトリの作成</text:p>
      <text:p text:style-name="P88"><text:s text:c="8"/>file.copy(src,dest); <text:tab/><text:tab/><text:tab/><text:tab/>ファイルのコピー</text:p>
      <text:p text:style-name="P88"><text:s text:c="8"/>file.move(path,dir); <text:tab/><text:tab/><text:tab/><text:tab/>ファイルの移動</text:p>
      <text:p text:style-name="P88"><text:s text:c="8"/>file.rename(path,new); <text:tab/><text:tab/><text:tab/>ファイル名変更</text:p>
      <text:p text:style-name="P88"><text:s text:c="8"/>file.delete(path); <text:tab/><text:tab/><text:tab/><text:tab/>ファイル削除</text:p>
      <text:p text:style-name="P88"><text:s text:c="8"/>file.delDir(dir); <text:tab/><text:tab/><text:tab/><text:tab/>ファイル削除</text:p>
      <text:p text:style-name="P88"><text:s text:c="8"/>file.getFileName(path); <text:tab/><text:tab/><text:tab/>ファイル名の取得</text:p>
      <text:p text:style-name="P88"><text:s text:c="8"/>file.getDirectory(path); <text:tab/><text:tab/><text:tab/>ディレクトリ名の取得</text:p>
      <text:p text:style-name="P88"><text:s text:c="8"/>file.getExtention(path); <text:tab/><text:tab/><text:tab/>拡張子の取得</text:p>
      <text:p text:style-name="P88"><text:s text:c="8"/>file.getFileNameWithoutExtension(path); <text:tab/>拡張子なしのファイル名</text:p>
      <text:p text:style-name="P88"><text:s text:c="8"/>file.loadText(path); <text:tab/><text:tab/><text:tab/><text:tab/>テキストファイルの読込</text:p>
      <text:p text:style-name="P88"><text:s text:c="8"/>file.saveText(path,text); <text:tab/><text:tab/><text:tab/>テキストのファイル保存</text:p>
      <text:p text:style-name="P88"><text:s text:c="8"/>file.loadCsv(path); <text:tab/><text:tab/><text:tab/><text:tab/>CSVファイルの読込</text:p>
      <text:p text:style-name="P88"><text:s text:c="8"/>file.saveCsv(path,text[,]); <text:tab/><text:tab/><text:tab/>テキストのCSV保存</text:p>
      <text:p text:style-name="P88"><text:s text:c="8"/>file.size(path); <text:tab/><text:tab/><text:tab/><text:tab/>ファイルサイズの取得</text:p>
      <text:p text:style-name="P88"><text:s text:c="8"/>file.select(dir,ext); <text:tab/><text:tab/><text:tab/><text:tab/>ファイル選択</text:p>
      <text:h text:style-name="P75" text:outline-level="2" text:is-list-header="true"><text:bookmark-start text:name="__RefHeading___Toc1160_1915522117 Copy 1 Copy 3"/><text:span text:style-name="T50">9</text:span>. マトリックス関数<text:bookmark-end text:name="__RefHeading___Toc1160_1915522117 Copy 1 Copy 3"/></text:h>
      <text:p text:style-name="Standard"><text:span text:style-name="T55">m</text:span>atrix. で始まる関数は行列の演算処理を行う関数</text:p>
      <text:p text:style-name="Standard"/>
      <text:p text:style-name="Standard"><text:s text:c="4"/>matrix.unit(size); <text:tab/><text:tab/>単位行列(2次元)の作成</text:p>
      <text:p text:style-name="Standard"><draw:frame text:anchor-type="paragraph" draw:z-index="34" draw:name="テキスト枠 12" draw:style-name="gr23" draw:text-style-name="P33" svg:width="1.348cm" svg:height="1.564cm" svg:x="8.084cm" svg:y="0.169cm"><draw:text-box><text:p>1 0 0 </text:p><text:p>0 1 0 </text:p><text:p>0 0 1 </text:p></draw:text-box></draw:frame><draw:custom-shape text:anchor-type="paragraph" draw:z-index="35" draw:name="シェイプ 16" draw:style-name="gr24" svg:width="1.251cm" svg:height="0.29cm" svg:x="5.884cm" svg:y="0.3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text:span text:style-name="T55">a[,] = matrix.unit(3); <text:s text:c="5"/></text:span></text:p>
      <text:p text:style-name="Standard"/>
      <text:p text:style-name="Standard"/>
      <text:p text:style-name="Standard"/>
      <text:p text:style-name="Standard"><text:s text:c="4"/>matrix.transpose(a[,]); <text:tab/>転置行列(2次元行列Aの転置(A^T) <text:s/>)</text:p>
      <text:p text:style-name="Standard"><draw:frame text:anchor-type="paragraph" draw:z-index="36" draw:name="テキスト枠 13" draw:style-name="gr25" draw:text-style-name="P33" svg:width="1.204cm" svg:height="1.636cm" svg:x="8.154cm" svg:y="0.337cm"><draw:text-box><text:p>1 4 7 </text:p><text:p>2 5 8 </text:p><text:p>3 6 9 </text:p></draw:text-box></draw:frame><text:tab/>a[,] = {</text:p>
      <text:p text:style-name="Standard"><text:tab/> <text:s text:c="3"/>{ 1, 2, 3 },</text:p>
      <text:p text:style-name="Standard"><draw:custom-shape text:anchor-type="paragraph" draw:z-index="37" draw:name="シェイプ 17" draw:style-name="gr26" svg:width="1.251cm" svg:height="0.555cm" svg:x="6.038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 <text:s text:c="3"/>{ 4, 5, 6 },</text:p>
      <text:p text:style-name="Standard"><text:tab/> <text:s text:c="3"/>{ 7, 8, 9 }</text:p>
      <text:p text:style-name="Standard"><text:tab/>}</text:p>
      <text:p text:style-name="Standard"><text:tab/>d[,] = matrix.transpose(a[,]);</text:p>
      <text:p text:style-name="Standard"/>
      <text:p text:style-name="Standard"><text:s text:c="4"/>matrix.multi(a[,], b[,]); <text:tab/>行列の積 AxB (c[,]=…</text:p>
      <text:p text:style-name="Standard"><draw:frame text:anchor-type="paragraph" draw:z-index="38" draw:name="テキスト枠 14" draw:style-name="gr27" draw:text-style-name="P33" svg:width="1.805cm" svg:height="1.708cm" svg:x="8.01cm" svg:y="0.296cm"><draw:text-box><text:p><text:s/>30 <text:s text:c="2"/>36 </text:p><text:p><text:s/>66 <text:s text:c="2"/>81 </text:p><text:p>102 126 </text:p></draw:text-box></draw:frame><text:tab/>b[,] = {</text:p>
      <text:p text:style-name="Standard"><draw:custom-shape text:anchor-type="paragraph" draw:z-index="39" draw:name="シェイプ 18" draw:style-name="gr26" svg:width="1.251cm" svg:height="0.555cm" svg:x="6.135cm" svg:y="0.2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 <text:s text:c="3"/>{ 1, 2 },</text:p>
      <text:p text:style-name="Standard"><text:tab/> <text:s text:c="3"/>{ 4, 5 },</text:p>
      <text:p text:style-name="Standard"><text:tab/> <text:s text:c="3"/>{ 7, 8 }</text:p>
      <text:p text:style-name="Standard"><text:tab/>}</text:p>
      <text:p text:style-name="Standard"><text:tab/>d[,] = matrix.multi(a[,], b[,]);</text:p>
      <text:p text:style-name="Standard"><text:s text:c="4"/>matrix.add(a[,], b[,]); <text:tab/>行列の和 A+B</text:p>
      <text:p text:style-name="Standard"><draw:frame text:anchor-type="paragraph" draw:z-index="40" draw:name="テキスト枠 15" draw:style-name="gr27" draw:text-style-name="P33" svg:width="1.876cm" svg:height="1.708cm" svg:x="8.035cm" svg:y="0.069cm"><draw:text-box><text:p>11 22 33 </text:p><text:p>44 55 66 </text:p><text:p>77 88 99 </text:p></draw:text-box></draw:frame><text:tab/>e[,] = {</text:p>
      <text:p text:style-name="Standard"><draw:custom-shape text:anchor-type="paragraph" draw:z-index="41" draw:name="シェイプ 19" draw:style-name="gr26" svg:width="1.251cm" svg:height="0.555cm" svg:x="6.142cm" svg:y="-0.0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 <text:s text:c="3"/>{ 10, 20, 30 },</text:p>
      <text:p text:style-name="Standard"><text:tab/> <text:s text:c="3"/>{ 40, 50, 60 },</text:p>
      <text:p text:style-name="Standard"><text:tab/> <text:s text:c="3"/>{ 70, 80, 90 }</text:p>
      <text:p text:style-name="Standard"><text:tab/>}</text:p>
      <text:p text:style-name="Standard"><text:tab/>d[,] = matrix.add(a[,], e[,]);</text:p>
      <text:p text:style-name="Standard"><text:s text:c="4"/>matrix.inverse(a[,]); <text:tab/>逆行列 A^-1 </text:p>
      <text:p text:style-name="Standard"><draw:frame text:anchor-type="paragraph" draw:z-index="42" draw:name="テキスト枠 16" draw:style-name="gr28" draw:text-style-name="P33" svg:width="1.805cm" svg:height="1.084cm" svg:x="8.013cm" svg:y="0.058cm"><draw:text-box><text:p>-2 <text:s text:c="4"/>1 </text:p><text:p><text:s/>1.5 -0.5</text:p></draw:text-box></draw:frame><text:tab/>a[,] = {{1,2},{3,4}};</text:p>
      <text:p text:style-name="Standard"><draw:custom-shape text:anchor-type="paragraph" draw:z-index="43" draw:name="シェイプ 20" draw:style-name="gr26" svg:width="1.251cm" svg:height="0.555cm" svg:x="6.122cm" svg:y="-0.0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b[,] = matrix.inverse(a[,]);</text:p>
      <text:p text:style-name="P89"><text:s text:c="2"/></text:p>
      <text:p text:style-name="P89"><draw:frame text:anchor-type="paragraph" draw:z-index="44" draw:name="テキスト枠 17" draw:style-name="gr29" draw:text-style-name="P33" svg:width="0.987cm" svg:height="1.154cm" svg:x="7.915cm" svg:y="0.534cm"><draw:text-box><text:p>1 2 </text:p><text:p>3 4 </text:p></draw:text-box></draw:frame><text:s text:c="2"/>matrix.copy(a[,]); <text:tab/><text:tab/>行列のコピー</text:p>
      <text:p text:style-name="P90"><draw:custom-shape text:anchor-type="paragraph" draw:z-index="45" draw:name="シェイプ 21" draw:style-name="gr26" svg:width="1.251cm" svg:height="0.555cm" svg:x="6.246cm" svg:y="0.16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d[,] = matrix.<text:span text:style-name="T30">copy</text:span>(a[,]); </text:p>
      <text:p text:style-name="Standard"/>
      <text:p text:style-name="Standard"/>
      <text:h text:style-name="P91" text:outline-level="2" text:is-list-header="true"><text:bookmark-start text:name="__RefHeading___Toc1160_1915522117 Copy 1 Copy 1 Copy 1"/><text:span text:style-name="T56">10</text:span>. ダイヤログ関数<text:bookmark-end text:name="__RefHeading___Toc1160_1915522117 Copy 1 Copy 1 Copy 1"/></text:h>
      <text:h text:style-name="P92" text:outline-level="5" text:is-list-header="true"><text:bookmark-start text:name="__RefHeading___Toc1289_1915522117 Copy 1"/><text:span text:style-name="T57">inputBox</text:span>関数<text:bookmark-end text:name="__RefHeading___Toc1289_1915522117 Copy 1"/></text:h>
      <text:p text:style-name="P93"><text:s text:c="4"/>文字または数値入力を行うダイヤログ関数</text:p>
      <text:p text:style-name="P94"><draw:custom-shape text:anchor-type="paragraph" draw:z-index="87" draw:name="シェイプ 22" draw:style-name="gr30" draw:text-style-name="P95" svg:width="1.763cm" svg:height="0.664cm" svg:x="5.369cm" svg:y="1.046cm"><text:p text:style-name="P17">タイトル</text:p><draw:enhanced-geometry svg:viewBox="0 0 21600 21600" draw:mirror-horizontal="false" draw:mirror-vertical="false" draw:glue-points="10800 0 0 10800 10800 21600 21600 10800 ?f40 ?f41" draw:text-areas="0 0 21600 21600" draw:type="rectangular-callout" draw:modifiers="-5097.6 45319.893899204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91" draw:name="シェイプ 26" draw:style-name="gr31" draw:text-style-name="P95" svg:width="2.093cm" svg:height="0.664cm" svg:x="7.622cm" svg:y="1.021cm"><text:p text:style-name="P17">文字入力欄</text:p><draw:enhanced-geometry svg:viewBox="0 0 21600 21600" draw:mirror-horizontal="false" draw:mirror-vertical="false" draw:glue-points="10800 0 0 10800 10800 21600 21600 10800 ?f40 ?f41" draw:text-areas="0 0 21600 21600" draw:type="rectangular-callout" draw:modifiers="-10663.5214827296 69555.437665782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tab/>入力内容 = <text:span text:style-name="T30">inputBox</text:span>(タイトル);</text:p>
      <text:p text:style-name="P94"/>
      <text:p text:style-name="P94"><text:tab/>title = <text:span text:style-name="T20">"数値入力"</text:span>;<text:line-break/><text:tab/> a = <text:span text:style-name="T30">inputBox</text:span>(title);</text:p>
      <text:p text:style-name="P96"/>
      <text:p text:style-name="P94"/>
      <text:p text:style-name="P94"><draw:frame draw:style-name="fr4" draw:name="画像5 Copy 1" text:anchor-type="char" svg:width="11.642cm" svg:height="2.54cm" draw:z-index="86"><draw:image xlink:href="Pictures/10000000000001B800000060DF5444C0.png" xlink:type="simple" xlink:show="embed" xlink:actuate="onLoad" draw:mime-type="image/png"/></draw:frame></text:p>
      <text:p text:style-name="P94"/>
      <text:p text:style-name="P94"/>
      <text:p text:style-name="P94"/>
      <text:p text:style-name="P94"/>
      <text:p text:style-name="P94"/>
      <text:p text:style-name="P94"><draw:custom-shape text:anchor-type="paragraph" draw:z-index="88" draw:name="シェイプ 23" draw:style-name="gr32" draw:text-style-name="P95" svg:width="2.509cm" svg:height="0.664cm" svg:x="1.416cm" svg:y="0.078cm"><text:p text:style-name="P17">フォント拡大</text:p><draw:enhanced-geometry svg:viewBox="0 0 21600 21600" draw:mirror-horizontal="false" draw:mirror-vertical="false" draw:glue-points="10800 0 0 10800 10800 21600 21600 10800 ?f40 ?f41" draw:text-areas="0 0 21600 21600" draw:type="rectangular-callout" draw:modifiers="15103.3028812368 -25782.493368700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89" draw:name="シェイプ 24" draw:style-name="gr32" draw:text-style-name="P95" svg:width="2.509cm" svg:height="0.664cm" svg:x="4.11cm" svg:y="0.078cm"><text:p text:style-name="P17">フォント縮小</text:p><draw:enhanced-geometry svg:viewBox="0 0 21600 21600" draw:mirror-horizontal="false" draw:mirror-vertical="false" draw:glue-points="10800 0 0 10800 10800 21600 21600 10800 ?f40 ?f41" draw:text-areas="0 0 21600 21600" draw:type="rectangular-callout" draw:modifiers="834.855938158819 -23433.421750663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90" draw:name="シェイプ 25" draw:style-name="gr33" draw:text-style-name="P95" svg:width="2.744cm" svg:height="0.664cm" svg:x="6.756cm" svg:y="0.104cm"><text:p text:style-name="P17">数値計算(F11)</text:p><draw:enhanced-geometry svg:viewBox="0 0 21600 21600" draw:mirror-horizontal="false" draw:mirror-vertical="false" draw:glue-points="10800 0 0 10800 10800 21600 21600 10800 ?f40 ?f41" draw:text-areas="0 0 21600 21600" draw:type="rectangular-callout" draw:modifiers="-12674.0359897172 -25839.787798408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p>
      <text:p text:style-name="P94"/>
      <text:p text:style-name="P97">タイトル: 引数<text:span text:style-name="T58">(title)</text:span>で入力した文字列を表示</text:p>
      <text:p text:style-name="P98">文字入力欄: 文字列または数値の入力欄</text:p>
      <text:p text:style-name="P98">フォント拡大: 入力文字のサイズを大きくする</text:p>
      <text:p text:style-name="P98">フォント縮小: 入力文字のサイズを小さくする</text:p>
      <text:p text:style-name="P98">数値計算: 選択した文字列が数式の時に計算処理を行う</text:p>
      <text:p text:style-name="P94"/>
      <text:h text:style-name="P92" text:outline-level="5" text:is-list-header="true"><text:bookmark-start text:name="__RefHeading___Toc7733_2342154463 Copy 1"/><text:span text:style-name="T59">input</text:span>Box<text:span text:style-name="T59">Multi</text:span>関数<text:bookmark-end text:name="__RefHeading___Toc7733_2342154463 Copy 1"/></text:h>
      <text:p text:style-name="P94">　　複数項目の文字列または数値の入力を行うダイヤログ関数</text:p>
      <text:p text:style-name="P94"><text:tab/>title = <text:span text:style-name="T20">"四角形大きさ"</text:span>;<text:line-break/><text:tab/>data[,] = {{<text:span text:style-name="T20">"縦"</text:span>, <text:span text:style-name="T22">10</text:span>}, {<text:span text:style-name="T20">"横"</text:span>, <text:span text:style-name="T22">20</text:span>}};<text:line-break/><text:tab/>data[,] = <text:span text:style-name="T30">inputBoxMulti</text:span>(data[,], title);<text:line-break/></text:p>
      <text:p text:style-name="P94"><draw:frame draw:style-name="fr2" draw:name="画像8 Copy 1" text:anchor-type="char" svg:x="4.798cm" svg:y="0.249cm" svg:width="7.646cm" svg:height="3.413cm" draw:z-index="94"><draw:image xlink:href="Pictures/100000000000012100000081A08DEFF8.png" xlink:type="simple" xlink:show="embed" xlink:actuate="onLoad" draw:mime-type="image/png"/></draw:frame></text:p>
      <text:p text:style-name="P94"/>
      <text:p text:style-name="P94"/>
      <text:p text:style-name="P94"/>
      <text:p text:style-name="P94"/>
      <text:p text:style-name="P94"/>
      <text:p text:style-name="P94"/>
      <text:p text:style-name="P94"/>
      <text:h text:style-name="P92" text:outline-level="5" text:is-list-header="true"><text:bookmark-start text:name="__RefHeading___Toc7733_2342154463"/>messageBox関数<text:bookmark-end text:name="__RefHeading___Toc7733_2342154463"/></text:h>
      <text:p text:style-name="P94">　数値または文字列をダイヤログに表示する</text:p>
      <text:p text:style-name="P93"><text:tab/>messageBox(文字列[, タイトル]);</text:p>
      <text:p text:style-name="P93"/>
      <text:p text:style-name="P99">a = <text:span text:style-name="T22">2</text:span> + <text:span text:style-name="T60">3</text:span>;</text:p>
      <text:p text:style-name="P100">title = <text:span text:style-name="T20">"計算結果"</text:span>;</text:p>
      <text:p text:style-name="P100"><text:span text:style-name="T30">messageBox</text:span>(a, title); </text:p>
      <text:p text:style-name="P100"><text:soft-page-break/></text:p>
      <text:p text:style-name="P100"><draw:frame draw:style-name="fr2" draw:name="画像6 Copy 1" text:anchor-type="char" svg:x="6.533cm" svg:y="0.095cm" svg:width="3.36cm" svg:height="3.678cm" draw:z-index="92"><draw:image xlink:href="Pictures/100000000000007F0000008B22362667.png" xlink:type="simple" xlink:show="embed" xlink:actuate="onLoad" draw:mime-type="image/png"/></draw:frame></text:p>
      <text:p text:style-name="P100"/>
      <text:p text:style-name="P100"/>
      <text:p text:style-name="P100"/>
      <text:p text:style-name="P100"/>
      <text:p text:style-name="P100"><text:s text:c="2"/></text:p>
      <text:p text:style-name="P100"/>
      <text:p text:style-name="P100"/>
      <text:p text:style-name="P100"/>
      <text:h text:style-name="P92" text:outline-level="5" text:is-list-header="true"><text:bookmark-start text:name="__RefHeading___Toc7735_2342154463"/>menuSelect関数<text:bookmark-end text:name="__RefHeading___Toc7735_2342154463"/></text:h>
      <text:p text:style-name="P101">　選択メニューを表示して選択項目の位置番号を返す</text:p>
      <text:p text:style-name="P102">選択結果 = menuSelect(menu[],title);</text:p>
      <text:p text:style-name="P103">title = <text:span text:style-name="T20">"図形の種類"</text:span>;</text:p>
      <text:p text:style-name="P103">menu[] = {  <text:span text:style-name="T20">"正四面体"</text:span>,</text:p>
      <text:p text:style-name="P103">            <text:s text:c="7"/> <text:span text:style-name="T20">"正六面体"</text:span>,</text:p>
      <text:p text:style-name="P103">             <text:s text:c="7"/><text:span text:style-name="T20">"正八面体"</text:span>,</text:p>
      <text:p text:style-name="P103">             <text:s text:c="7"/><text:span text:style-name="T20">"正十二面体"</text:span>,</text:p>
      <text:p text:style-name="P103">             <text:s text:c="7"/><text:span text:style-name="T20">"正二十面体"</text:span></text:p>
      <text:p text:style-name="P103">        }; </text:p>
      <text:p text:style-name="P103">menuNo = <text:span text:style-name="T30">menuSelect</text:span>(menu[], title); </text:p>
      <text:p text:style-name="P103"/>
      <text:p text:style-name="P103"><draw:frame draw:style-name="fr4" draw:name="画像7 Copy 1" text:anchor-type="char" svg:width="6.271cm" svg:height="4.339cm" draw:z-index="93"><draw:image xlink:href="Pictures/10000000000000ED000000A477C27EB6.png" xlink:type="simple" xlink:show="embed" xlink:actuate="onLoad" draw:mime-type="image/png"/></draw:frame></text:p>
      <text:p text:style-name="P103"/>
      <text:h text:style-name="P92" text:outline-level="5" text:is-list-header="true"/>
      <text:h text:style-name="P92" text:outline-level="5"/>
      <text:h text:style-name="P92" text:outline-level="5"/>
      <text:h text:style-name="P92" text:outline-level="5"/>
      <text:h text:style-name="P92" text:outline-level="5" text:is-list-header="true"><text:bookmark text:name="__RefHeading___Toc1267_1915522117 Copy 1 Copy 1 Copy 1"/></text:h>
      <text:h text:style-name="P104" text:outline-level="2" text:is-list-header="true"/>
      <text:h text:style-name="P91" text:outline-level="2" text:is-list-header="true"><text:bookmark-start text:name="__RefHeading___Toc1160_1915522117 Copy 1"/><text:span text:style-name="T50">1</text:span><text:span text:style-name="T61">1</text:span>. グラフィック機能<text:bookmark-end text:name="__RefHeading___Toc1160_1915522117 Copy 1"/></text:h>
      <text:h text:style-name="P105" text:outline-level="5" text:is-list-header="true"><text:bookmark-start text:name="__RefHeading___Toc1267_1915522117 Copy 1"/>ウィンドウの設定<text:bookmark-end text:name="__RefHeading___Toc1267_1915522117 Copy 1"/></text:h>
      <text:p text:style-name="P106"/>
      <text:p text:style-name="P107">グラフィック関数を使うと別ウィンドウにグラフィック表示を行う。</text:p>
      <text:p text:style-name="P108"><text:span text:style-name="T62">グラフィック・ウィンドウは plot.Window</text:span>(left,bottom,right,top) <text:span text:style-name="T62"><text:s/>によってワールド座標で設定される。</text:span></text:p>
      <text:p text:style-name="P107"><draw:frame text:anchor-type="paragraph" draw:z-index="26" draw:name="テキスト枠 8" draw:style-name="gr34" draw:text-style-name="P110" svg:width="7.806cm" svg:height="7.393cm" svg:x="0.938cm" svg:y="0.097cm"><draw:text-box><text:p text:style-name="P109"><text:span text:style-name="T63">plot.Aspect(1);</text:span></text:p><text:p text:style-name="P109"><text:span text:style-name="T63">plot.Window(0,0,100,100);</text:span></text:p><text:p text:style-name="P109"><text:span text:style-name="T63">plot.Color("Red");</text:span></text:p><text:p text:style-name="P109"><text:span text:style-name="T63">plot.PointType("circle");</text:span></text:p><text:p text:style-name="P109"><text:span text:style-name="T63">plot.PointSize(5);</text:span></text:p><text:p text:style-name="P109"><text:span text:style-name="T63">plot.Point(20,20);</text:span></text:p><text:p text:style-name="P109"><text:span text:style-name="T63">plot.Color("Blue");</text:span></text:p><text:p text:style-name="P109"><text:span text:style-name="T63">plot.Line(20,20,80,80);</text:span></text:p><text:p text:style-name="P109"><text:span text:style-name="T63">plot.Color("Black");</text:span></text:p><text:p text:style-name="P109"><text:span text:style-name="T63">plot.Line(10,10,10,90);</text:span></text:p><text:p text:style-name="P109"><text:span text:style-name="T63">plot.Line(90,10,90,90);</text:span></text:p><text:p text:style-name="P109"><text:span text:style-name="T63">plot.Line(10,10,90,10);</text:span></text:p><text:p text:style-name="P109"><text:span text:style-name="T63">plot.Line(10,90,90,90);</text:span></text:p><text:p text:style-name="P109"><text:span text:style-name="T63">fontSize = 5;</text:span></text:p><text:p text:style-name="P109"><text:span text:style-name="T63">plot.Text("left",10,10,fontSize,0,2,2);</text:span></text:p><text:p text:style-name="P109"><text:span text:style-name="T63">plot.Text("bottom",10,10,fontSize,0,0,0);</text:span></text:p><text:p text:style-name="P109"><text:span text:style-name="T63">plot.Text("right",90,90,fontSize,0,0,0);</text:span></text:p><text:p text:style-name="P109"><text:span text:style-name="T63">plot.Text("top",90,90,fontSize,0,2,2);</text:span></text:p><text:p text:style-name="P109"><text:span text:style-name="T63"/></text:p><text:p text:style-name="P109"><text:span text:style-name="T63"/></text:p></draw:text-box></draw:frame><draw:frame draw:style-name="fr2" draw:name="画像5" text:anchor-type="char" svg:x="8.744cm" svg:y="0.265cm" svg:width="7.793cm" svg:height="5.927cm" draw:z-index="27"><draw:image xlink:href="Pictures/100000000000020E00000190AEAB4D8C.png" xlink:type="simple" xlink:show="embed" xlink:actuate="onLoad" draw:mime-type="image/png"/></draw:frame></text:p>
      <text:p text:style-name="P107"/>
      <text:p text:style-name="P107"/>
      <text:p text:style-name="P107"/>
      <text:p text:style-name="P107"/>
      <text:p text:style-name="P107"/>
      <text:p text:style-name="P107"/>
      <text:p text:style-name="P111"/>
      <text:p text:style-name="P111"/>
      <text:p text:style-name="P111"/>
      <text:p text:style-name="P111"/>
      <text:p text:style-name="P111"/>
      <text:p text:style-name="P111"/>
      <text:p text:style-name="P111"/>
      <text:p text:style-name="P111"/>
      <text:p text:style-name="P111">上図は <text:span text:style-name="T62">bottom &lt; top , <text:s/>left &lt; right で設定した場合で </text:span><text:span text:style-name="T64">bottom &gt; top とすると上下が逆になる。</text:span></text:p>
      <text:p text:style-name="P112">同様に left &gt; rightとすると左右が入れ替わる。</text:p>
      <text:p text:style-name="P111"><draw:frame text:anchor-type="paragraph" draw:z-index="29" draw:name="テキスト枠 9" draw:style-name="gr35" draw:text-style-name="P114" svg:width="4.181cm" svg:height="0.496cm" svg:x="10.199cm" svg:y="-0.157cm"><draw:text-box><text:p text:style-name="P113"><text:span text:style-name="T65">plot.Window(0,100,100,0); </text:span></text:p></draw:text-box></draw:frame><draw:frame draw:style-name="fr2" draw:name="画像6" text:anchor-type="char" svg:x="8.797cm" svg:y="0.365cm" svg:width="7.795cm" svg:height="5.883cm" draw:z-index="28"><draw:image xlink:href="Pictures/100000000000021200000190815D7115.png" xlink:type="simple" xlink:show="embed" xlink:actuate="onLoad" draw: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5">また上図はアスペクト比固定の設定<draw:frame draw:style-name="fr2" draw:name="画像7" text:anchor-type="char" svg:x="8.844cm" svg:y="0.399cm" svg:width="7.728cm" svg:height="5.851cm" draw:z-index="30"><draw:image xlink:href="Pictures/100000000000021300000192BD800958.png" xlink:type="simple" xlink:show="embed" xlink:actuate="onLoad" draw:mime-type="image/png"/></draw:frame><text:span text:style-name="T64">(縦横比が同じ、</text:span><text:span text:style-name="T66"> </text:span><text:span text:style-name="T64">plot.Aspect(1))</text:span>で表示しているが非固定<text:span text:style-name="T66">(</text:span><text:span text:style-name="T64">plot.Aspect(1)</text:span><text:span text:style-name="T66">)</text:span>にするとウィンドウの形状に合わせた表示する。</text:p>
      <text:p text:style-name="P116">なお <text:span text:style-name="T66">plot.Aspect() は plot.Window() より前に設定しないと有効にならない。</text:span></text:p>
      <text:p text:style-name="P111"/>
      <text:p text:style-name="P111"/>
      <text:p text:style-name="P111"/>
      <text:p text:style-name="P111"/>
      <text:p text:style-name="P111"/>
      <text:h text:style-name="P117" text:outline-level="5" text:is-list-header="true"><text:bookmark-start text:name="__RefHeading___Toc2998_1264076087"/><text:soft-page-break/>点の表示<text:bookmark-end text:name="__RefHeading___Toc2998_1264076087"/></text:h>
      <text:p text:style-name="P118">点を表示する場合の属性として 点種と点サイズの２通りがある。</text:p>
      <text:p text:style-name="P118"/>
      <text:p text:style-name="P119">・点種<text:span text:style-name="T67">(</text:span><text:span text:style-name="T68">Point</text:span><text:span text:style-name="T67">Type())<text:tab/>点の形状 dot(点), cross(×),plus(+), box(□), circle(〇),tryangle(△)</text:span></text:p>
      <text:p text:style-name="P120">・点サイズ<text:span text:style-name="T68">(PointSize())</text:span><text:tab/>点のサイズはスクリーン座標のサイズで<text:span text:style-name="T69">Windowの大きさを変えても変わらない。</text:span></text:p>
      <text:p text:style-name="P121"/>
      <text:p text:style-name="P122"><text:span text:style-name="T30">plot.PointType</text:span>(<text:span text:style-name="T20">"circle"</text:span>);<text:line-break/><text:span text:style-name="T30">plot.PointSize</text:span>(<text:span text:style-name="T22">5</text:span>);<text:line-break/><text:span text:style-name="T30">plot.Point</text:span>(<text:span text:style-name="T22">20</text:span>,<text:span text:style-name="T22">20</text:span>); </text:p>
      <text:p text:style-name="P121"/>
      <text:p text:style-name="P121"/>
      <text:h text:style-name="Heading_20_5" text:outline-level="5" text:is-list-header="true"><text:bookmark-start text:name="__RefHeading___Toc3000_1264076087"/>線分の表示<text:bookmark-end text:name="__RefHeading___Toc3000_1264076087"/></text:h>
      <text:p text:style-name="P111">線分を表示する場合、その属性として 色<text:span text:style-name="T66">(plot.Color())、線種(plot.LineType())、太さ(plot.Thickness())が設定でき、次に設定されるまでその属性が有効になる。</text:span></text:p>
      <text:p text:style-name="P123">ちなみに色はすべての要素に、線種と太さは円弧にも有効である。</text:p>
      <text:p text:style-name="P111">次の場合は <text:span text:style-name="T70">Blue、破線 で線分が表示される。</text:span></text:p>
      <text:p text:style-name="P111">線分の色は 「色」と入力した後 <text:span text:style-name="T70">F8キーまたは右Winキー を押すと入力候補が表示され、線種も同様に入力候補を出すことができる。</text:span></text:p>
      <text:p text:style-name="P111">ちなみに線種は <text:span text:style-name="T70">solid (実線)、dash(破線)、center(一点鎖線)、phantom(２点鎖線)の４種類がある。</text:span></text:p>
      <text:p text:style-name="P124"><text:span text:style-name="T30">plot.Color</text:span>(<text:span text:style-name="T20">"Blue"</text:span>);<text:line-break/><text:span text:style-name="T30">plot.LineType</text:span>(<text:span text:style-name="T20">"dash"</text:span>);<text:line-break/><text:span text:style-name="T30">plot.Line</text:span>(<text:span text:style-name="T22">20</text:span>,<text:span text:style-name="T22">20</text:span>,<text:span text:style-name="T22">80</text:span>,<text:span text:style-name="T22">80</text:span>); </text:p>
      <text:p text:style-name="P125"/>
      <text:p text:style-name="P125"/>
      <text:h text:style-name="P126" text:outline-level="5" text:is-list-header="true"><text:bookmark-start text:name="__RefHeading___Toc3002_1264076087"/>円弧の表示<text:bookmark-end text:name="__RefHeading___Toc3002_1264076087"/></text:h>
      <text:p text:style-name="P127">円弧を表示するときは下記の書式にしたがって行う。</text:p>
      <text:p text:style-name="P127">開始角と終了角の単位はラジアンで省略可能である。</text:p>
      <text:p text:style-name="P127">その場合、開始角 <text:s/><text:span text:style-name="T71">= 0、終了角 -=2*PI となり円で表示される。</text:span></text:p>
      <text:p text:style-name="P127"/>
      <text:p text:style-name="P128">plot.Arc(<text:span text:style-name="T72">x座標, y座標, 半径, 開始角, 終了角</text:span>);</text:p>
      <text:p text:style-name="P127"/>
      <text:h text:style-name="P129" text:outline-level="5" text:is-list-header="true"><text:bookmark-start text:name="__RefHeading___Toc3004_1264076087"/>文字列の表示<text:bookmark-end text:name="__RefHeading___Toc3004_1264076087"/></text:h>
      <text:p text:style-name="P130">文字列を表示する場合は次のような書式でおこなう。</text:p>
      <text:p text:style-name="P130">・文字高さ<text:tab/>ワールド座標で設定されるので<text:span text:style-name="T73">Windowの大きさを変えるとそれに合わせて変わる</text:span></text:p>
      <text:p text:style-name="P130">・回転角<text:tab/>文字列の回転角を設定で 単位はラジアンで設定する。</text:p>
      <text:p text:style-name="P130">・水平アライメント<text:tab/>文字列の水平方向の基準位置 <text:s/><text:span text:style-name="T73">0:左 1:中央 2:右</text:span></text:p>
      <text:p text:style-name="P131">・垂直アライメント<text:tab/>文字列の垂直方向の基準位置 <text:s/><text:span text:style-name="T73">0:上 1:中央 2:下</text:span></text:p>
      <text:p text:style-name="P132"/>
      <text:p text:style-name="P132">※水平垂直のアライメントを省略すると基準位置は左上、回転角を省略すると回転角は<text:span text:style-name="T71">0°となる。</text:span></text:p>
      <text:p text:style-name="P132"/>
      <text:p text:style-name="P133">plot.Text(“文字列”, x座標, y座標, 文字高さ, 回転角, 水平アライメント, 垂直アライメント);</text:p>
      <text:p text:style-name="P111"/>
      <text:p text:style-name="P124"><text:soft-page-break/>fontSize = <text:span text:style-name="T22">5</text:span>;<text:line-break/>rotate = <text:span text:style-name="T30">RAD</text:span>(<text:span text:style-name="T22">0</text:span>);<text:line-break/><text:span text:style-name="T30">plot.Text</text:span>(<text:span text:style-name="T20">"left"</text:span>,<text:span text:style-name="T22">10</text:span>,<text:span text:style-name="T22">10</text:span>,fontSize,rotate,<text:span text:style-name="T22">2</text:span>,<text:span text:style-name="T22">2</text:span>); </text:p>
      <text:p text:style-name="P111"/>
      <text:p text:style-name="P111"/>
      <text:h text:style-name="P134" text:outline-level="5" text:is-list-header="true"><text:bookmark-start text:name="__RefHeading___Toc3006_1264076087"/>グラフィック関数<text:bookmark-end text:name="__RefHeading___Toc3006_1264076087"/></text:h>
      <text:p text:style-name="P111"/>
      <text:p text:style-name="P135"><text:s text:c="4"/>plot.Window(left,bottom,right,top);<text:tab/>: 表示領域の設定",</text:p>
      <text:p text:style-name="P135"><text:s text:c="4"/>plot.Aspect(1);<text:tab/><text:tab/><text:tab/>: アスペクト比固定の設定(0(非固定)/1(固定))",</text:p>
      <text:p text:style-name="P135"><text:s text:c="4"/>plot.Color("Blue");<text:tab/><text:tab/><text:tab/>: 要素の色設定",</text:p>
      <text:p text:style-name="P135"><text:s text:c="4"/>plot.PointType("cross");<text:tab/><text:tab/>: 点種の設定("dot", "cross", "plus", "box", "circle", "triangle")</text:p>
      <text:p text:style-name="P135"><text:s text:c="4"/>plot.LineType("dash");<text:tab/><text:tab/>: 線種の設定("solid", "dash", "center", "phantom")"</text:p>
      <text:p text:style-name="P135"><text:s text:c="4"/>plot.PointSize(3);<text:tab/><text:tab/><text:tab/>: 点サイズの設定</text:p>
      <text:p text:style-name="P135"><text:s text:c="4"/>plot.LineThickness(2);<text:tab/><text:tab/>: 線の太さの設定</text:p>
      <text:p text:style-name="P135"><text:s text:c="4"/>plot.Point(x,y);<text:tab/><text:tab/><text:tab/>: 点の登録</text:p>
      <text:p text:style-name="P135"><text:s text:c="4"/>plot.Line(sx,sy,ex,ey);<text:tab/><text:tab/>: 線分の登録(始点x,y、終点x,y)</text:p>
      <text:p text:style-name="P135"><text:s text:c="4"/>plot.Arc(cx,cy,r[,sa][,ea]);<text:tab/><text:tab/>: 円弧の登録(中心x,中心y,半径[、始角][、終角])</text:p>
      <text:p text:style-name="P136"><text:s text:c="4"/>plot.Text(text,x,y[,size[,rot[,ha[,va]]]]);<text:tab/>: 文字列の登録(文字列,X座標,Y座標,サイズ,回転角,水平アライメント,垂直アライメント)</text:p>
      <text:p text:style-name="P137"><text:s text:c="4"/><text:span text:style-name="T47">plot.Disp();<text:tab/>: グラフィックデータを表示</text:span></text:p>
      <text:p text:style-name="P135"><text:s text:c="4"/>graph.Set(x[],y[][,Title]); <text:tab/><text:tab/>:グラフデータの設定(X[],Y[][,Title])</text:p>
      <text:p text:style-name="P135"><text:s text:c="4"/>graph.FontSize(5);<text:tab/><text:tab/><text:tab/>: グラフのフォントサイズの設定"</text:p>
      <text:p text:style-name="P135"/>
      <text:p text:style-name="P135"/>
      <text:p text:style-name="P135"/>
      <text:p text:style-name="P135"/>
      <text:h text:style-name="P75" text:outline-level="2" text:is-list-header="true"><text:bookmark-start text:name="__RefHeading___Toc1160_1915522117 Copy 1 Copy 1"/><text:span text:style-name="T54">1</text:span><text:span text:style-name="T61">2</text:span>. <text:span text:style-name="T74">3D</text:span>グラフィック機能<text:bookmark-end text:name="__RefHeading___Toc1160_1915522117 Copy 1 Copy 1"/></text:h>
      <text:p text:style-name="P138">KScriptWinでは簡単な関数を使って3次元データの表示を行うことができる。</text:p>
      <text:p text:style-name="P76"><draw:frame text:anchor-type="paragraph" draw:z-index="48" draw:name="テキスト枠 18" draw:style-name="gr36" draw:text-style-name="P140" svg:width="7.24cm" svg:height="12.588cm" svg:x="1.709cm" svg:y="0.212cm"><draw:text-box><text:p text:style-name="P139"><text:span text:style-name="T65">sp = -0.5;</text:span></text:p><text:p text:style-name="P139"><text:span text:style-name="T65">ep = <text:s/>0.5;</text:span></text:p><text:p text:style-name="P139"><text:span text:style-name="T65">min[] = { sp, sp, sp };</text:span></text:p><text:p text:style-name="P139"><text:span text:style-name="T65">max[] = { ep, ep, ep };</text:span></text:p><text:p text:style-name="P139"><text:span text:style-name="T65">plot3D.setArea(min[],max[]);</text:span></text:p><text:p text:style-name="P139"><text:span text:style-name="T65">plot3D.setAxisFrame(1,0);</text:span></text:p><text:p text:style-name="P139"><text:span text:style-name="T65">plot3D.setColor("Red");</text:span></text:p><text:p text:style-name="P139"><text:span text:style-name="T65"/></text:p><text:p text:style-name="P139"><text:span text:style-name="T65">sp[] = { -1, -1, -1 };</text:span></text:p><text:p text:style-name="P139"><text:span text:style-name="T65">ep[] = { <text:s/>1, <text:s/>1, <text:s/>1 };</text:span></text:p><text:p text:style-name="P139"><text:span text:style-name="T65">plot3D.plotLine(sp[],ep[]);</text:span></text:p><text:p text:style-name="P139"><text:span text:style-name="T65">plot3D.setColor("Blue");</text:span></text:p><text:p text:style-name="P139"><text:span text:style-name="T65">circle(2,24);</text:span></text:p><text:p text:style-name="P139"><text:span text:style-name="T65">// <text:s text:c="3"/></text:span><text:span text:style-name="T65">円</text:span><text:span text:style-name="T65">(</text:span><text:span text:style-name="T65">半径</text:span><text:span text:style-name="T65">,</text:span><text:span text:style-name="T65">角数</text:span><text:span text:style-name="T65">)</text:span></text:p><text:p text:style-name="P139"><text:span text:style-name="T65">circle(r, n) {</text:span></text:p><text:p text:style-name="P139"><text:span text:style-name="T65"><text:s text:c="4"/>step = 2 * PI / n;</text:span></text:p><text:p text:style-name="P139"><text:span text:style-name="T65"><text:s text:c="4"/>i = 0;</text:span></text:p><text:p text:style-name="P139"><text:span text:style-name="T65"><text:s text:c="4"/>for (ang = 0; ang &lt; 2 * PI; ang += step) {</text:span></text:p><text:p text:style-name="P139"><text:span text:style-name="T65"><text:s text:c="8"/>plist[i,0] = r * cos(ang);</text:span></text:p><text:p text:style-name="P139"><text:span text:style-name="T65"><text:s text:c="8"/>plist[i,1] = r * sin(ang);</text:span></text:p><text:p text:style-name="P139"><text:span text:style-name="T65"><text:s text:c="8"/>plist[i,2] = 0;</text:span></text:p><text:p text:style-name="P139"><text:span text:style-name="T65"><text:s text:c="8"/>i++;</text:span></text:p><text:p text:style-name="P139"><text:span text:style-name="T65"><text:s text:c="4"/>}</text:span></text:p><text:p text:style-name="P139"><text:span text:style-name="T65"><text:s text:c="4"/>plist[i,0] = r * cos(0);</text:span></text:p><text:p text:style-name="P139"><text:span text:style-name="T65"><text:s text:c="4"/>plist[i,1] = r * sin(0);</text:span></text:p><text:p text:style-name="P139"><text:span text:style-name="T65"><text:s text:c="4"/>plist[i,2] = 0;</text:span></text:p><text:p text:style-name="P139"><text:span text:style-name="T65"><text:s text:c="4"/>plot3D.plotPolyline(plist[,]);</text:span></text:p><text:p text:style-name="P139"><text:span text:style-name="T65">} </text:span></text:p><text:p text:style-name="P139"><text:span text:style-name="T65"><text:s text:c="20"/>:</text:span></text:p><text:p text:style-name="P139"><text:span text:style-name="T65"><text:s text:c="19"/>:</text:span></text:p></draw:text-box></draw:frame><draw:frame draw:style-name="fr2" draw:name="画像8" text:anchor-type="char" svg:x="10.878cm" svg:y="0.372cm" svg:width="5.719cm" svg:height="5.888cm" draw:z-index="46"><draw:image xlink:href="Pictures/10000000000001B5000001C22FE73483.png" xlink:type="simple" xlink:show="embed" xlink:actuate="onLoad" draw:mime-type="image/png"/></draw:frame></text:p>
      <text:p text:style-name="P76"/>
      <text:p text:style-name="P76"/>
      <text:p text:style-name="P76"/>
      <text:p text:style-name="P76"/>
      <text:p text:style-name="P76"/>
      <text:p text:style-name="P76"/>
      <text:h text:style-name="P141" text:outline-level="5"/>
      <text:h text:style-name="P141" text:outline-level="5"/>
      <text:h text:style-name="P141" text:outline-level="5"/>
      <text:h text:style-name="P141" text:outline-level="5"/>
      <text:p text:style-name="P142"><draw:frame draw:style-name="fr2" draw:name="画像9" text:anchor-type="char" svg:x="11.086cm" svg:y="0.12cm" svg:width="5.842cm" svg:height="6.055cm" draw:z-index="47"><draw:image xlink:href="Pictures/10000000000001B7000001C78A235AFE.png" xlink:type="simple" xlink:show="embed" xlink:actuate="onLoad" draw:mime-type="image/png"/></draw:frame></text:p>
      <text:p text:style-name="P142"/>
      <text:p text:style-name="P142"/>
      <text:p text:style-name="P142"/>
      <text:p text:style-name="P142"/>
      <text:p text:style-name="P142"/>
      <text:p text:style-name="P142"/>
      <text:p text:style-name="P142"/>
      <text:h text:style-name="P141" text:outline-level="5" text:is-list-header="true"/>
      <text:h text:style-name="P141" text:outline-level="5" text:is-list-header="true"><text:bookmark-start text:name="__RefHeading___Toc3478_995567988"/>３次元データ<text:bookmark-end text:name="__RefHeading___Toc3478_995567988"/></text:h>
      <text:p text:style-name="Standard">３次元の座標データは配列を使ってグラフィック関数に設定する。</text:p>
      <text:p text:style-name="P143">3Dのグラフィック関数にはこの配列データを使って行う</text:p>
      <text:p text:style-name="Standard"><text:tab/>座標データ <text:s/><text:span text:style-name="T75">p[] = { x, y, z }</text:span></text:p>
      <text:p text:style-name="Standard"><text:tab/> <text:s text:c="18"/><text:span text:style-name="T75">p[] =</text:span> <text:span text:style-name="T75">{ 1.2, 2.</text:span><text:span text:style-name="T76">0</text:span><text:span text:style-name="T75">, 3.</text:span><text:span text:style-name="T76">0</text:span><text:span text:style-name="T75"> }</text:span></text:p>
      <text:p text:style-name="Standard"><text:tab/>座標リスト <text:s/><text:span text:style-name="T75">pli</text:span><text:span text:style-name="T76">st</text:span><text:span text:style-name="T75">[,] = { { x1, y1, z1},</text:span></text:p>
      <text:p text:style-name="Standard"><text:tab/> <text:s text:c="36"/><text:span text:style-name="T75">{ x2, y2, z2},</text:span></text:p>
      <text:p text:style-name="Standard"><text:tab/> <text:s text:c="46"/>:</text:p>
      <text:p text:style-name="Standard"><text:tab/> <text:s text:c="37"/><text:span text:style-name="T75">{ xn, yn, zn }}</text:span></text:p>
      <text:p text:style-name="Standard"/>
      <text:p text:style-name="Standard"><text:bookmark-start text:name="__RefHeading___Toc3480_995567988"/><text:tab/>データの表示<text:tab/><text:span text:style-name="T76">plot3D.plotPolyline(plist);</text:span><text:bookmark-end text:name="__RefHeading___Toc3480_995567988"/></text:p>
      <text:h text:style-name="P144" text:outline-level="5" text:is-list-header="true"><text:bookmark-start text:name="__RefHeading___Toc1267_1915522117 Copy 1 Copy 1"/><text:span text:style-name="T77">3D</text:span>グラフィック関数<text:bookmark-end text:name="__RefHeading___Toc1267_1915522117 Copy 1 Copy 1"/></text:h>
      <text:p text:style-name="P135"/>
      <text:p text:style-name="P145">plot3D.setArea(min[],max[]); <text:tab/><text:tab/>3DViewの初期化と領域の設定</text:p>
      <text:p text:style-name="P146"><draw:frame text:anchor-type="paragraph" draw:z-index="59" draw:name="テキスト枠 19" draw:style-name="gr37" draw:text-style-name="P147" svg:width="5.317cm" svg:height="2.117cm" svg:x="7.915cm" svg:y="0.229cm"><draw:text-box><text:p><text:span text:style-name="T78">sp = -0.5; <text:s/>ep = <text:s/>0.5;</text:span></text:p><text:p><text:span text:style-name="T78">min[] = { sp, sp, sp };</text:span></text:p><text:p><text:span text:style-name="T78">max[] = { ep, ep, ep };</text:span></text:p><text:p><text:span text:style-name="T78">plot3D.setArea(min[],max[]);</text:span></text:p><text:p><text:span text:style-name="T78">plot3D.setAxisFrame(1,0);</text:span></text:p></draw:text-box></draw:frame><text:tab/><text:tab/></text:p>
      <text:p text:style-name="P146"/>
      <text:p text:style-name="P146"/>
      <text:p text:style-name="P146"/>
      <text:p text:style-name="P146"/>
      <text:p text:style-name="P145">plot3D.setAxisFrame(axis,frame); <text:tab/>軸<text:span text:style-name="T79">(axis)</text:span>とフレーム<text:span text:style-name="T79">(frame)</text:span>の表示(0:非表示/1:表示)</text:p>
      <text:p text:style-name="P135"><text:tab/><text:span text:style-name="T80">setArea() で指定した領域の軸方向とフレームを表示する</text:span></text:p>
      <text:p text:style-name="P135"/>
      <text:p text:style-name="P135"><draw:frame draw:style-name="fr2" draw:name="画像20" text:anchor-type="char" svg:x="9.373cm" svg:y="0cm" svg:width="4.314cm" svg:height="4.452cm" draw:z-index="60"><draw:image xlink:href="Pictures/10000000000001B5000001C3BD9C1CDB.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p text:style-name="P135"/>
      <text:p text:style-name="P145">plot3D.disp(); <text:tab/><text:tab/><text:tab/><text:tab/>登録した要素の表示</text:p>
      <text:p text:style-name="P148">　<text:span text:style-name="T80">plot3D.plotLine()等で登録したデータは</text:span>通常はプログラム実行後に表示されるが実行途中の状態を表示したいときや再表示に使用する。</text:p>
      <text:p text:style-name="P148"/>
      <text:p text:style-name="P148">plot3D.setColor("Blue"); <text:tab/><text:tab/><text:tab/>色の設定</text:p>
      <text:p text:style-name="P148">　表示データの色設定を行う、「色」と入力してから<text:span text:style-name="T81">F8キーまたは右Winキーを押すと使用できる色の一覧が表示される。</text:span></text:p>
      <text:p text:style-name="P148"/>
      <text:h text:style-name="Heading_20_5" text:outline-level="5" text:is-list-header="true"><text:bookmark-start text:name="__RefHeading___Toc5138_2346902822"/>3D要素表示関数<text:bookmark-end text:name="__RefHeading___Toc5138_2346902822"/></text:h>
      <text:p text:style-name="P148">plot3D.plotLine(sp[x/y/z],ep[x/y/z]); <text:tab/>線分の設定</text:p>
      <text:p text:style-name="P148"><draw:frame draw:style-name="fr2" draw:name="画像10" text:anchor-type="char" svg:x="8.908cm" svg:y="0.342cm" svg:width="3.32cm" svg:height="2.873cm" draw:z-index="49"><draw:image xlink:href="Pictures/10000000000000DF000000C19DA810A4.png" xlink:type="simple" xlink:show="embed" xlink:actuate="onLoad" draw:mime-type="image/png"/></draw:frame><text:tab/><text:tab/></text:p>
      <text:p text:style-name="P135"/>
      <text:p text:style-name="P135"><draw:frame text:anchor-type="paragraph" draw:z-index="61" draw:name="テキスト枠 23" draw:style-name="gr38" draw:text-style-name="P149" svg:width="5.894cm" svg:height="1.392cm" svg:x="1.901cm" svg:y="0.153cm"><draw:text-box><text:p><text:span text:style-name="T82">sp[] = { 1, 2, 2 };</text:span></text:p><text:p><text:span text:style-name="T82">ep[] = { 2, 3 ,2 };</text:span></text:p><text:p><text:span text:style-name="T82">plot3D.plotLine(sp[],ep[]);</text:span></text:p></draw:text-box></draw:frame></text:p>
      <text:p text:style-name="P135"/>
      <text:p text:style-name="P135"/>
      <text:p text:style-name="P135"/>
      <text:p text:style-name="P135"/>
      <text:p text:style-name="P135"/>
      <text:p text:style-name="P135"/>
      <text:p text:style-name="P145">plot3D.plotLines(plist[n,x/y/z]); <text:tab/><text:tab/>複数線分(pli<text:span text:style-name="T83">st)</text:span></text:p>
      <text:p text:style-name="P135"><text:tab/><text:tab/></text:p>
      <text:p text:style-name="P135"><draw:frame text:anchor-type="paragraph" draw:z-index="62" draw:name="テキスト枠 24" draw:style-name="gr39" draw:text-style-name="P149" svg:width="5.894cm" svg:height="3.075cm" svg:x="1.901cm" svg:y="0.404cm"><draw:text-box><text:p><text:span text:style-name="T82">Plist[,] = { </text:span></text:p><text:p><text:span text:style-name="T82"><text:tab/></text:span><text:span text:style-name="T82"><text:tab/></text:span><text:span text:style-name="T82">{ 2, 5, 2 },</text:span></text:p><text:p><text:span text:style-name="T82"><text:tab/></text:span><text:span text:style-name="T82"><text:tab/></text:span><text:span text:style-name="T82">{ 6, 2, 2 },</text:span></text:p><text:p><text:span text:style-name="T82"><text:tab/></text:span><text:span text:style-name="T82"><text:tab/></text:span><text:span text:style-name="T82">{ 5, 1, 2 },</text:span></text:p><text:p><text:span text:style-name="T82"><text:tab/></text:span><text:span text:style-name="T82"><text:tab/></text:span><text:span text:style-name="T82">{ 2, 1, 2 },</text:span></text:p><text:p><text:span text:style-name="T82">}</text:span></text:p><text:p><text:span text:style-name="T82">plot3D.plotLines(plist);</text:span></text:p></draw:text-box></draw:frame></text:p>
      <text:p text:style-name="P135"><draw:frame draw:style-name="fr2" draw:name="画像11" text:anchor-type="char" svg:x="8.804cm" svg:y="0.113cm" svg:width="7.08cm" svg:height="2.503cm" draw:z-index="50"><draw:image xlink:href="Pictures/100000000000017B00000086DEE52544.png" xlink:type="simple" xlink:show="embed" xlink:actuate="onLoad" draw:mime-type="image/png"/></draw:frame></text:p>
      <text:p text:style-name="P135"/>
      <text:p text:style-name="P135"/>
      <text:p text:style-name="P135"/>
      <text:p text:style-name="P135"/>
      <text:p text:style-name="P135"><text:soft-page-break/></text:p>
      <text:p text:style-name="P135"/>
      <text:p text:style-name="P148">plot3D.plotPolyline(plist[n,x/y/z]); <text:tab/><text:tab/>ポリライン</text:p>
      <text:p text:style-name="P150"><draw:frame draw:style-name="fr2" draw:name="画像12" text:anchor-type="char" svg:x="9.243cm" svg:y="0.242cm" svg:width="7.56cm" svg:height="3.235cm" draw:z-index="51"><draw:image xlink:href="Pictures/1000000000000199000000AFA74E66BE.png" xlink:type="simple" xlink:show="embed" xlink:actuate="onLoad" draw:mime-type="image/png"/></draw:frame><text:tab/><text:tab/></text:p>
      <text:p text:style-name="P135"><draw:frame text:anchor-type="paragraph" draw:z-index="63" draw:name="テキスト枠 25" draw:style-name="gr40" draw:text-style-name="P149" svg:width="5.894cm" svg:height="3.352cm" svg:x="1.901cm" svg:y="0.153cm"><draw:text-box><text:p><text:span text:style-name="T82">Plist[,] = { </text:span></text:p><text:p><text:span text:style-name="T82"><text:tab/></text:span><text:span text:style-name="T82"><text:tab/></text:span><text:span text:style-name="T82">{ 6, 5, 2 },</text:span></text:p><text:p><text:span text:style-name="T82"><text:tab/></text:span><text:span text:style-name="T82"><text:tab/></text:span><text:span text:style-name="T82">{ 4, 6, 2 },</text:span></text:p><text:p><text:span text:style-name="T82"><text:tab/></text:span><text:span text:style-name="T82"><text:tab/></text:span><text:span text:style-name="T82">{ 2, 4, 2 },</text:span></text:p><text:p><text:span text:style-name="T82"><text:tab/></text:span><text:span text:style-name="T82"><text:tab/></text:span><text:span text:style-name="T82">{ 3, 1, 2 },</text:span></text:p><text:p><text:span text:style-name="T82"><text:tab/></text:span><text:span text:style-name="T82"><text:tab/></text:span><text:span text:style-name="T82">{ 5, 2, 2 },</text:span></text:p><text:p><text:span text:style-name="T82">}</text:span></text:p><text:p><text:span text:style-name="T82">plot3D.plotPolyline(plist);</text:span></text:p><text:p><text:span text:style-name="T82"/></text:p></draw:text-box></draw:frame></text:p>
      <text:p text:style-name="P135"/>
      <text:p text:style-name="P135"/>
      <text:p text:style-name="P135"/>
      <text:p text:style-name="P135"/>
      <text:p text:style-name="P135"/>
      <text:p text:style-name="P135"/>
      <text:p text:style-name="P145">plot3D.plotPolyloop(plist[n,x/y/z]); <text:tab/><text:tab/>ポリラインループ</text:p>
      <text:p text:style-name="P150"/>
      <text:p text:style-name="P150"><text:tab/><text:tab/><draw:frame draw:style-name="fr2" draw:name="画像13" text:anchor-type="char" svg:x="8.998cm" svg:y="0.187cm" svg:width="8.581cm" svg:height="2.683cm" draw:z-index="52"><draw:image xlink:href="Pictures/10000000000001B300000088E445FE7E.png" xlink:type="simple" xlink:show="embed" xlink:actuate="onLoad" draw:mime-type="image/png"/></draw:frame></text:p>
      <text:p text:style-name="P150"><draw:frame text:anchor-type="paragraph" draw:z-index="64" draw:name="テキスト枠 26" draw:style-name="gr40" draw:text-style-name="P149" svg:width="5.894cm" svg:height="3.352cm" svg:x="1.901cm" svg:y="0.153cm"><draw:text-box><text:p><text:span text:style-name="T82">Plis[,]} = { </text:span></text:p><text:p><text:span text:style-name="T82"><text:tab/></text:span><text:span text:style-name="T82"><text:tab/></text:span><text:span text:style-name="T82">{ 6, 5, 2 },</text:span></text:p><text:p><text:span text:style-name="T82"><text:tab/></text:span><text:span text:style-name="T82"><text:tab/></text:span><text:span text:style-name="T82">{ 4, 6, 2 },</text:span></text:p><text:p><text:span text:style-name="T82"><text:tab/></text:span><text:span text:style-name="T82"><text:tab/></text:span><text:span text:style-name="T82">{ 2, 4, 2 },</text:span></text:p><text:p><text:span text:style-name="T82"><text:tab/></text:span><text:span text:style-name="T82"><text:tab/></text:span><text:span text:style-name="T82">{ 3, 1, 2 },</text:span></text:p><text:p><text:span text:style-name="T82"><text:tab/></text:span><text:span text:style-name="T82"><text:tab/></text:span><text:span text:style-name="T82">{ 5, 2, 2 },</text:span></text:p><text:p><text:span text:style-name="T82">}</text:span></text:p><text:p><text:span text:style-name="T82">plot3D.plotPolylloop(plist);</text:span></text:p><text:p><text:span text:style-name="T82"/></text:p></draw:text-box></draw:frame><text:tab/></text:p>
      <text:p text:style-name="P150"><text:tab/></text:p>
      <text:p text:style-name="P150"><text:tab/></text:p>
      <text:p text:style-name="P150"><text:tab/></text:p>
      <text:p text:style-name="P150"><text:tab/></text:p>
      <text:p text:style-name="P150"><text:tab/></text:p>
      <text:p text:style-name="P135"/>
      <text:p text:style-name="P135"/>
      <text:p text:style-name="P145">plot3D.plotPolygon(plist[n,x/y/z]); <text:tab/><text:tab/>ポリゴン(塗潰し)</text:p>
      <text:p text:style-name="P135"/>
      <text:p text:style-name="P135"><draw:frame text:anchor-type="paragraph" draw:z-index="65" draw:name="テキスト枠 27" draw:style-name="gr40" draw:text-style-name="P149" svg:width="5.894cm" svg:height="3.352cm" svg:x="2.214cm" svg:y="0.115cm"><draw:text-box><text:p><text:span text:style-name="T82">Plist[,] = { </text:span></text:p><text:p><text:span text:style-name="T82"><text:tab/></text:span><text:span text:style-name="T82"><text:tab/></text:span><text:span text:style-name="T82">{ 6, 5, 2 },</text:span></text:p><text:p><text:span text:style-name="T82"><text:tab/></text:span><text:span text:style-name="T82"><text:tab/></text:span><text:span text:style-name="T82">{ 4, 6, 2 },</text:span></text:p><text:p><text:span text:style-name="T82"><text:tab/></text:span><text:span text:style-name="T82"><text:tab/></text:span><text:span text:style-name="T82">{ 2, 4, 2 },</text:span></text:p><text:p><text:span text:style-name="T82"><text:tab/></text:span><text:span text:style-name="T82"><text:tab/></text:span><text:span text:style-name="T82">{ 3, 1, 2 },</text:span></text:p><text:p><text:span text:style-name="T82"><text:tab/></text:span><text:span text:style-name="T82"><text:tab/></text:span><text:span text:style-name="T82">{ 5, 2, 2 },</text:span></text:p><text:p><text:span text:style-name="T82">}</text:span></text:p><text:p><text:span text:style-name="T82">plot3D.plotPolygon(plist);</text:span></text:p><text:p><text:span text:style-name="T82"/></text:p></draw:text-box></draw:frame><draw:frame draw:style-name="fr2" draw:name="画像14" text:anchor-type="char" svg:x="9.075cm" svg:y="0.314cm" svg:width="7.893cm" svg:height="2.861cm" draw:z-index="53"><draw:image xlink:href="Pictures/10000000000001A90000009A90423B3A.png" xlink:type="simple" xlink:show="embed" xlink:actuate="onLoad" draw:mime-type="image/png"/></draw:frame></text:p>
      <text:p text:style-name="P135"/>
      <text:p text:style-name="P135"/>
      <text:p text:style-name="P135"/>
      <text:p text:style-name="P135"/>
      <text:p text:style-name="P135"/>
      <text:p text:style-name="P135"/>
      <text:p text:style-name="P135"/>
      <text:p text:style-name="P145">plot3D.plotTrianges(plist[n,x/y/z]); <text:tab/><text:tab/>複数三角形(塗潰し)</text:p>
      <text:p text:style-name="P135"><draw:frame text:anchor-type="paragraph" draw:z-index="66" draw:name="テキスト枠 28" draw:style-name="gr41" draw:text-style-name="P149" svg:width="5.894cm" svg:height="3.724cm" svg:x="2.117cm" svg:y="0.312cm"><draw:text-box><text:p><text:span text:style-name="T82">Plist[,] = { </text:span></text:p><text:p><text:span text:style-name="T82"><text:tab/></text:span><text:span text:style-name="T82"><text:tab/></text:span><text:span text:style-name="T82">{ 6, 5, 2 },</text:span></text:p><text:p><text:span text:style-name="T82"><text:tab/></text:span><text:span text:style-name="T82"><text:tab/></text:span><text:span text:style-name="T82">{ 4, 6, 2 },</text:span></text:p><text:p><text:span text:style-name="T82"><text:tab/></text:span><text:span text:style-name="T82"><text:tab/></text:span><text:span text:style-name="T82">{ 2, 4, 2 },</text:span></text:p><text:p><text:span text:style-name="T82"><text:tab/></text:span><text:span text:style-name="T82"><text:tab/></text:span><text:span text:style-name="T82">{ 3, 1, 2 },</text:span></text:p><text:p><text:span text:style-name="T82"><text:tab/></text:span><text:span text:style-name="T82">{ 6, 0, 2 },</text:span></text:p><text:p><text:span text:style-name="T82"><text:tab/></text:span><text:span text:style-name="T82"><text:tab/></text:span><text:span text:style-name="T82">{ 7, 5, 2 },</text:span></text:p><text:p><text:span text:style-name="T82">}</text:span></text:p><text:p><text:span text:style-name="T82">plot3D.plotTrianges(plist);</text:span></text:p><text:p><text:span text:style-name="T82"/></text:p></draw:text-box></draw:frame><draw:frame draw:style-name="fr2" draw:name="画像15" text:anchor-type="char" svg:x="9.386cm" svg:y="0.314cm" svg:width="7.179cm" svg:height="2.455cm" draw:z-index="54"><draw:image xlink:href="Pictures/100000000000015F00000078C51A5D75.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p text:style-name="P145">plot3D.plotTriangeStrip(plist[n,x/y/z]); <text:tab/>連続三角形</text:p>
      <text:p text:style-name="P135"><draw:frame draw:style-name="fr2" draw:name="画像16" text:anchor-type="char" svg:x="9.804cm" svg:y="0cm" svg:width="6.969cm" svg:height="2.406cm" draw:z-index="55"><draw:image xlink:href="Pictures/100000000000018D000000899ED7DC28.png" xlink:type="simple" xlink:show="embed" xlink:actuate="onLoad" draw:mime-type="image/png"/></draw:frame></text:p>
      <text:p text:style-name="P135"><draw:frame text:anchor-type="paragraph" draw:z-index="67" draw:name="テキスト枠 29" draw:style-name="gr41" draw:text-style-name="P149" svg:width="5.894cm" svg:height="3.724cm" svg:x="2.117cm" svg:y="0.3cm"><draw:text-box><text:p><text:span text:style-name="T82">Plist[,] = { </text:span></text:p><text:p><text:span text:style-name="T82"><text:tab/></text:span><text:span text:style-name="T82"><text:tab/></text:span><text:span text:style-name="T82">{ 1, 5, <text:s text:c="2"/>2 },</text:span></text:p><text:p><text:span text:style-name="T82"><text:tab/></text:span><text:span text:style-name="T82"><text:tab/></text:span><text:span text:style-name="T82">{ 1, 4, <text:s text:c="2"/>2 },</text:span></text:p><text:p><text:span text:style-name="T82"><text:tab/></text:span><text:span text:style-name="T82"><text:tab/></text:span><text:span text:style-name="T82">{ 2, 5, <text:s text:c="2"/>2 },</text:span></text:p><text:p><text:span text:style-name="T82"><text:tab/></text:span><text:span text:style-name="T82"><text:tab/></text:span><text:span text:style-name="T82">{ 2, 4, <text:s text:c="2"/>2 },</text:span></text:p><text:p><text:span text:style-name="T82"><text:tab/></text:span><text:span text:style-name="T82">{ 3, 4.5, 2 },</text:span></text:p><text:p><text:span text:style-name="T82"><text:tab/></text:span><text:span text:style-name="T82"><text:tab/></text:span><text:span text:style-name="T82">{ 3, 3.5, 2 },</text:span></text:p><text:p><text:span text:style-name="T82">}</text:span></text:p><text:p><text:span text:style-name="T82">plot3D.plotTriangeStrip(plist);</text:span></text:p><text:p><text:span text:style-name="T82"/></text:p></draw:text-box></draw:frame></text:p>
      <text:p text:style-name="P135"/>
      <text:p text:style-name="P135"/>
      <text:p text:style-name="P135"/>
      <text:p text:style-name="P135"/>
      <text:p text:style-name="P135"/>
      <text:p text:style-name="P135"/>
      <text:p text:style-name="P135"><text:soft-page-break/></text:p>
      <text:p text:style-name="P148">plot3D.plotQuads(plist[n,x/y/z]); <text:tab/><text:tab/>複数四角形</text:p>
      <text:p text:style-name="P135"><draw:frame draw:style-name="fr2" draw:name="画像17" text:anchor-type="char" svg:x="9.622cm" svg:y="0.168cm" svg:width="6.255cm" svg:height="3.584cm" draw:z-index="77"><draw:image xlink:href="Pictures/1000000000000148000000BCC6C58C31.png" xlink:type="simple" xlink:show="embed" xlink:actuate="onLoad" draw:mime-type="image/png"/></draw:frame></text:p>
      <text:p text:style-name="P135"/>
      <text:p text:style-name="P135"><draw:frame text:anchor-type="paragraph" draw:z-index="78" draw:name="テキスト枠 37" draw:style-name="gr42" draw:text-style-name="P149" svg:width="5.245cm" svg:height="4.097cm" svg:x="2.117cm" svg:y="0.083cm"><draw:text-box><text:p><text:span text:style-name="T82">Plist[,] = { </text:span></text:p><text:p><text:span text:style-name="T82"><text:tab/></text:span><text:span text:style-name="T82"><text:tab/></text:span><text:span text:style-name="T82">{ 5, <text:s/>5, <text:s/>2 },</text:span></text:p><text:p><text:span text:style-name="T82"><text:tab/></text:span><text:span text:style-name="T82"><text:tab/></text:span><text:span text:style-name="T82">{ 3, <text:s/>4, <text:s/>2 },</text:span></text:p><text:p><text:span text:style-name="T82"><text:tab/></text:span><text:span text:style-name="T82"><text:tab/></text:span><text:span text:style-name="T82">{ 1, <text:s/>2, <text:s/>2 },</text:span></text:p><text:p><text:span text:style-name="T82"><text:tab/></text:span><text:span text:style-name="T82"><text:tab/></text:span><text:span text:style-name="T82">{ 4, <text:s/>1, <text:s/>2 },</text:span></text:p><text:p><text:span text:style-name="T82"><text:tab/></text:span><text:span text:style-name="T82">{ 6, <text:s/>1, <text:s/>2 },</text:span></text:p><text:p><text:span text:style-name="T82"><text:tab/></text:span><text:span text:style-name="T82"><text:tab/></text:span><text:span text:style-name="T82">{ 7, -1, 2 },</text:span></text:p><text:p><text:span text:style-name="T82"><text:tab/></text:span><text:span text:style-name="T82"><text:tab/></text:span><text:span text:style-name="T82">{ 8, <text:s/>3, <text:s/>2 },</text:span></text:p><text:p><text:span text:style-name="T82"><text:tab/></text:span><text:span text:style-name="T82"><text:tab/></text:span><text:span text:style-name="T82">{ 7, <text:s/>5, <text:s/>2 },</text:span></text:p><text:p><text:span text:style-name="T82">}</text:span></text:p><text:p><text:span text:style-name="T82">plot3D.plotQuads(plist);</text:span></text:p></draw:text-box></draw:frame></text:p>
      <text:p text:style-name="P135"/>
      <text:p text:style-name="P135"/>
      <text:p text:style-name="P135"/>
      <text:p text:style-name="P135"/>
      <text:p text:style-name="P135"/>
      <text:p text:style-name="P135"/>
      <text:p text:style-name="P135"/>
      <text:p text:style-name="P135"/>
      <text:p text:style-name="P145">plot3D.plotQuadeStrip(plist[n,x/y/z]); <text:tab/>連続四角形</text:p>
      <text:p text:style-name="P135"/>
      <text:p text:style-name="P135"><draw:frame draw:style-name="fr2" draw:name="画像18" text:anchor-type="char" svg:x="9.52cm" svg:y="0.337cm" svg:width="7.392cm" svg:height="2.902cm" draw:z-index="56"><draw:image xlink:href="Pictures/100000000000015D00000089E9C00E28.png" xlink:type="simple" xlink:show="embed" xlink:actuate="onLoad" draw:mime-type="image/png"/></draw:frame></text:p>
      <text:p text:style-name="P135"><draw:frame text:anchor-type="paragraph" draw:z-index="79" draw:name="テキスト枠 38" draw:style-name="gr42" draw:text-style-name="P149" svg:width="5.245cm" svg:height="4.097cm" svg:x="2.117cm" svg:y="0.173cm"><draw:text-box><text:p><text:span text:style-name="T82">Plist[,] = { </text:span></text:p><text:p><text:span text:style-name="T82"><text:tab/></text:span><text:span text:style-name="T82"><text:tab/></text:span><text:span text:style-name="T82">{ 0, <text:s/>5, <text:s/>2 },</text:span></text:p><text:p><text:span text:style-name="T82"><text:tab/></text:span><text:span text:style-name="T82"><text:tab/></text:span><text:span text:style-name="T82">{ 0, <text:s/>2, <text:s/>2 },</text:span></text:p><text:p><text:span text:style-name="T82"><text:tab/></text:span><text:span text:style-name="T82"><text:tab/></text:span><text:span text:style-name="T82">{ 2, <text:s/>5, <text:s/>2 },</text:span></text:p><text:p><text:span text:style-name="T82"><text:tab/></text:span><text:span text:style-name="T82"><text:tab/></text:span><text:span text:style-name="T82">{ 2, <text:s/>1, <text:s/>2 },</text:span></text:p><text:p><text:span text:style-name="T82"><text:tab/></text:span><text:span text:style-name="T82">{ 5, <text:s/>4, <text:s/>2 },</text:span></text:p><text:p><text:span text:style-name="T82"><text:tab/></text:span><text:span text:style-name="T82"><text:tab/></text:span><text:span text:style-name="T82">{ 4, <text:s/>2, <text:s/>2 },</text:span></text:p><text:p><text:span text:style-name="T82"><text:tab/></text:span><text:span text:style-name="T82"><text:tab/></text:span><text:span text:style-name="T82">{ 7, <text:s/>5, <text:s/>2 },</text:span></text:p><text:p><text:span text:style-name="T82"><text:tab/></text:span><text:span text:style-name="T82"><text:tab/></text:span><text:span text:style-name="T82">{ 6, <text:s/>0, <text:s/>2 },</text:span></text:p><text:p><text:span text:style-name="T82">}</text:span></text:p><text:p><text:span text:style-name="T82">plot3D.plotQuadeStrip(plist);</text:span></text:p></draw:text-box></draw:frame></text:p>
      <text:p text:style-name="P135"/>
      <text:p text:style-name="P135"/>
      <text:p text:style-name="P135"/>
      <text:p text:style-name="P135"/>
      <text:p text:style-name="P135"/>
      <text:p text:style-name="P135"/>
      <text:p text:style-name="P135"/>
      <text:p text:style-name="P135"/>
      <text:p text:style-name="P135"/>
      <text:p text:style-name="P145">plot3D.plotTriangeFan(plist[n,x/y/z]); <text:tab/>扇形の連続三角形</text:p>
      <text:p text:style-name="P135"/>
      <text:p text:style-name="P135"/>
      <text:p text:style-name="P135"><draw:frame text:anchor-type="paragraph" draw:z-index="80" draw:name="テキスト枠 39" draw:style-name="gr43" draw:text-style-name="P149" svg:width="5.245cm" svg:height="3.391cm" svg:x="2.117cm" svg:y="0.356cm"><draw:text-box><text:p><text:span text:style-name="T82">Plist[,] = { </text:span></text:p><text:p><text:span text:style-name="T82"><text:tab/></text:span><text:span text:style-name="T82"><text:tab/></text:span><text:span text:style-name="T82">{ 8, <text:s/>5, <text:s/>2 },</text:span></text:p><text:p><text:span text:style-name="T82"><text:tab/></text:span><text:span text:style-name="T82"><text:tab/></text:span><text:span text:style-name="T82">{ 5, <text:s/>6, <text:s/>2 },</text:span></text:p><text:p><text:span text:style-name="T82"><text:tab/></text:span><text:span text:style-name="T82"><text:tab/></text:span><text:span text:style-name="T82">{ 2, <text:s/>4, <text:s/>2 },</text:span></text:p><text:p><text:span text:style-name="T82"><text:tab/></text:span><text:span text:style-name="T82"><text:tab/></text:span><text:span text:style-name="T82">{ 5, <text:s/>1, <text:s/>2 },</text:span></text:p><text:p><text:span text:style-name="T82"><text:tab/></text:span><text:span text:style-name="T82">{ 7, <text:s/>2, <text:s/>2 },</text:span></text:p><text:p><text:span text:style-name="T82">}</text:span></text:p><text:p><text:span text:style-name="T82">plot3D.plotTriangeFan(plist);</text:span></text:p></draw:text-box></draw:frame><draw:frame draw:style-name="fr2" draw:name="画像19" text:anchor-type="char" svg:x="8.514cm" svg:y="0.229cm" svg:width="8.557cm" svg:height="2.577cm" draw:z-index="57"><draw:image xlink:href="Pictures/100000000000018B00000077975DDC64.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h text:style-name="P151" text:outline-level="5" text:is-list-header="true"><text:bookmark-start text:name="__RefHeading___Toc5140_2346902822"/>3D要素座標変換関数<text:bookmark-end text:name="__RefHeading___Toc5140_2346902822"/></text:h>
      <text:p text:style-name="P152"/>
      <text:p text:style-name="P153">plot3D.plotTranslate(vec[]); <text:tab/><text:tab/>移動(移動量 vec[x/y/z])</text:p>
      <text:p text:style-name="P153">　描画関数を実行する前に描画関数のデータを移動する<text:span text:style-name="T81">(移動量を変換マトリックスに追加)</text:span></text:p>
      <text:p text:style-name="P153"><draw:frame text:anchor-type="paragraph" draw:z-index="81" draw:name="テキスト枠 20" draw:style-name="gr38" draw:text-style-name="P149" svg:width="5.894cm" svg:height="1.392cm" svg:x="1.371cm" svg:y="0.201cm"><draw:text-box><text:p><text:span text:style-name="T82">v[] = { 0, 0, <text:s/>d };</text:span></text:p><text:p><text:span text:style-name="T82">plot3D.plotTranslate(v[]);</text:span></text:p><text:p><text:span text:style-name="T82">plot3D.plotQuadeStrip(p[,]);</text:span></text:p></draw:text-box></draw:frame></text:p>
      <text:p text:style-name="P153"/>
      <text:p text:style-name="P153"/>
      <text:p text:style-name="P153"/>
      <text:p text:style-name="P153"/>
      <text:p text:style-name="P153">plot3D.plotRotate(angle,"X"); <text:tab/><text:tab/>回転(回転角度,回転軸<text:span text:style-name="T84">[“</text:span>X”/”Y”/”Z”<text:span text:style-name="T84">]</text:span>)</text:p>
      <text:p text:style-name="P153">　描画関数を実行する前に描画関数のデータを指定軸で回転する<text:span text:style-name="T81">(回転データをを変換マトリックスに追加)</text:span></text:p>
      <text:p text:style-name="P153"><draw:frame text:anchor-type="paragraph" draw:z-index="82" draw:name="テキスト枠 21" draw:style-name="gr44" draw:text-style-name="P149" svg:width="5.894cm" svg:height="5.213cm" svg:x="1.323cm" svg:y="0.153cm"><draw:text-box><text:p><text:span text:style-name="T82">plot3D.setColor("Brown");</text:span></text:p><text:p><text:span text:style-name="T82">p[,] = plateData(1,1);</text:span></text:p><text:p><text:span text:style-name="T82">plot3D.plotPolygon(p[,]);</text:span></text:p><text:p><text:span text:style-name="T82">plot3D.plotRotate(RAD(90), "X");</text:span></text:p><text:p><text:span text:style-name="T82">plot3D.setColor("Green");</text:span></text:p><text:p><text:span text:style-name="T82">plot3D.plotPolygon(p[,]);</text:span></text:p><text:p><text:span text:style-name="T82"/></text:p><text:p><text:span text:style-name="T82">plateData(w, h) {</text:span></text:p><text:p><text:span text:style-name="T82"><text:tab/></text:span><text:span text:style-name="T82">p[0,] = { 0, h, 0 };</text:span></text:p><text:p><text:span text:style-name="T82"><text:tab/></text:span><text:span text:style-name="T82">p[1,] = { w, h, 0 };</text:span></text:p><text:p><text:span text:style-name="T82"><text:tab/></text:span><text:span text:style-name="T82">p[2,] = { w, 0, 0 };</text:span></text:p><text:p><text:span text:style-name="T82"><text:tab/></text:span><text:span text:style-name="T82">p[3,] = { 0, 0, 0 };</text:span></text:p><text:p><text:span text:style-name="T82"><text:tab/></text:span><text:span text:style-name="T82">return p[,];</text:span></text:p><text:p><text:span text:style-name="T82">}</text:span></text:p></draw:text-box></draw:frame><draw:frame draw:style-name="fr2" draw:name="画像21" text:anchor-type="char" svg:x="8.467cm" svg:y="0.455cm" svg:width="5.126cm" svg:height="4.681cm" draw:z-index="83"><draw:image xlink:href="Pictures/100000000000016500000146A64E14E6.png" xlink:type="simple" xlink:show="embed" xlink:actuate="onLoad" draw: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plot3D.plotScale(scale[]); <text:tab/><text:tab/><text:tab/>縮小拡大 (拡大率 scale[x/y/z])</text:p>
      <text:p text:style-name="P153">　表示要素を原点を中心に指定した倍率で拡大、縮小する。<text:span text:style-name="T81">(拡大率を変換マトリックスに追加)</text:span></text:p>
      <text:p text:style-name="P153"><draw:frame text:anchor-type="paragraph" draw:z-index="84" draw:name="テキスト枠 22" draw:style-name="gr42" draw:text-style-name="P149" svg:width="5.894cm" svg:height="4.097cm" svg:x="1.323cm" svg:y="0.153cm"><draw:text-box><text:p><text:span text:style-name="T82">plot3D.setColor("Brown");</text:span></text:p><text:p><text:span text:style-name="T82">p[,] = plateData(1,1);</text:span></text:p><text:p><text:span text:style-name="T82">plot3D.plotPolygon(p[,]);</text:span></text:p><text:p><text:span text:style-name="T82"/></text:p><text:p><text:span text:style-name="T82">sc[] = { 1.5, 1, 1.5 };</text:span></text:p><text:p><text:span text:style-name="T82">plot3D.plotScale(sc[]);</text:span></text:p><text:p><text:span text:style-name="T82"/></text:p><text:p><text:span text:style-name="T82">plot3D.plotRotate(RAD(90), "X");</text:span></text:p><text:p><text:span text:style-name="T82">plot3D.setColor("Green");</text:span></text:p><text:p><text:span text:style-name="T82">plot3D.plotPolygon(p[,]);</text:span></text:p><text:p><text:span text:style-name="T82"/></text:p></draw:text-box></draw:frame><draw:frame draw:style-name="fr2" draw:name="画像22" text:anchor-type="char" svg:x="9.077cm" svg:y="0.09cm" svg:width="5.486cm" svg:height="4.493cm" draw:z-index="85"><draw:image xlink:href="Pictures/1000000000000151000001143CEE6B75.png" xlink:type="simple" xlink:show="embed" xlink:actuate="onLoad" draw:mime-type="image/png"/></draw:frame></text:p>
      <text:p text:style-name="P153"/>
      <text:p text:style-name="P153"/>
      <text:p text:style-name="P153"/>
      <text:p text:style-name="P153"/>
      <text:p text:style-name="P153"/>
      <text:p text:style-name="P153"/>
      <text:p text:style-name="P153"/>
      <text:p text:style-name="P153"/>
      <text:p text:style-name="P153"/>
      <text:p text:style-name="P153">plot3D.plotReset(); <text:tab/><text:tab/><text:tab/>座標変換マトリックスをクリア</text:p>
      <text:p text:style-name="P153">　表示要素の移動や回転などを行う変換マトリックスの値をリセットする。</text:p>
      <text:p text:style-name="P153"/>
      <text:p text:style-name="P153">plot3D.plotPush(); <text:tab/><text:tab/><text:tab/>座標変換マトリックスをスタックに保存</text:p>
      <text:p text:style-name="P153">　変換マトリックスを一時的に変更する場合などに使用する。一度スタックに保存した変換マトリックスは最後に保存した変換マトリックスから <text:span text:style-name="T85">plotPop() で変換マトリックスが再設定される。</text:span></text:p>
      <text:p text:style-name="P153"/>
      <text:p text:style-name="P153">plot3D.plotPop(); <text:tab/><text:tab/><text:tab/><text:tab/>座標変換マトリックスをスタックから戻す</text:p>
      <text:p text:style-name="P153">　<text:span text:style-name="T85">plotPush() でスタックに保存された変換マトリックスを取り出し再設定する</text:span></text:p>
      <text:p text:style-name="P153"/>
      <text:p text:style-name="P153">plot3D.plotPeekMulti(); <text:tab/><text:tab/><text:tab/>座標変換マトリックスにスタックの値をかける</text:p>
      <text:h text:style-name="Heading_20_5" text:outline-level="5" text:is-list-header="true"><text:bookmark-start text:name="__RefHeading___Toc5142_2346902822"/><text:soft-page-break/>3D座標データの座標変換関数<text:bookmark-end text:name="__RefHeading___Toc5142_2346902822"/></text:h>
      <text:p text:style-name="P148">plot3D.translate(pos[],vec[]); <text:tab/><text:tab/>3D座標の移動(3D座標,移動量)</text:p>
      <text:p text:style-name="P154">座標データの移動を行う関数で機能的には <text:s/>plotTranslate<text:span text:style-name="T86">()と同じであるが <text:s/></text:span>plotTranslate<text:span text:style-name="T86">() がグラフィック処理に登録したデータに対して行うのに対し、登録前の座標データに対して座標変換をおこなう。</text:span></text:p>
      <text:p text:style-name="P155"/>
      <text:p text:style-name="P155"><draw:frame text:anchor-type="paragraph" draw:z-index="68" draw:name="テキスト枠 30" draw:style-name="gr45" draw:text-style-name="P149" svg:width="5.894cm" svg:height="1.491cm" svg:x="1.63cm" svg:y="-0.093cm"><draw:text-box><text:p><text:span text:style-name="T82">cir[,] = circle(r,n);</text:span></text:p><text:p><text:span text:style-name="T82">vec[] = { cx, cy, 0 };</text:span></text:p><text:p><text:span text:style-name="T82">cir[,] = plot3D.translate(cir[,],vec[]);</text:span></text:p><text:p><text:span text:style-name="T82"/></text:p></draw:text-box></draw:frame></text:p>
      <text:p text:style-name="P155"/>
      <text:p text:style-name="P135"/>
      <text:p text:style-name="P156"/>
      <text:p text:style-name="P156">plot3D.rotate(pos[],angle,<text:span text:style-name="T84">axis</text:span>); <text:tab/>3D座標の回転(3D座標,回転角,回転軸<text:span text:style-name="T87">[“</text:span><text:span text:style-name="T88">X”/”Y”/”Z”</text:span><text:span text:style-name="T87">]</text:span>)</text:p>
      <text:p text:style-name="P157"/>
      <text:p text:style-name="P158"/>
      <text:p text:style-name="P158"><draw:frame text:anchor-type="paragraph" draw:z-index="69" draw:name="テキスト枠 31" draw:style-name="gr46" draw:text-style-name="P149" svg:width="6.996cm" svg:height="1.401cm" svg:x="1.901cm" svg:y="0.228cm"><draw:text-box><text:p><text:span text:style-name="T82">cir[,] = circle(r2,4);</text:span></text:p><text:p><text:span text:style-name="T82">cir[,] = plot3D.rotate(cir[,],RAD(45),"Z");</text:span></text:p><text:p><text:span text:style-name="T82"/></text:p></draw:text-box></draw:frame></text:p>
      <text:p text:style-name="P158"/>
      <text:p text:style-name="P158"/>
      <text:p text:style-name="P158"/>
      <text:p text:style-name="P148">plot3D.rotateAxis(pos[,],angle,axis[]); 3D座標を指定軸で回転(3D座標,回転角,回転軸ベクトル</text:p>
      <text:p text:style-name="P148"/>
      <text:p text:style-name="P148"/>
      <text:p text:style-name="P148"/>
      <text:p text:style-name="P148"/>
      <text:p text:style-name="P148">plot3D.scale(pos[],cp[],scale); <text:tab/><text:tab/>3D座標の拡大縮小(3D座標,拡大中心,拡大率)</text:p>
      <text:p text:style-name="P159"/>
      <text:p text:style-name="P160"/>
      <text:p text:style-name="P160"><draw:frame text:anchor-type="paragraph" draw:z-index="70" draw:name="テキスト枠 32" draw:style-name="gr47" draw:text-style-name="P149" svg:width="6.13cm" svg:height="1.751cm" svg:x="1.901cm" svg:y="0.153cm"><draw:text-box><text:p><text:span text:style-name="T82">cir[,] = circle(r,n);</text:span></text:p><text:p><text:span text:style-name="T82">vec[] = { cx, cy, 0 };</text:span></text:p><text:p><text:span text:style-name="T82">cir[,] = plot3D.translate(cir[,],vec[]);</text:span></text:p><text:p><text:span text:style-name="T82">cir[,] = plot3D.scale(cir[,],vec[],0.5);</text:span></text:p></draw:text-box></draw:frame></text:p>
      <text:p text:style-name="P160"/>
      <text:p text:style-name="P160"/>
      <text:p text:style-name="P160"/>
      <text:p text:style-name="P160"/>
      <text:p text:style-name="P160"/>
      <text:h text:style-name="P161" text:outline-level="5" text:is-list-header="true"><text:bookmark-start text:name="__RefHeading___Toc5142_2346902822 Copy 1"/>3D座標データ作成関数<text:bookmark-end text:name="__RefHeading___Toc5142_2346902822 Copy 1"/></text:h>
      <text:p text:style-name="P148">plot3D.holePlateQuads(outline[,],innerLine[,],,);<text:tab/><text:tab/>中抜きの平面データの作成</text:p>
      <text:p text:style-name="P159">ポリゴンで囲まれた領域にポリゴンで穴が開けられた状態のデータを作成する。</text:p>
      <text:p text:style-name="P160">外側のポリゴン領域<text:span text:style-name="T89">(outline[,])と内側のポリゴン領域(innerLine[,])を指定する。</text:span></text:p>
      <text:p text:style-name="P160">内側の領域は複数指定することができる。</text:p>
      <text:p text:style-name="P160">表示する領域は複数の四角形<text:span text:style-name="T89">(QUADS)に分割されており、plot3D.plotQuads(p[,])で表示する。</text:span></text:p>
      <text:p text:style-name="P160"/>
      <text:p text:style-name="P160"><draw:frame draw:style-name="fr2" draw:name="画像23" text:anchor-type="char" svg:x="11.019cm" svg:y="0.432cm" svg:width="5.041cm" svg:height="4.681cm" draw:z-index="73"><draw:image xlink:href="Pictures/100000000000015F0000014693CFADFE.png" xlink:type="simple" xlink:show="embed" xlink:actuate="onLoad" draw:mime-type="image/png"/></draw:frame></text:p>
      <text:p text:style-name="P160"><draw:frame text:anchor-type="paragraph" draw:z-index="71" draw:name="テキスト枠 33" draw:style-name="gr48" draw:text-style-name="P149" svg:width="8.415cm" svg:height="2.567cm" svg:x="1.757cm" svg:y="0.161cm"><draw:text-box><text:p><text:span text:style-name="T82">rect[,] = rectangle(w, h);</text:span></text:p><text:p><text:span text:style-name="T82">cir[,] = circle(r,n);</text:span></text:p><text:p><text:span text:style-name="T82">vec[] = { cx, cy, 0 };</text:span></text:p><text:p><text:span text:style-name="T82">cir[,] = plot3D.translate(cir[,],vec[]);</text:span></text:p><text:p><text:span text:style-name="T82">p[,] = plot3D.holePlateQuads(rect[,],cir[,]);</text:span></text:p><text:p><text:span text:style-name="T82">plot3D.plotQuads(p[,]);</text:span></text:p></draw:text-box></draw:frame></text:p>
      <text:p text:style-name="P160"/>
      <text:p text:style-name="P160"/>
      <text:p text:style-name="P160"/>
      <text:p text:style-name="P160"/>
      <text:p text:style-name="P160"/>
      <text:p text:style-name="P160"/>
      <text:p text:style-name="P160"/>
      <text:p text:style-name="P160"><text:soft-page-break/></text:p>
      <text:p text:style-name="P162"><text:span text:style-name="T77">plot3D</text:span>.polygonSideQuadStrip(polygon[,],thicknes);</text:p>
      <text:p text:style-name="P162"><text:tab/>ポリゴンの側面データをQuadStripで作成</text:p>
      <text:p text:style-name="P159"/>
      <text:p text:style-name="P160"/>
      <text:p text:style-name="P160"/>
      <text:p text:style-name="P160"><draw:frame text:anchor-type="paragraph" draw:z-index="72" draw:name="テキスト枠 34" draw:style-name="gr49" draw:text-style-name="P149" svg:width="8.415cm" svg:height="1.721cm" svg:x="1.901cm" svg:y="0.153cm"><draw:text-box><text:p><text:span text:style-name="T82">rect[,] = rectangle(w, h);</text:span></text:p><text:p><text:span text:style-name="T82">rectSide[,] = plot3D.polygonSideQuadStrip(rect[,],-2);</text:span></text:p><text:p><text:span text:style-name="T82">plot3D.plotQuadeStrip(rectSide[,]);</text:span></text:p><text:p><text:span text:style-name="T82"/></text:p></draw:text-box></draw:frame><draw:frame draw:style-name="fr2" draw:name="画像24" text:anchor-type="char" svg:x="11.109cm" svg:y="0.109cm" svg:width="4.743cm" svg:height="4.897cm" draw:z-index="74"><draw:image xlink:href="Pictures/100000000000017400000180DF2960FF.png" xlink:type="simple" xlink:show="embed" xlink:actuate="onLoad" draw: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62">plot3D.polygonSideQuads(polygon[,],thicknes);</text:p>
      <text:p text:style-name="P162"><text:tab/>ポリゴンの側面データをQuadsで作成</text:p>
      <text:p text:style-name="P148"/>
      <text:p text:style-name="P162">plot3D.polylinRotateQuads(polyline[,],centerline[,],divAng,sa,ea);</text:p>
      <text:p text:style-name="P162"><text:tab/>ポリラインデーをセンタラインを中心に回転させたデータ</text:p>
      <text:p text:style-name="P162"/>
      <text:p text:style-name="P148"><draw:frame text:anchor-type="paragraph" draw:z-index="76" draw:name="テキスト枠 36" draw:style-name="gr50" draw:text-style-name="P149" svg:width="7.264cm" svg:height="4.067cm" svg:x="9.188cm" svg:y="0.416cm"><draw:text-box><text:p><text:span text:style-name="T82">// <text:s/></text:span><text:span text:style-name="T82">長方形データ</text:span><text:span text:style-name="T82">(</text:span><text:span text:style-name="T82">幅</text:span><text:span text:style-name="T82">,</text:span><text:span text:style-name="T82">高さ</text:span><text:span text:style-name="T82">)(x,y,0)</text:span></text:p><text:p><text:span text:style-name="T82">rectangle(w, h) {</text:span></text:p><text:p><text:span text:style-name="T82"><text:s text:c="4"/>w /= 2;</text:span></text:p><text:p><text:span text:style-name="T82"><text:s text:c="4"/>h /= 2;</text:span></text:p><text:p><text:span text:style-name="T82"><text:s text:c="4"/>p[0,] = { -w, -h, 0 };</text:span></text:p><text:p><text:span text:style-name="T82"><text:s text:c="4"/>p[1,] = { <text:s/>w, -h, 0 };</text:span></text:p><text:p><text:span text:style-name="T82"><text:s text:c="4"/>p[2,] = { <text:s/>w, <text:s/>h, 0 };</text:span></text:p><text:p><text:span text:style-name="T82"><text:s text:c="4"/>p[3,] = { -w, <text:s/>h, 0 };</text:span></text:p><text:p><text:span text:style-name="T82"><text:s text:c="4"/>return p[,];</text:span></text:p><text:p><text:span text:style-name="T82">}</text:span></text:p></draw:text-box></draw:frame></text:p>
      <text:p text:style-name="P148"><draw:frame text:anchor-type="paragraph" draw:z-index="75" draw:name="テキスト枠 35" draw:style-name="gr51" draw:text-style-name="P149" svg:width="7.264cm" svg:height="6.552cm" svg:x="0.843cm" svg:y="0.072cm"><draw:text-box><text:p><text:span text:style-name="T82">// <text:s/></text:span><text:span text:style-name="T82">円データ</text:span><text:span text:style-name="T82">(</text:span><text:span text:style-name="T82">半径</text:span><text:span text:style-name="T82">,</text:span><text:span text:style-name="T82">角数</text:span><text:span text:style-name="T82">)</text:span></text:p><text:p><text:span text:style-name="T82">circle(r,n) {</text:span></text:p><text:p><text:span text:style-name="T82"><text:s text:c="4"/>if (n &lt; 1) return pos[,];</text:span></text:p><text:p><text:span text:style-name="T82"><text:s text:c="4"/>step = 2 * PI / n;</text:span></text:p><text:p><text:span text:style-name="T82"><text:s text:c="4"/>i = 0;</text:span></text:p><text:p><text:span text:style-name="T82"><text:s text:c="4"/>z = 0;</text:span></text:p><text:p><text:span text:style-name="T82"><text:s text:c="4"/>for (ang <text:s/>= 0; ang &lt; 2 * PI; ang += step) {</text:span></text:p><text:p><text:span text:style-name="T82"><text:s text:c="8"/>x = r * cos(ang);</text:span></text:p><text:p><text:span text:style-name="T82"><text:s text:c="8"/>y = r * sin(ang);</text:span></text:p><text:p><text:span text:style-name="T82"><text:s text:c="8"/>pos[i, 0] = x;</text:span></text:p><text:p><text:span text:style-name="T82"><text:s text:c="8"/>pos[i, 1] = y;</text:span></text:p><text:p><text:span text:style-name="T82"><text:s text:c="8"/>pos[i, 2] = z;</text:span></text:p><text:p><text:span text:style-name="T82"><text:s text:c="8"/>i++;</text:span></text:p><text:p><text:span text:style-name="T82"><text:s text:c="4"/>}</text:span></text:p><text:p><text:span text:style-name="T82"><text:s text:c="4"/>return pos[,];</text:span></text:p><text:p><text:span text:style-name="T82">}</text:span></text:p><text:p><text:span text:style-name="T82"/></text:p></draw:text-box></draw:frame></text:p>
      <text:p text:style-name="P148"/>
      <text:p text:style-name="P148"/>
      <text:p text:style-name="P148"/>
      <text:p text:style-name="P148"/>
      <text:p text:style-name="P148"/>
      <text:p text:style-name="P148"/>
      <text:p text:style-name="P1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draw:fill-image draw:name="Bitmap_20_1" draw:display-name="Bitmap 1" xlink:href="Pictures/100000000000030700000231EDFB9F76.png" xlink:type="simple" xlink:show="embed" xlink:actuate="onLoad"/>
    <draw:marker draw:name="Triangle" svg:viewBox="0 0 1013 1130" svg:d="M1009 1050l-449-1008-22-30-29-12-34 12-21 26-449 1012-5 13v8l5 21 12 21 17 13 21 4h903l21-4 21-13 9-21 4-21v-8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0-11T20:08:33.609000000</meta:creation-date>
    <dc:date>2026-04-28T22:03:27.745726700</dc:date>
    <meta:editing-duration>P2DT1H3M48S</meta:editing-duration>
    <meta:editing-cycles>56</meta:editing-cycles>
    <meta:generator>LibreOffice/26.2.2.2$Windows_X86_64 LibreOffice_project/1f77d10d6938fd34972958f64b2bcfa54f8b1ba5</meta:generator>
    <meta:print-date>2024-10-30T20:10:08.143000000</meta:print-date>
    <meta:printed-by>PDF ファイル</meta:printed-by>
    <meta:document-statistic meta:table-count="0" meta:image-count="29" meta:object-count="0" meta:page-count="36" meta:paragraph-count="779" meta:word-count="10788" meta:character-count="24610" meta:non-whitespace-character-count="19766"/>
  </office:meta>
</office:document-meta>
</file>